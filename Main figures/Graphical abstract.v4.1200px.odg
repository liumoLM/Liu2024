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AB80C57E46.png" manifest:media-type="image/png"/>
  <manifest:file-entry manifest:full-path="Pictures/10000001000000DE000001AB435D484E.png" manifest:media-type="image/png"/>
  <manifest:file-entry manifest:full-path="Pictures/10000001000000DE000001AB8C8555FD.png" manifest:media-type="image/png"/>
  <manifest:file-entry manifest:full-path="Pictures/10000001000000DE000001AB1A7EFAE3.png" manifest:media-type="image/png"/>
  <manifest:file-entry manifest:full-path="Pictures/10000001000000DE000001ABD97CA192.png" manifest:media-type="image/png"/>
  <manifest:file-entry manifest:full-path="Pictures/100000010000002B00000015B7337BFC.png" manifest:media-type="image/png"/>
  <manifest:file-entry manifest:full-path="Pictures/100000010000002B00000015EB2DFFAD.png" manifest:media-type="image/png"/>
  <manifest:file-entry manifest:full-path="Pictures/100000010000002B0000001529E1E287.png" manifest:media-type="image/png"/>
  <manifest:file-entry manifest:full-path="Pictures/100000010000019E000000B5AA4BBFAA.png" manifest:media-type="image/png"/>
  <manifest:file-entry manifest:full-path="Pictures/100000010000019E000000BC9AA5622C.png" manifest:media-type="image/png"/>
  <manifest:file-entry manifest:full-path="Pictures/100000010000002B00000015D9C2F051.png" manifest:media-type="image/png"/>
  <manifest:file-entry manifest:full-path="Pictures/10000000000005500000068C289027A8.png" manifest:media-type="image/png"/>
  <manifest:file-entry manifest:full-path="Pictures/100000010000002B0000001589B22198.png" manifest:media-type="image/png"/>
  <manifest:file-entry manifest:full-path="Pictures/10000001000000400000003FBC905FA8.png" manifest:media-type="image/png"/>
  <manifest:file-entry manifest:full-path="Pictures/1000000000000ACD00000675B1C951E4.png" manifest:media-type="image/png"/>
  <manifest:file-entry manifest:full-path="Pictures/10000001000000DD000001AB6C2B633B.png" manifest:media-type="image/png"/>
  <manifest:file-entry manifest:full-path="Pictures/10000001000001B0000000D3832CF136.png" manifest:media-type="image/png"/>
  <manifest:file-entry manifest:full-path="Pictures/1000000100000171000001E7973D64E6.png" manifest:media-type="image/png"/>
  <manifest:file-entry manifest:full-path="Pictures/1000000100000055000000542FAF6096.png" manifest:media-type="image/png"/>
  <manifest:file-entry manifest:full-path="Pictures/100000010000003D0000003C594EB3F8.png" manifest:media-type="image/png"/>
  <manifest:file-entry manifest:full-path="Pictures/10000001000001AD000000B81F9966B6.png" manifest:media-type="image/png"/>
  <manifest:file-entry manifest:full-path="Pictures/100000010000019E0000007820638DA8.png" manifest:media-type="image/png"/>
  <manifest:file-entry manifest:full-path="Pictures/100000010000005E0000005EF87D0CC3.png" manifest:media-type="image/png"/>
  <manifest:file-entry manifest:full-path="Pictures/100000010000002B000000158030592A.png" manifest:media-type="image/png"/>
  <manifest:file-entry manifest:full-path="Pictures/100000000000098E00000AD0C9C96992.png" manifest:media-type="image/png"/>
  <manifest:file-entry manifest:full-path="Pictures/100000000000099900000B3C72C4199F.png" manifest:media-type="image/png"/>
  <manifest:file-entry manifest:full-path="Pictures/100000010000019F000000C8D94B53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f1f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f3f8f9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solid" svg:stroke-width="0.035cm" svg:stroke-color="#036eb7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solid" draw:fill-color="#036eb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20.28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4.1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fecf5" loext:decorative="false"/>
    </style:style>
    <style:style style:name="gr10" style:family="graphic" style:parent-style-name="standard">
      <style:graphic-properties draw:stroke="none" draw:fill="solid" draw:fill-color="#f5b86d" loext:decorative="false"/>
    </style:style>
    <style:style style:name="gr11" style:family="graphic" style:parent-style-name="standard">
      <style:graphic-properties draw:stroke="none" draw:fill="solid" draw:fill-color="#ee7d1a" loext:decorative="false"/>
    </style:style>
    <style:style style:name="gr12" style:family="graphic" style:parent-style-name="standard">
      <style:graphic-properties draw:stroke="none" draw:fill="solid" draw:fill-color="#abd288" loext:decorative="false"/>
    </style:style>
    <style:style style:name="gr13" style:family="graphic" style:parent-style-name="standard">
      <style:graphic-properties draw:stroke="none" draw:fill="solid" draw:fill-color="#399938" loext:decorative="false"/>
    </style:style>
    <style:style style:name="gr14" style:family="graphic" style:parent-style-name="standard">
      <style:graphic-properties draw:stroke="none" draw:fill="solid" draw:fill-color="#f7c6b1" loext:decorative="false"/>
    </style:style>
    <style:style style:name="gr15" style:family="graphic" style:parent-style-name="standard">
      <style:graphic-properties draw:stroke="none" draw:fill="solid" draw:fill-color="#ee8468" loext:decorative="false"/>
    </style:style>
    <style:style style:name="gr16" style:family="graphic" style:parent-style-name="standard">
      <style:graphic-properties draw:stroke="none" draw:fill="solid" draw:fill-color="#e24534" loext:decorative="false"/>
    </style:style>
    <style:style style:name="gr17" style:family="graphic" style:parent-style-name="standard">
      <style:graphic-properties draw:stroke="none" draw:fill="solid" draw:fill-color="#b11e23" loext:decorative="false"/>
    </style:style>
    <style:style style:name="gr18" style:family="graphic" style:parent-style-name="standard">
      <style:graphic-properties draw:stroke="none" draw:fill="solid" draw:fill-color="#cedeee" loext:decorative="false"/>
    </style:style>
    <style:style style:name="gr19" style:family="graphic" style:parent-style-name="standard">
      <style:graphic-properties draw:stroke="none" draw:fill="solid" draw:fill-color="#8fbdd6" loext:decorative="false"/>
    </style:style>
    <style:style style:name="gr20" style:family="graphic" style:parent-style-name="standard">
      <style:graphic-properties draw:stroke="none" draw:fill="solid" draw:fill-color="#4a8fbc" loext:decorative="false"/>
    </style:style>
    <style:style style:name="gr21" style:family="graphic" style:parent-style-name="standard">
      <style:graphic-properties draw:stroke="none" draw:fill="solid" draw:fill-color="#165f9f" loext:decorative="false"/>
    </style:style>
    <style:style style:name="gr22" style:family="graphic" style:parent-style-name="standard">
      <style:graphic-properties draw:stroke="none" draw:fill="solid" draw:fill-color="#e0e0ed" loext:decorative="false"/>
    </style:style>
    <style:style style:name="gr23" style:family="graphic" style:parent-style-name="standard">
      <style:graphic-properties draw:stroke="none" draw:fill="solid" draw:fill-color="#b2b2d3" loext:decorative="false"/>
    </style:style>
    <style:style style:name="gr24" style:family="graphic" style:parent-style-name="standard">
      <style:graphic-properties draw:stroke="none" draw:fill="solid" draw:fill-color="#807eb4" loext:decorative="false"/>
    </style:style>
    <style:style style:name="gr25" style:family="graphic" style:parent-style-name="standard">
      <style:graphic-properties draw:stroke="none" draw:fill="solid" draw:fill-color="#5b3d91" loext:decorative="false"/>
    </style:style>
    <style:style style:name="gr26" style:family="graphic" style:parent-style-name="standard">
      <style:graphic-properties draw:stroke="none" draw:fill="solid" draw:fill-color="#f4b86e" loext:decorative="false"/>
    </style:style>
    <style:style style:name="gr27" style:family="graphic" style:parent-style-name="standard">
      <style:graphic-properties draw:stroke="none" draw:fill="solid" draw:fill-color="#ee7d1c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7.06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2f5ef" loext:decorative="false"/>
    </style:style>
    <style:style style:name="gr30" style:family="graphic" style:parent-style-name="standard">
      <style:graphic-properties draw:stroke="solid" svg:stroke-width="0.071cm" svg:stroke-color="#f2f5ef" draw:stroke-linejoin="round" svg:stroke-linecap="butt" draw:fill="none" fo:padding-top="0.035cm" fo:padding-bottom="0.035cm" fo:padding-left="0.035cm" fo:padding-right="0.035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4cm" fo:min-width="1.86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96cm" fo:min-width="0.8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105cm" svg:stroke-color="#09345a" draw:stroke-linejoin="miter" svg:stroke-linecap="butt" draw:fill="none" fo:padding-top="0.052cm" fo:padding-bottom="0.052cm" fo:padding-left="0.052cm" fo:padding-right="0.052cm" loext:decorative="false"/>
    </style:style>
    <style:style style:name="gr35" style:family="graphic" style:parent-style-name="standard">
      <style:graphic-properties draw:stroke="none" draw:fill="solid" draw:fill-color="#09345a" loext:decorative="false"/>
    </style:style>
    <style:style style:name="gr36" style:family="graphic" style:parent-style-name="standard">
      <style:graphic-properties draw:stroke="none" draw:fill="solid" draw:fill-color="#f5b96e" loext:decorative="false"/>
    </style:style>
    <style:style style:name="gr37" style:family="graphic" style:parent-style-name="standard">
      <style:graphic-properties draw:stroke="none" draw:fill="solid" draw:fill-color="#e34533" loext:decorative="false"/>
    </style:style>
    <style:style style:name="gr38" style:family="graphic" style:parent-style-name="standard">
      <style:graphic-properties draw:stroke="solid" svg:stroke-width="0.037cm" svg:stroke-color="#ffffff" draw:stroke-linejoin="miter" svg:stroke-linecap="butt" draw:fill="solid" draw:fill-color="#f5b96e" fo:padding-top="0.018cm" fo:padding-bottom="0.018cm" fo:padding-left="0.018cm" fo:padding-right="0.018cm" loext:decorative="false"/>
    </style:style>
    <style:style style:name="gr39" style:family="graphic" style:parent-style-name="standard">
      <style:graphic-properties draw:stroke="none" draw:fill="solid" draw:fill-color="#f5ad4f" loext:decorative="false"/>
    </style:style>
    <style:style style:name="gr40" style:family="graphic" style:parent-style-name="standard">
      <style:graphic-properties draw:stroke="solid" svg:stroke-width="0.037cm" svg:stroke-color="#ffffff" draw:stroke-linejoin="miter" svg:stroke-linecap="butt" draw:fill="none" fo:padding-top="0.018cm" fo:padding-bottom="0.018cm" fo:padding-left="0.018cm" fo:padding-right="0.018cm" loext:decorative="false"/>
    </style:style>
    <style:style style:name="gr41" style:family="graphic" style:parent-style-name="standard">
      <style:graphic-properties draw:stroke="solid" svg:stroke-width="0.037cm" svg:stroke-color="#ffffff" draw:stroke-linejoin="miter" svg:stroke-linecap="butt" draw:fill="solid" draw:fill-color="#c3641a" fo:padding-top="0.018cm" fo:padding-bottom="0.018cm" fo:padding-left="0.018cm" fo:padding-right="0.018cm" loext:decorative="false"/>
    </style:style>
    <style:style style:name="gr42" style:family="graphic" style:parent-style-name="standard">
      <style:graphic-properties draw:stroke="none" draw:fill="solid" draw:fill-color="#70bc65" loext:decorative="false"/>
    </style:style>
    <style:style style:name="gr43" style:family="graphic" style:parent-style-name="standard">
      <style:graphic-properties draw:stroke="solid" svg:stroke-width="0.037cm" svg:stroke-color="#ffffff" draw:stroke-linejoin="miter" svg:stroke-linecap="butt" draw:fill="solid" draw:fill-color="#207639" fo:padding-top="0.018cm" fo:padding-bottom="0.018cm" fo:padding-left="0.018cm" fo:padding-right="0.018cm" loext:decorative="false"/>
    </style:style>
    <style:style style:name="gr44" style:family="graphic" style:parent-style-name="standard">
      <style:graphic-properties draw:stroke="solid" svg:stroke-width="0.037cm" svg:stroke-color="#ffffff" draw:stroke-linejoin="miter" svg:stroke-linecap="butt" draw:fill="solid" draw:fill-color="#4a8fbc" fo:padding-top="0.018cm" fo:padding-bottom="0.018cm" fo:padding-left="0.018cm" fo:padding-right="0.018cm" loext:decorative="false"/>
    </style:style>
    <style:style style:name="gr45" style:family="graphic" style:parent-style-name="standard">
      <style:graphic-properties draw:stroke="solid" svg:stroke-width="0.017cm" svg:stroke-color="#040000" draw:stroke-linejoin="round" svg:stroke-linecap="butt" draw:fill="none" fo:padding-top="0.008cm" fo:padding-bottom="0.008cm" fo:padding-left="0.008cm" fo:padding-right="0.008cm" loext:decorative="false"/>
    </style:style>
    <style:style style:name="gr46" style:family="graphic" style:parent-style-name="standard">
      <style:graphic-properties draw:stroke="solid" svg:stroke-width="0.037cm" svg:stroke-color="#ffffff" draw:stroke-linejoin="miter" svg:stroke-linecap="butt" draw:fill="solid" draw:fill-color="#f4b86e" fo:padding-top="0.018cm" fo:padding-bottom="0.018cm" fo:padding-left="0.018cm" fo:padding-right="0.018cm" loext:decorative="false"/>
    </style:style>
    <style:style style:name="gr47" style:family="graphic" style:parent-style-name="standard">
      <style:graphic-properties draw:stroke="solid" svg:stroke-width="0.037cm" svg:stroke-color="#ffffff" draw:stroke-linejoin="miter" svg:stroke-linecap="butt" draw:fill="solid" draw:fill-color="#ee7d1c" fo:padding-top="0.018cm" fo:padding-bottom="0.018cm" fo:padding-left="0.018cm" fo:padding-right="0.018cm" loext:decorative="false"/>
    </style:style>
    <style:style style:name="gr48" style:family="graphic" style:parent-style-name="standard">
      <style:graphic-properties draw:stroke="solid" svg:stroke-width="0.008cm" svg:stroke-color="#7e7e7f" draw:stroke-linejoin="round" svg:stroke-linecap="round" draw:fill="none" fo:padding-top="0.004cm" fo:padding-bottom="0.004cm" fo:padding-left="0.004cm" fo:padding-right="0.004cm" loext:decorative="false"/>
    </style:style>
    <style:style style:name="gr49" style:family="graphic" style:parent-style-name="standard">
      <style:graphic-properties draw:stroke="solid" svg:stroke-width="0.008cm" svg:stroke-color="#7e7e7f" draw:stroke-linejoin="round" svg:stroke-linecap="round" draw:fill="solid" draw:fill-color="#ffffff" fo:padding-top="0.004cm" fo:padding-bottom="0.004cm" fo:padding-left="0.004cm" fo:padding-right="0.004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3.00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9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solid" svg:stroke-width="0.017cm" svg:stroke-color="#323333" draw:stroke-linejoin="round" svg:stroke-linecap="butt" draw:fill="none" fo:padding-top="0.008cm" fo:padding-bottom="0.008cm" fo:padding-left="0.008cm" fo:padding-right="0.008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7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5c3d91" loext:decorative="false"/>
    </style:style>
    <style:style style:name="gr56" style:family="graphic" style:parent-style-name="standard">
      <style:graphic-properties draw:stroke="none" draw:fill="solid" draw:fill-color="#f4ad4f" loext:decorative="false"/>
    </style:style>
    <style:style style:name="gr57" style:family="graphic" style:parent-style-name="standard">
      <style:graphic-properties draw:stroke="solid" svg:stroke-width="0.037cm" svg:stroke-color="#ffffff" draw:stroke-linejoin="miter" svg:stroke-linecap="butt" draw:fill="solid" draw:fill-color="#237739" fo:padding-top="0.018cm" fo:padding-bottom="0.018cm" fo:padding-left="0.018cm" fo:padding-right="0.018cm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.96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1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1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solid" draw:fill-color="#ee7c1a" loext:decorative="false"/>
    </style:style>
    <style:style style:name="gr62" style:family="graphic" style:parent-style-name="standard">
      <style:graphic-properties draw:stroke="none" draw:fill="solid" draw:fill-color="#369939" loext:decorative="false"/>
    </style:style>
    <style:style style:name="gr63" style:family="graphic" style:parent-style-name="standard">
      <style:graphic-properties draw:stroke="solid" svg:stroke-width="0.029cm" svg:stroke-color="#ffffff" draw:stroke-linejoin="miter" svg:stroke-linecap="butt" draw:fill="none" fo:padding-top="0.014cm" fo:padding-bottom="0.014cm" fo:padding-left="0.014cm" fo:padding-right="0.014cm" loext:decorative="false"/>
    </style:style>
    <style:style style:name="gr64" style:family="graphic" style:parent-style-name="standard">
      <style:graphic-properties draw:stroke="none" draw:fill="solid" draw:fill-color="#c3641a" loext:decorative="false"/>
    </style:style>
    <style:style style:name="gr65" style:family="graphic" style:parent-style-name="standard">
      <style:graphic-properties draw:stroke="none" draw:fill="solid" draw:fill-color="#207639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6.65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1.29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4.14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fefefe" loext:decorative="false"/>
    </style:style>
    <style:style style:name="gr71" style:family="graphic" style:parent-style-name="standard">
      <style:graphic-properties draw:stroke="none" draw:fill="solid" draw:fill-color="#fdfdfe" loext:decorative="false"/>
    </style:style>
    <style:style style:name="gr72" style:family="graphic" style:parent-style-name="standard">
      <style:graphic-properties draw:stroke="none" draw:fill="solid" draw:fill-color="#fdfdfd" loext:decorative="false"/>
    </style:style>
    <style:style style:name="gr73" style:family="graphic" style:parent-style-name="standard">
      <style:graphic-properties draw:stroke="none" draw:fill="solid" draw:fill-color="#fcfcfd" loext:decorative="false"/>
    </style:style>
    <style:style style:name="gr74" style:family="graphic" style:parent-style-name="standard">
      <style:graphic-properties draw:stroke="none" draw:fill="solid" draw:fill-color="#fbfcfc" loext:decorative="false"/>
    </style:style>
    <style:style style:name="gr75" style:family="graphic" style:parent-style-name="standard">
      <style:graphic-properties draw:stroke="none" draw:fill="solid" draw:fill-color="#fbfbfc" loext:decorative="false"/>
    </style:style>
    <style:style style:name="gr76" style:family="graphic" style:parent-style-name="standard">
      <style:graphic-properties draw:stroke="none" draw:fill="solid" draw:fill-color="#fafafb" loext:decorative="false"/>
    </style:style>
    <style:style style:name="gr77" style:family="graphic" style:parent-style-name="standard">
      <style:graphic-properties draw:stroke="none" draw:fill="solid" draw:fill-color="#f9f9fa" loext:decorative="false"/>
    </style:style>
    <style:style style:name="gr78" style:family="graphic" style:parent-style-name="standard">
      <style:graphic-properties draw:stroke="none" draw:fill="solid" draw:fill-color="#f8f9fa" loext:decorative="false"/>
    </style:style>
    <style:style style:name="gr79" style:family="graphic" style:parent-style-name="standard">
      <style:graphic-properties draw:stroke="none" draw:fill="solid" draw:fill-color="#f7f8f9" loext:decorative="false"/>
    </style:style>
    <style:style style:name="gr80" style:family="graphic" style:parent-style-name="standard">
      <style:graphic-properties draw:stroke="none" draw:fill="solid" draw:fill-color="#f7f7f8" loext:decorative="false"/>
    </style:style>
    <style:style style:name="gr81" style:family="graphic" style:parent-style-name="standard">
      <style:graphic-properties draw:stroke="none" draw:fill="solid" draw:fill-color="#f6f6f8" loext:decorative="false"/>
    </style:style>
    <style:style style:name="gr82" style:family="graphic" style:parent-style-name="standard">
      <style:graphic-properties draw:stroke="none" draw:fill="solid" draw:fill-color="#f5f5f7" loext:decorative="false"/>
    </style:style>
    <style:style style:name="gr83" style:family="graphic" style:parent-style-name="standard">
      <style:graphic-properties draw:stroke="none" draw:fill="solid" draw:fill-color="#f4f4f6" loext:decorative="false"/>
    </style:style>
    <style:style style:name="gr84" style:family="graphic" style:parent-style-name="standard">
      <style:graphic-properties draw:stroke="none" draw:fill="solid" draw:fill-color="#f3f3f5" loext:decorative="false"/>
    </style:style>
    <style:style style:name="gr85" style:family="graphic" style:parent-style-name="standard">
      <style:graphic-properties draw:stroke="none" draw:fill="solid" draw:fill-color="#f2f3f5" loext:decorative="false"/>
    </style:style>
    <style:style style:name="gr86" style:family="graphic" style:parent-style-name="standard">
      <style:graphic-properties draw:stroke="none" draw:fill="solid" draw:fill-color="#f1f2f4" loext:decorative="false"/>
    </style:style>
    <style:style style:name="gr87" style:family="graphic" style:parent-style-name="standard">
      <style:graphic-properties draw:stroke="none" draw:fill="solid" draw:fill-color="#f0f1f3" loext:decorative="false"/>
    </style:style>
    <style:style style:name="gr88" style:family="graphic" style:parent-style-name="standard">
      <style:graphic-properties draw:stroke="none" draw:fill="solid" draw:fill-color="#eff0f2" loext:decorative="false"/>
    </style:style>
    <style:style style:name="gr89" style:family="graphic" style:parent-style-name="standard">
      <style:graphic-properties draw:stroke="none" draw:fill="solid" draw:fill-color="#efeff2" loext:decorative="false"/>
    </style:style>
    <style:style style:name="gr90" style:family="graphic" style:parent-style-name="standard">
      <style:graphic-properties draw:stroke="none" draw:fill="solid" draw:fill-color="#eeeff2" loext:decorative="false"/>
    </style:style>
    <style:style style:name="gr91" style:family="graphic" style:parent-style-name="standard">
      <style:graphic-properties draw:stroke="none" draw:fill="solid" draw:fill-color="#eeeef1" loext:decorative="false"/>
    </style:style>
    <style:style style:name="gr92" style:family="graphic" style:parent-style-name="standard">
      <style:graphic-properties draw:stroke="none" draw:fill="solid" draw:fill-color="#edeef1" loext:decorative="false"/>
    </style:style>
    <style:style style:name="gr93" style:family="graphic" style:parent-style-name="standard">
      <style:graphic-properties draw:stroke="none" draw:fill="solid" draw:fill-color="#ededf0" loext:decorative="false"/>
    </style:style>
    <style:style style:name="gr94" style:family="graphic" style:parent-style-name="standard">
      <style:graphic-properties draw:stroke="none" draw:fill="solid" draw:fill-color="#ecedf0" loext:decorative="false"/>
    </style:style>
    <style:style style:name="gr95" style:family="graphic" style:parent-style-name="standard">
      <style:graphic-properties draw:stroke="none" draw:fill="solid" draw:fill-color="#ececf0" loext:decorative="false"/>
    </style:style>
    <style:style style:name="gr96" style:family="graphic" style:parent-style-name="standard">
      <style:graphic-properties draw:stroke="none" draw:fill="solid" draw:fill-color="#ebecef" loext:decorative="false"/>
    </style:style>
    <style:style style:name="gr97" style:family="graphic" style:parent-style-name="standard">
      <style:graphic-properties draw:stroke="none" draw:fill="solid" draw:fill-color="#ebebef" loext:decorative="false"/>
    </style:style>
    <style:style style:name="gr98" style:family="graphic" style:parent-style-name="standard">
      <style:graphic-properties draw:stroke="none" draw:fill="solid" draw:fill-color="#eaebee" loext:decorative="false"/>
    </style:style>
    <style:style style:name="gr99" style:family="graphic" style:parent-style-name="standard">
      <style:graphic-properties draw:stroke="none" draw:fill="solid" draw:fill-color="#eaeaee" loext:decorative="false"/>
    </style:style>
    <style:style style:name="gr100" style:family="graphic" style:parent-style-name="standard">
      <style:graphic-properties draw:stroke="none" draw:fill="solid" draw:fill-color="#e9eaee" loext:decorative="false"/>
    </style:style>
    <style:style style:name="gr101" style:family="graphic" style:parent-style-name="standard">
      <style:graphic-properties draw:stroke="none" draw:fill="solid" draw:fill-color="#e8e9ed" loext:decorative="false"/>
    </style:style>
    <style:style style:name="gr102" style:family="graphic" style:parent-style-name="standard">
      <style:graphic-properties draw:stroke="none" draw:fill="solid" draw:fill-color="#e7e8ec" loext:decorative="false"/>
    </style:style>
    <style:style style:name="gr103" style:family="graphic" style:parent-style-name="standard">
      <style:graphic-properties draw:stroke="none" draw:fill="solid" draw:fill-color="#e6e7eb" loext:decorative="false"/>
    </style:style>
    <style:style style:name="gr104" style:family="graphic" style:parent-style-name="standard">
      <style:graphic-properties draw:stroke="none" draw:fill="solid" draw:fill-color="#e5e6ea" loext:decorative="false"/>
    </style:style>
    <style:style style:name="gr105" style:family="graphic" style:parent-style-name="standard">
      <style:graphic-properties draw:stroke="none" draw:fill="solid" draw:fill-color="#e4e5ea" loext:decorative="false"/>
    </style:style>
    <style:style style:name="gr106" style:family="graphic" style:parent-style-name="standard">
      <style:graphic-properties draw:stroke="none" draw:fill="solid" draw:fill-color="#e3e5e9" loext:decorative="false"/>
    </style:style>
    <style:style style:name="gr107" style:family="graphic" style:parent-style-name="standard">
      <style:graphic-properties draw:stroke="none" draw:fill="solid" draw:fill-color="#e3e4e9" loext:decorative="false"/>
    </style:style>
    <style:style style:name="gr108" style:family="graphic" style:parent-style-name="standard">
      <style:graphic-properties draw:stroke="none" draw:fill="solid" draw:fill-color="#e2e4e8" loext:decorative="false"/>
    </style:style>
    <style:style style:name="gr109" style:family="graphic" style:parent-style-name="standard">
      <style:graphic-properties draw:stroke="none" draw:fill="solid" draw:fill-color="#e2e3e8" loext:decorative="false"/>
    </style:style>
    <style:style style:name="gr110" style:family="graphic" style:parent-style-name="standard">
      <style:graphic-properties draw:stroke="none" draw:fill="solid" draw:fill-color="#e1e2e7" loext:decorative="false"/>
    </style:style>
    <style:style style:name="gr111" style:family="graphic" style:parent-style-name="standard">
      <style:graphic-properties draw:stroke="none" draw:fill="solid" draw:fill-color="#e0e1e6" loext:decorative="false"/>
    </style:style>
    <style:style style:name="gr112" style:family="graphic" style:parent-style-name="standard">
      <style:graphic-properties draw:stroke="none" draw:fill="solid" draw:fill-color="#dfe1e6" loext:decorative="false"/>
    </style:style>
    <style:style style:name="gr113" style:family="graphic" style:parent-style-name="standard">
      <style:graphic-properties draw:stroke="none" draw:fill="solid" draw:fill-color="#dfe0e5" loext:decorative="false"/>
    </style:style>
    <style:style style:name="gr114" style:family="graphic" style:parent-style-name="standard">
      <style:graphic-properties draw:stroke="none" draw:fill="solid" draw:fill-color="#dee0e5" loext:decorative="false"/>
    </style:style>
    <style:style style:name="gr115" style:family="graphic" style:parent-style-name="standard">
      <style:graphic-properties draw:stroke="none" draw:fill="solid" draw:fill-color="#dedfe4" loext:decorative="false"/>
    </style:style>
    <style:style style:name="gr116" style:family="graphic" style:parent-style-name="standard">
      <style:graphic-properties draw:stroke="none" draw:fill="solid" draw:fill-color="#dddfe4" loext:decorative="false"/>
    </style:style>
    <style:style style:name="gr117" style:family="graphic" style:parent-style-name="standard">
      <style:graphic-properties draw:stroke="none" draw:fill="solid" draw:fill-color="#dcdee4" loext:decorative="false"/>
    </style:style>
    <style:style style:name="gr118" style:family="graphic" style:parent-style-name="standard">
      <style:graphic-properties draw:stroke="none" draw:fill="solid" draw:fill-color="#dcdde3" loext:decorative="false"/>
    </style:style>
    <style:style style:name="gr119" style:family="graphic" style:parent-style-name="standard">
      <style:graphic-properties draw:stroke="none" draw:fill="solid" draw:fill-color="#dbdde3" loext:decorative="false"/>
    </style:style>
    <style:style style:name="gr120" style:family="graphic" style:parent-style-name="standard">
      <style:graphic-properties draw:stroke="none" draw:fill="solid" draw:fill-color="#dbdce2" loext:decorative="false"/>
    </style:style>
    <style:style style:name="gr121" style:family="graphic" style:parent-style-name="standard">
      <style:graphic-properties draw:stroke="none" draw:fill="solid" draw:fill-color="#dadce2" loext:decorative="false"/>
    </style:style>
    <style:style style:name="gr122" style:family="graphic" style:parent-style-name="standard">
      <style:graphic-properties draw:stroke="none" draw:fill="solid" draw:fill-color="#d9dbe1" loext:decorative="false"/>
    </style:style>
    <style:style style:name="gr123" style:family="graphic" style:parent-style-name="standard">
      <style:graphic-properties draw:stroke="none" draw:fill="solid" draw:fill-color="#d9dae1" loext:decorative="false"/>
    </style:style>
    <style:style style:name="gr124" style:family="graphic" style:parent-style-name="standard">
      <style:graphic-properties draw:stroke="none" draw:fill="solid" draw:fill-color="#d8dae0" loext:decorative="false"/>
    </style:style>
    <style:style style:name="gr125" style:family="graphic" style:parent-style-name="standard">
      <style:graphic-properties draw:stroke="none" draw:fill="solid" draw:fill-color="#d8d9e0" loext:decorative="false"/>
    </style:style>
    <style:style style:name="gr126" style:family="graphic" style:parent-style-name="standard">
      <style:graphic-properties draw:stroke="none" draw:fill="solid" draw:fill-color="#d7d9df" loext:decorative="false"/>
    </style:style>
    <style:style style:name="gr127" style:family="graphic" style:parent-style-name="standard">
      <style:graphic-properties draw:stroke="none" draw:fill="solid" draw:fill-color="#d6d8df" loext:decorative="false"/>
    </style:style>
    <style:style style:name="gr128" style:family="graphic" style:parent-style-name="standard">
      <style:graphic-properties draw:stroke="none" draw:fill="solid" draw:fill-color="#d6d8de" loext:decorative="false"/>
    </style:style>
    <style:style style:name="gr129" style:family="graphic" style:parent-style-name="standard">
      <style:graphic-properties draw:stroke="none" draw:fill="solid" draw:fill-color="#d5d7de" loext:decorative="false"/>
    </style:style>
    <style:style style:name="gr130" style:family="graphic" style:parent-style-name="standard">
      <style:graphic-properties draw:stroke="none" draw:fill="solid" draw:fill-color="#d4d6dd" loext:decorative="false"/>
    </style:style>
    <style:style style:name="gr131" style:family="graphic" style:parent-style-name="standard">
      <style:graphic-properties draw:stroke="none" draw:fill="solid" draw:fill-color="#d3d5dc" loext:decorative="false"/>
    </style:style>
    <style:style style:name="gr132" style:family="graphic" style:parent-style-name="standard">
      <style:graphic-properties draw:stroke="none" draw:fill="solid" draw:fill-color="#d2d4db" loext:decorative="false"/>
    </style:style>
    <style:style style:name="gr133" style:family="graphic" style:parent-style-name="standard">
      <style:graphic-properties draw:stroke="none" draw:fill="solid" draw:fill-color="#d1d3db" loext:decorative="false"/>
    </style:style>
    <style:style style:name="gr134" style:family="graphic" style:parent-style-name="standard">
      <style:graphic-properties draw:stroke="none" draw:fill="solid" draw:fill-color="#d1d3da" loext:decorative="false"/>
    </style:style>
    <style:style style:name="gr135" style:family="graphic" style:parent-style-name="standard">
      <style:graphic-properties draw:stroke="none" draw:fill="solid" draw:fill-color="#d0d2da" loext:decorative="false"/>
    </style:style>
    <style:style style:name="gr136" style:family="graphic" style:parent-style-name="standard">
      <style:graphic-properties draw:stroke="none" draw:fill="solid" draw:fill-color="#cfd1d9" loext:decorative="false"/>
    </style:style>
    <style:style style:name="gr137" style:family="graphic" style:parent-style-name="standard">
      <style:graphic-properties draw:stroke="none" draw:fill="solid" draw:fill-color="#ced0d8" loext:decorative="false"/>
    </style:style>
    <style:style style:name="gr138" style:family="graphic" style:parent-style-name="standard">
      <style:graphic-properties draw:stroke="none" draw:fill="solid" draw:fill-color="#cdd0d8" loext:decorative="false"/>
    </style:style>
    <style:style style:name="gr139" style:family="graphic" style:parent-style-name="standard">
      <style:graphic-properties draw:stroke="none" draw:fill="solid" draw:fill-color="#cdcfd7" loext:decorative="false"/>
    </style:style>
    <style:style style:name="gr140" style:family="graphic" style:parent-style-name="standard">
      <style:graphic-properties draw:stroke="none" draw:fill="solid" draw:fill-color="#ccced7" loext:decorative="false"/>
    </style:style>
    <style:style style:name="gr141" style:family="graphic" style:parent-style-name="standard">
      <style:graphic-properties draw:stroke="none" draw:fill="solid" draw:fill-color="#cbced6" loext:decorative="false"/>
    </style:style>
    <style:style style:name="gr142" style:family="graphic" style:parent-style-name="standard">
      <style:graphic-properties draw:stroke="none" draw:fill="solid" draw:fill-color="#cbcdd6" loext:decorative="false"/>
    </style:style>
    <style:style style:name="gr143" style:family="graphic" style:parent-style-name="standard">
      <style:graphic-properties draw:stroke="none" draw:fill="solid" draw:fill-color="#caccd5" loext:decorative="false"/>
    </style:style>
    <style:style style:name="gr144" style:family="graphic" style:parent-style-name="standard">
      <style:graphic-properties draw:stroke="none" draw:fill="solid" draw:fill-color="#c9ccd5" loext:decorative="false"/>
    </style:style>
    <style:style style:name="gr145" style:family="graphic" style:parent-style-name="standard">
      <style:graphic-properties draw:stroke="none" draw:fill="solid" draw:fill-color="#c9cbd4" loext:decorative="false"/>
    </style:style>
    <style:style style:name="gr146" style:family="graphic" style:parent-style-name="standard">
      <style:graphic-properties draw:stroke="none" draw:fill="solid" draw:fill-color="#c8cbd3" loext:decorative="false"/>
    </style:style>
    <style:style style:name="gr147" style:family="graphic" style:parent-style-name="standard">
      <style:graphic-properties draw:stroke="none" draw:fill="solid" draw:fill-color="#c8cad3" loext:decorative="false"/>
    </style:style>
    <style:style style:name="gr148" style:family="graphic" style:parent-style-name="standard">
      <style:graphic-properties draw:stroke="none" draw:fill="solid" draw:fill-color="#c7c9d2" loext:decorative="false"/>
    </style:style>
    <style:style style:name="gr149" style:family="graphic" style:parent-style-name="standard">
      <style:graphic-properties draw:stroke="none" draw:fill="solid" draw:fill-color="#c6c9d2" loext:decorative="false"/>
    </style:style>
    <style:style style:name="gr150" style:family="graphic" style:parent-style-name="standard">
      <style:graphic-properties draw:stroke="none" draw:fill="solid" draw:fill-color="#c6c8d1" loext:decorative="false"/>
    </style:style>
    <style:style style:name="gr151" style:family="graphic" style:parent-style-name="standard">
      <style:graphic-properties draw:stroke="none" draw:fill="solid" draw:fill-color="#c5c7d1" loext:decorative="false"/>
    </style:style>
    <style:style style:name="gr152" style:family="graphic" style:parent-style-name="standard">
      <style:graphic-properties draw:stroke="none" draw:fill="solid" draw:fill-color="#c4c7d0" loext:decorative="false"/>
    </style:style>
    <style:style style:name="gr153" style:family="graphic" style:parent-style-name="standard">
      <style:graphic-properties draw:stroke="none" draw:fill="solid" draw:fill-color="#c3c6d0" loext:decorative="false"/>
    </style:style>
    <style:style style:name="gr154" style:family="graphic" style:parent-style-name="standard">
      <style:graphic-properties draw:stroke="none" draw:fill="solid" draw:fill-color="#c3c5cf" loext:decorative="false"/>
    </style:style>
    <style:style style:name="gr155" style:family="graphic" style:parent-style-name="standard">
      <style:graphic-properties draw:stroke="none" draw:fill="solid" draw:fill-color="#c2c5cf" loext:decorative="false"/>
    </style:style>
    <style:style style:name="gr156" style:family="graphic" style:parent-style-name="standard">
      <style:graphic-properties draw:stroke="none" draw:fill="solid" draw:fill-color="#c1c4ce" loext:decorative="false"/>
    </style:style>
    <style:style style:name="gr157" style:family="graphic" style:parent-style-name="standard">
      <style:graphic-properties draw:stroke="none" draw:fill="solid" draw:fill-color="#c0c3cd" loext:decorative="false"/>
    </style:style>
    <style:style style:name="gr158" style:family="graphic" style:parent-style-name="standard">
      <style:graphic-properties draw:stroke="none" draw:fill="solid" draw:fill-color="#bfc2cc" loext:decorative="false"/>
    </style:style>
    <style:style style:name="gr159" style:family="graphic" style:parent-style-name="standard">
      <style:graphic-properties draw:stroke="none" draw:fill="solid" draw:fill-color="#bec1cb" loext:decorative="false"/>
    </style:style>
    <style:style style:name="gr160" style:family="graphic" style:parent-style-name="standard">
      <style:graphic-properties draw:stroke="none" draw:fill="solid" draw:fill-color="#bdc0cb" loext:decorative="false"/>
    </style:style>
    <style:style style:name="gr161" style:family="graphic" style:parent-style-name="standard">
      <style:graphic-properties draw:stroke="none" draw:fill="solid" draw:fill-color="#bdc0ca" loext:decorative="false"/>
    </style:style>
    <style:style style:name="gr162" style:family="graphic" style:parent-style-name="standard">
      <style:graphic-properties draw:stroke="none" draw:fill="solid" draw:fill-color="#bcbfca" loext:decorative="false"/>
    </style:style>
    <style:style style:name="gr163" style:family="graphic" style:parent-style-name="standard">
      <style:graphic-properties draw:stroke="none" draw:fill="solid" draw:fill-color="#bbbec9" loext:decorative="false"/>
    </style:style>
    <style:style style:name="gr164" style:family="graphic" style:parent-style-name="standard">
      <style:graphic-properties draw:stroke="solid" svg:stroke-width="0.037cm" svg:stroke-color="#040000" draw:stroke-linejoin="miter" svg:stroke-linecap="butt" draw:fill="solid" draw:fill-color="#95c181" fo:padding-top="0.018cm" fo:padding-bottom="0.018cm" fo:padding-left="0.018cm" fo:padding-right="0.018cm" loext:decorative="false"/>
    </style:style>
    <style:style style:name="gr165" style:family="graphic" style:parent-style-name="standard">
      <style:graphic-properties draw:stroke="dash" draw:stroke-dash="stroke-dash394" svg:stroke-width="0.07cm" svg:stroke-color="#e61f19" draw:stroke-linejoin="round" svg:stroke-linecap="butt" draw:fill="none" fo:padding-top="0.035cm" fo:padding-bottom="0.035cm" fo:padding-left="0.035cm" fo:padding-right="0.035cm" loext:decorative="false"/>
    </style:style>
    <style:style style:name="gr166" style:family="graphic" style:parent-style-name="standard">
      <style:graphic-properties draw:stroke="solid" svg:stroke-width="0.037cm" svg:stroke-color="#040000" draw:stroke-linejoin="round" svg:stroke-linecap="butt" draw:fill="none" fo:padding-top="0.018cm" fo:padding-bottom="0.018cm" fo:padding-left="0.018cm" fo:padding-right="0.018cm" loext:decorative="false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4.09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092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93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565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112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341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1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156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solid" svg:stroke-width="0.017cm" svg:stroke-color="#666666" draw:stroke-linejoin="miter" svg:stroke-linecap="butt" draw:fill="none" fo:padding-top="0.008cm" fo:padding-bottom="0.008cm" fo:padding-left="0.008cm" fo:padding-right="0.008cm" loext:decorative="false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35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38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23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44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solid" svg:stroke-width="0.017cm" svg:stroke-color="#666666" draw:stroke-linejoin="miter" svg:stroke-linecap="butt" draw:fill="solid" draw:fill-color="#547297" fo:padding-top="0.008cm" fo:padding-bottom="0.008cm" fo:padding-left="0.008cm" fo:padding-right="0.008cm" loext:decorative="false"/>
    </style:style>
    <style:style style:name="gr181" style:family="graphic" style:parent-style-name="standard">
      <style:graphic-properties draw:stroke="solid" svg:stroke-width="0.017cm" svg:stroke-color="#666666" draw:stroke-linejoin="miter" svg:stroke-linecap="butt" draw:fill="solid" draw:fill-color="#d54846" fo:padding-top="0.008cm" fo:padding-bottom="0.008cm" fo:padding-left="0.008cm" fo:padding-right="0.008cm" loext:decorative="false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95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9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8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1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solid" svg:stroke-width="0.017cm" svg:stroke-color="#666666" draw:stroke-linejoin="miter" svg:stroke-linecap="butt" draw:fill="solid" draw:fill-color="#dd9b27" fo:padding-top="0.008cm" fo:padding-bottom="0.008cm" fo:padding-left="0.008cm" fo:padding-right="0.008cm" loext:decorative="false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9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solid" svg:stroke-width="0.017cm" svg:stroke-color="#666666" draw:stroke-linejoin="miter" svg:stroke-linecap="butt" draw:fill="solid" draw:fill-color="#67a9cb" fo:padding-top="0.008cm" fo:padding-bottom="0.008cm" fo:padding-left="0.008cm" fo:padding-right="0.008cm" loext:decorative="false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87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solid" svg:stroke-width="0.017cm" svg:stroke-color="#666666" draw:stroke-linejoin="miter" svg:stroke-linecap="butt" draw:fill="solid" draw:fill-color="#2ab4b8" fo:padding-top="0.008cm" fo:padding-bottom="0.008cm" fo:padding-left="0.008cm" fo:padding-right="0.008cm" loext:decorative="false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8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solid" svg:stroke-width="0.017cm" svg:stroke-color="#666666" draw:stroke-linejoin="miter" svg:stroke-linecap="butt" draw:fill="solid" draw:fill-color="#f0776d" fo:padding-top="0.008cm" fo:padding-bottom="0.008cm" fo:padding-left="0.008cm" fo:padding-right="0.008cm" loext:decorative="false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07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53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17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9.157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solid" draw:fill-color="#000000" loext:decorative="false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2.60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df1f6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3f8f9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36eb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9" style:family="paragraph">
      <loext:graphic-properties draw:fill="solid" draw:fill-color="#efecf5"/>
    </style:style>
    <style:style style:name="P10" style:family="paragraph">
      <loext:graphic-properties draw:fill="solid" draw:fill-color="#f5b86d"/>
    </style:style>
    <style:style style:name="P11" style:family="paragraph">
      <loext:graphic-properties draw:fill="solid" draw:fill-color="#ee7d1a"/>
    </style:style>
    <style:style style:name="P12" style:family="paragraph">
      <loext:graphic-properties draw:fill="solid" draw:fill-color="#abd288"/>
    </style:style>
    <style:style style:name="P13" style:family="paragraph">
      <loext:graphic-properties draw:fill="solid" draw:fill-color="#399938"/>
    </style:style>
    <style:style style:name="P14" style:family="paragraph">
      <loext:graphic-properties draw:fill="solid" draw:fill-color="#f7c6b1"/>
    </style:style>
    <style:style style:name="P15" style:family="paragraph">
      <loext:graphic-properties draw:fill="solid" draw:fill-color="#ee8468"/>
    </style:style>
    <style:style style:name="P16" style:family="paragraph">
      <loext:graphic-properties draw:fill="solid" draw:fill-color="#e24534"/>
    </style:style>
    <style:style style:name="P17" style:family="paragraph">
      <loext:graphic-properties draw:fill="solid" draw:fill-color="#b11e23"/>
    </style:style>
    <style:style style:name="P18" style:family="paragraph">
      <loext:graphic-properties draw:fill="solid" draw:fill-color="#cedeee"/>
    </style:style>
    <style:style style:name="P19" style:family="paragraph">
      <loext:graphic-properties draw:fill="solid" draw:fill-color="#8fbdd6"/>
    </style:style>
    <style:style style:name="P20" style:family="paragraph">
      <loext:graphic-properties draw:fill="solid" draw:fill-color="#4a8fbc"/>
    </style:style>
    <style:style style:name="P21" style:family="paragraph">
      <loext:graphic-properties draw:fill="solid" draw:fill-color="#165f9f"/>
    </style:style>
    <style:style style:name="P22" style:family="paragraph">
      <loext:graphic-properties draw:fill="solid" draw:fill-color="#e0e0ed"/>
    </style:style>
    <style:style style:name="P23" style:family="paragraph">
      <loext:graphic-properties draw:fill="solid" draw:fill-color="#b2b2d3"/>
    </style:style>
    <style:style style:name="P24" style:family="paragraph">
      <loext:graphic-properties draw:fill="solid" draw:fill-color="#807eb4"/>
    </style:style>
    <style:style style:name="P25" style:family="paragraph">
      <loext:graphic-properties draw:fill="solid" draw:fill-color="#5b3d91"/>
    </style:style>
    <style:style style:name="P26" style:family="paragraph">
      <loext:graphic-properties draw:fill="solid" draw:fill-color="#f4b86e"/>
    </style:style>
    <style:style style:name="P27" style:family="paragraph">
      <loext:graphic-properties draw:fill="solid" draw:fill-color="#ee7d1c"/>
    </style:style>
    <style:style style:name="P28" style:family="paragraph">
      <loext:graphic-properties draw:fill="solid" draw:fill-color="#f2f5ef"/>
    </style:style>
    <style:style style:name="P29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30" style:family="paragraph">
      <loext:graphic-properties draw:fill="none"/>
      <style:text-properties fo:font-size="25.2999992370605pt" style:font-size-asian="25.2999992370605pt" style:font-size-complex="25.2999992370605pt"/>
    </style:style>
    <style:style style:name="P31" style:family="paragraph">
      <loext:graphic-properties draw:fill="solid" draw:fill-color="#09345a"/>
    </style:style>
    <style:style style:name="P32" style:family="paragraph">
      <loext:graphic-properties draw:fill="solid" draw:fill-color="#f5b96e"/>
    </style:style>
    <style:style style:name="P33" style:family="paragraph">
      <loext:graphic-properties draw:fill="solid" draw:fill-color="#e34533"/>
    </style:style>
    <style:style style:name="P34" style:family="paragraph">
      <loext:graphic-properties draw:fill="solid" draw:fill-color="#f5ad4f"/>
    </style:style>
    <style:style style:name="P35" style:family="paragraph">
      <loext:graphic-properties draw:fill="solid" draw:fill-color="#c3641a"/>
    </style:style>
    <style:style style:name="P36" style:family="paragraph">
      <loext:graphic-properties draw:fill="solid" draw:fill-color="#70bc65"/>
    </style:style>
    <style:style style:name="P37" style:family="paragraph">
      <loext:graphic-properties draw:fill="solid" draw:fill-color="#207639"/>
    </style:style>
    <style:style style:name="P38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39" style:family="paragraph">
      <loext:graphic-properties draw:fill="none"/>
      <style:text-properties fo:font-size="9pt" style:font-size-asian="9pt" style:font-size-complex="9pt"/>
    </style:style>
    <style:style style:name="P40" style:family="paragraph">
      <loext:graphic-properties draw:fill="solid" draw:fill-color="#5c3d91"/>
    </style:style>
    <style:style style:name="P41" style:family="paragraph">
      <loext:graphic-properties draw:fill="solid" draw:fill-color="#f4ad4f"/>
    </style:style>
    <style:style style:name="P42" style:family="paragraph">
      <loext:graphic-properties draw:fill="solid" draw:fill-color="#237739"/>
    </style:style>
    <style:style style:name="P43" style:family="paragraph">
      <loext:graphic-properties draw:fill="solid" draw:fill-color="#ee7c1a"/>
    </style:style>
    <style:style style:name="P44" style:family="paragraph">
      <loext:graphic-properties draw:fill="solid" draw:fill-color="#369939"/>
    </style:style>
    <style:style style:name="P45" style:family="paragraph">
      <loext:graphic-properties draw:fill="solid" draw:fill-color="#fefefe"/>
    </style:style>
    <style:style style:name="P46" style:family="paragraph">
      <loext:graphic-properties draw:fill="solid" draw:fill-color="#fdfdfe"/>
    </style:style>
    <style:style style:name="P47" style:family="paragraph">
      <loext:graphic-properties draw:fill="solid" draw:fill-color="#fdfdfd"/>
    </style:style>
    <style:style style:name="P48" style:family="paragraph">
      <loext:graphic-properties draw:fill="solid" draw:fill-color="#fcfcfd"/>
    </style:style>
    <style:style style:name="P49" style:family="paragraph">
      <loext:graphic-properties draw:fill="solid" draw:fill-color="#fbfcfc"/>
    </style:style>
    <style:style style:name="P50" style:family="paragraph">
      <loext:graphic-properties draw:fill="solid" draw:fill-color="#fbfbfc"/>
    </style:style>
    <style:style style:name="P51" style:family="paragraph">
      <loext:graphic-properties draw:fill="solid" draw:fill-color="#fafafb"/>
    </style:style>
    <style:style style:name="P52" style:family="paragraph">
      <loext:graphic-properties draw:fill="solid" draw:fill-color="#f9f9fa"/>
    </style:style>
    <style:style style:name="P53" style:family="paragraph">
      <loext:graphic-properties draw:fill="solid" draw:fill-color="#f8f9fa"/>
    </style:style>
    <style:style style:name="P54" style:family="paragraph">
      <loext:graphic-properties draw:fill="solid" draw:fill-color="#f7f8f9"/>
    </style:style>
    <style:style style:name="P55" style:family="paragraph">
      <loext:graphic-properties draw:fill="solid" draw:fill-color="#f7f7f8"/>
    </style:style>
    <style:style style:name="P56" style:family="paragraph">
      <loext:graphic-properties draw:fill="solid" draw:fill-color="#f6f6f8"/>
    </style:style>
    <style:style style:name="P57" style:family="paragraph">
      <loext:graphic-properties draw:fill="solid" draw:fill-color="#f5f5f7"/>
    </style:style>
    <style:style style:name="P58" style:family="paragraph">
      <loext:graphic-properties draw:fill="solid" draw:fill-color="#f4f4f6"/>
    </style:style>
    <style:style style:name="P59" style:family="paragraph">
      <loext:graphic-properties draw:fill="solid" draw:fill-color="#f3f3f5"/>
    </style:style>
    <style:style style:name="P60" style:family="paragraph">
      <loext:graphic-properties draw:fill="solid" draw:fill-color="#f2f3f5"/>
    </style:style>
    <style:style style:name="P61" style:family="paragraph">
      <loext:graphic-properties draw:fill="solid" draw:fill-color="#f1f2f4"/>
    </style:style>
    <style:style style:name="P62" style:family="paragraph">
      <loext:graphic-properties draw:fill="solid" draw:fill-color="#f0f1f3"/>
    </style:style>
    <style:style style:name="P63" style:family="paragraph">
      <loext:graphic-properties draw:fill="solid" draw:fill-color="#eff0f2"/>
    </style:style>
    <style:style style:name="P64" style:family="paragraph">
      <loext:graphic-properties draw:fill="solid" draw:fill-color="#efeff2"/>
    </style:style>
    <style:style style:name="P65" style:family="paragraph">
      <loext:graphic-properties draw:fill="solid" draw:fill-color="#eeeff2"/>
    </style:style>
    <style:style style:name="P66" style:family="paragraph">
      <loext:graphic-properties draw:fill="solid" draw:fill-color="#eeeef1"/>
    </style:style>
    <style:style style:name="P67" style:family="paragraph">
      <loext:graphic-properties draw:fill="solid" draw:fill-color="#edeef1"/>
    </style:style>
    <style:style style:name="P68" style:family="paragraph">
      <loext:graphic-properties draw:fill="solid" draw:fill-color="#ededf0"/>
    </style:style>
    <style:style style:name="P69" style:family="paragraph">
      <loext:graphic-properties draw:fill="solid" draw:fill-color="#ecedf0"/>
    </style:style>
    <style:style style:name="P70" style:family="paragraph">
      <loext:graphic-properties draw:fill="solid" draw:fill-color="#ececf0"/>
    </style:style>
    <style:style style:name="P71" style:family="paragraph">
      <loext:graphic-properties draw:fill="solid" draw:fill-color="#ebecef"/>
    </style:style>
    <style:style style:name="P72" style:family="paragraph">
      <loext:graphic-properties draw:fill="solid" draw:fill-color="#ebebef"/>
    </style:style>
    <style:style style:name="P73" style:family="paragraph">
      <loext:graphic-properties draw:fill="solid" draw:fill-color="#eaebee"/>
    </style:style>
    <style:style style:name="P74" style:family="paragraph">
      <loext:graphic-properties draw:fill="solid" draw:fill-color="#eaeaee"/>
    </style:style>
    <style:style style:name="P75" style:family="paragraph">
      <loext:graphic-properties draw:fill="solid" draw:fill-color="#e9eaee"/>
    </style:style>
    <style:style style:name="P76" style:family="paragraph">
      <loext:graphic-properties draw:fill="solid" draw:fill-color="#e8e9ed"/>
    </style:style>
    <style:style style:name="P77" style:family="paragraph">
      <loext:graphic-properties draw:fill="solid" draw:fill-color="#e7e8ec"/>
    </style:style>
    <style:style style:name="P78" style:family="paragraph">
      <loext:graphic-properties draw:fill="solid" draw:fill-color="#e6e7eb"/>
    </style:style>
    <style:style style:name="P79" style:family="paragraph">
      <loext:graphic-properties draw:fill="solid" draw:fill-color="#e5e6ea"/>
    </style:style>
    <style:style style:name="P80" style:family="paragraph">
      <loext:graphic-properties draw:fill="solid" draw:fill-color="#e4e5ea"/>
    </style:style>
    <style:style style:name="P81" style:family="paragraph">
      <loext:graphic-properties draw:fill="solid" draw:fill-color="#e3e5e9"/>
    </style:style>
    <style:style style:name="P82" style:family="paragraph">
      <loext:graphic-properties draw:fill="solid" draw:fill-color="#e3e4e9"/>
    </style:style>
    <style:style style:name="P83" style:family="paragraph">
      <loext:graphic-properties draw:fill="solid" draw:fill-color="#e2e4e8"/>
    </style:style>
    <style:style style:name="P84" style:family="paragraph">
      <loext:graphic-properties draw:fill="solid" draw:fill-color="#e2e3e8"/>
    </style:style>
    <style:style style:name="P85" style:family="paragraph">
      <loext:graphic-properties draw:fill="solid" draw:fill-color="#e1e2e7"/>
    </style:style>
    <style:style style:name="P86" style:family="paragraph">
      <loext:graphic-properties draw:fill="solid" draw:fill-color="#e0e1e6"/>
    </style:style>
    <style:style style:name="P87" style:family="paragraph">
      <loext:graphic-properties draw:fill="solid" draw:fill-color="#dfe1e6"/>
    </style:style>
    <style:style style:name="P88" style:family="paragraph">
      <loext:graphic-properties draw:fill="solid" draw:fill-color="#dfe0e5"/>
    </style:style>
    <style:style style:name="P89" style:family="paragraph">
      <loext:graphic-properties draw:fill="solid" draw:fill-color="#dee0e5"/>
    </style:style>
    <style:style style:name="P90" style:family="paragraph">
      <loext:graphic-properties draw:fill="solid" draw:fill-color="#dedfe4"/>
    </style:style>
    <style:style style:name="P91" style:family="paragraph">
      <loext:graphic-properties draw:fill="solid" draw:fill-color="#dddfe4"/>
    </style:style>
    <style:style style:name="P92" style:family="paragraph">
      <loext:graphic-properties draw:fill="solid" draw:fill-color="#dcdee4"/>
    </style:style>
    <style:style style:name="P93" style:family="paragraph">
      <loext:graphic-properties draw:fill="solid" draw:fill-color="#dcdde3"/>
    </style:style>
    <style:style style:name="P94" style:family="paragraph">
      <loext:graphic-properties draw:fill="solid" draw:fill-color="#dbdde3"/>
    </style:style>
    <style:style style:name="P95" style:family="paragraph">
      <loext:graphic-properties draw:fill="solid" draw:fill-color="#dbdce2"/>
    </style:style>
    <style:style style:name="P96" style:family="paragraph">
      <loext:graphic-properties draw:fill="solid" draw:fill-color="#dadce2"/>
    </style:style>
    <style:style style:name="P97" style:family="paragraph">
      <loext:graphic-properties draw:fill="solid" draw:fill-color="#d9dbe1"/>
    </style:style>
    <style:style style:name="P98" style:family="paragraph">
      <loext:graphic-properties draw:fill="solid" draw:fill-color="#d9dae1"/>
    </style:style>
    <style:style style:name="P99" style:family="paragraph">
      <loext:graphic-properties draw:fill="solid" draw:fill-color="#d8dae0"/>
    </style:style>
    <style:style style:name="P100" style:family="paragraph">
      <loext:graphic-properties draw:fill="solid" draw:fill-color="#d8d9e0"/>
    </style:style>
    <style:style style:name="P101" style:family="paragraph">
      <loext:graphic-properties draw:fill="solid" draw:fill-color="#d7d9df"/>
    </style:style>
    <style:style style:name="P102" style:family="paragraph">
      <loext:graphic-properties draw:fill="solid" draw:fill-color="#d6d8df"/>
    </style:style>
    <style:style style:name="P103" style:family="paragraph">
      <loext:graphic-properties draw:fill="solid" draw:fill-color="#d6d8de"/>
    </style:style>
    <style:style style:name="P104" style:family="paragraph">
      <loext:graphic-properties draw:fill="solid" draw:fill-color="#d5d7de"/>
    </style:style>
    <style:style style:name="P105" style:family="paragraph">
      <loext:graphic-properties draw:fill="solid" draw:fill-color="#d4d6dd"/>
    </style:style>
    <style:style style:name="P106" style:family="paragraph">
      <loext:graphic-properties draw:fill="solid" draw:fill-color="#d3d5dc"/>
    </style:style>
    <style:style style:name="P107" style:family="paragraph">
      <loext:graphic-properties draw:fill="solid" draw:fill-color="#d2d4db"/>
    </style:style>
    <style:style style:name="P108" style:family="paragraph">
      <loext:graphic-properties draw:fill="solid" draw:fill-color="#d1d3db"/>
    </style:style>
    <style:style style:name="P109" style:family="paragraph">
      <loext:graphic-properties draw:fill="solid" draw:fill-color="#d1d3da"/>
    </style:style>
    <style:style style:name="P110" style:family="paragraph">
      <loext:graphic-properties draw:fill="solid" draw:fill-color="#d0d2da"/>
    </style:style>
    <style:style style:name="P111" style:family="paragraph">
      <loext:graphic-properties draw:fill="solid" draw:fill-color="#cfd1d9"/>
    </style:style>
    <style:style style:name="P112" style:family="paragraph">
      <loext:graphic-properties draw:fill="solid" draw:fill-color="#ced0d8"/>
    </style:style>
    <style:style style:name="P113" style:family="paragraph">
      <loext:graphic-properties draw:fill="solid" draw:fill-color="#cdd0d8"/>
    </style:style>
    <style:style style:name="P114" style:family="paragraph">
      <loext:graphic-properties draw:fill="solid" draw:fill-color="#cdcfd7"/>
    </style:style>
    <style:style style:name="P115" style:family="paragraph">
      <loext:graphic-properties draw:fill="solid" draw:fill-color="#ccced7"/>
    </style:style>
    <style:style style:name="P116" style:family="paragraph">
      <loext:graphic-properties draw:fill="solid" draw:fill-color="#cbced6"/>
    </style:style>
    <style:style style:name="P117" style:family="paragraph">
      <loext:graphic-properties draw:fill="solid" draw:fill-color="#cbcdd6"/>
    </style:style>
    <style:style style:name="P118" style:family="paragraph">
      <loext:graphic-properties draw:fill="solid" draw:fill-color="#caccd5"/>
    </style:style>
    <style:style style:name="P119" style:family="paragraph">
      <loext:graphic-properties draw:fill="solid" draw:fill-color="#c9ccd5"/>
    </style:style>
    <style:style style:name="P120" style:family="paragraph">
      <loext:graphic-properties draw:fill="solid" draw:fill-color="#c9cbd4"/>
    </style:style>
    <style:style style:name="P121" style:family="paragraph">
      <loext:graphic-properties draw:fill="solid" draw:fill-color="#c8cbd3"/>
    </style:style>
    <style:style style:name="P122" style:family="paragraph">
      <loext:graphic-properties draw:fill="solid" draw:fill-color="#c8cad3"/>
    </style:style>
    <style:style style:name="P123" style:family="paragraph">
      <loext:graphic-properties draw:fill="solid" draw:fill-color="#c7c9d2"/>
    </style:style>
    <style:style style:name="P124" style:family="paragraph">
      <loext:graphic-properties draw:fill="solid" draw:fill-color="#c6c9d2"/>
    </style:style>
    <style:style style:name="P125" style:family="paragraph">
      <loext:graphic-properties draw:fill="solid" draw:fill-color="#c6c8d1"/>
    </style:style>
    <style:style style:name="P126" style:family="paragraph">
      <loext:graphic-properties draw:fill="solid" draw:fill-color="#c5c7d1"/>
    </style:style>
    <style:style style:name="P127" style:family="paragraph">
      <loext:graphic-properties draw:fill="solid" draw:fill-color="#c4c7d0"/>
    </style:style>
    <style:style style:name="P128" style:family="paragraph">
      <loext:graphic-properties draw:fill="solid" draw:fill-color="#c3c6d0"/>
    </style:style>
    <style:style style:name="P129" style:family="paragraph">
      <loext:graphic-properties draw:fill="solid" draw:fill-color="#c3c5cf"/>
    </style:style>
    <style:style style:name="P130" style:family="paragraph">
      <loext:graphic-properties draw:fill="solid" draw:fill-color="#c2c5cf"/>
    </style:style>
    <style:style style:name="P131" style:family="paragraph">
      <loext:graphic-properties draw:fill="solid" draw:fill-color="#c1c4ce"/>
    </style:style>
    <style:style style:name="P132" style:family="paragraph">
      <loext:graphic-properties draw:fill="solid" draw:fill-color="#c0c3cd"/>
    </style:style>
    <style:style style:name="P133" style:family="paragraph">
      <loext:graphic-properties draw:fill="solid" draw:fill-color="#bfc2cc"/>
    </style:style>
    <style:style style:name="P134" style:family="paragraph">
      <loext:graphic-properties draw:fill="solid" draw:fill-color="#bec1cb"/>
    </style:style>
    <style:style style:name="P135" style:family="paragraph">
      <loext:graphic-properties draw:fill="solid" draw:fill-color="#bdc0cb"/>
    </style:style>
    <style:style style:name="P136" style:family="paragraph">
      <loext:graphic-properties draw:fill="solid" draw:fill-color="#bdc0ca"/>
    </style:style>
    <style:style style:name="P137" style:family="paragraph">
      <loext:graphic-properties draw:fill="solid" draw:fill-color="#bcbfca"/>
    </style:style>
    <style:style style:name="P138" style:family="paragraph">
      <loext:graphic-properties draw:fill="solid" draw:fill-color="#bbbec9"/>
    </style:style>
    <style:style style:name="P139" style:family="paragraph">
      <loext:graphic-properties draw:fill="solid" draw:fill-color="#95c181"/>
    </style:style>
    <style:style style:name="P140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41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42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143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144" style:family="paragraph">
      <loext:graphic-properties draw:fill="solid" draw:fill-color="#547297"/>
    </style:style>
    <style:style style:name="P145" style:family="paragraph">
      <loext:graphic-properties draw:fill="solid" draw:fill-color="#d54846"/>
    </style:style>
    <style:style style:name="P14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47" style:family="paragraph">
      <loext:graphic-properties draw:fill="solid" draw:fill-color="#dd9b27"/>
    </style:style>
    <style:style style:name="P148" style:family="paragraph">
      <loext:graphic-properties draw:fill="solid" draw:fill-color="#67a9cb"/>
    </style:style>
    <style:style style:name="P149" style:family="paragraph">
      <loext:graphic-properties draw:fill="solid" draw:fill-color="#2ab4b8"/>
    </style:style>
    <style:style style:name="P150" style:family="paragraph">
      <loext:graphic-properties draw:fill="solid" draw:fill-color="#f0776d"/>
    </style:style>
    <style:style style:name="P151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152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53" style:family="paragraph">
      <loext:graphic-properties draw:fill="solid" draw:fill-color="#000000"/>
    </style:style>
    <style:style style:name="T1" style:family="text">
      <style:text-properties fo:color="#040000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2" style:family="text">
      <style:text-properties fo:color="#ffffff" loext:opacity="100%" style:font-name="Arial" fo:font-size="23.3999996185303pt" fo:font-weight="bold" style:font-name-asian="Arial" style:font-size-asian="23.3999996185303pt" style:font-weight-asian="bold" style:font-name-complex="Arial" style:font-size-complex="23.3999996185303pt" style:font-weight-complex="bold"/>
    </style:style>
    <style:style style:name="T3" style:family="text">
      <style:text-properties fo:color="#231815" loext:opacity="100%" style:font-name="Arial" fo:font-size="18.7000007629395pt" fo:font-weight="normal" style:font-name-asian="Arial" style:font-size-asian="18.7000007629395pt" style:font-weight-asian="normal" style:font-name-complex="Arial" style:font-size-complex="18.7000007629395pt" style:font-weight-complex="normal"/>
    </style:style>
    <style:style style:name="T4" style:family="text">
      <style:text-properties fo:color="#040000" loext:opacity="100%" style:font-name="Arial" fo:font-size="25.2999992370605pt" fo:font-weight="normal" style:font-name-asian="Arial" style:font-size-asian="25.2999992370605pt" style:font-weight-asian="normal" style:font-name-complex="Arial" style:font-size-complex="25.2999992370605pt" style:font-weight-complex="normal"/>
    </style:style>
    <style:style style:name="T5" style:family="text">
      <style:text-properties fo:color="#040000" loext:opacity="100%" style:font-name="Arial" fo:font-size="21.7000007629395pt" fo:font-weight="normal" style:font-name-asian="Arial" style:font-size-asian="21.7000007629395pt" style:font-weight-asian="normal" style:font-name-complex="Arial" style:font-size-complex="21.7000007629395pt" style:font-weight-complex="normal"/>
    </style:style>
    <style:style style:name="T6" style:family="text">
      <style:text-properties fo:color="#04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" style:family="text">
      <style:text-properties fo:color="#231815" loext:opacity="100%" style:font-name="Arial" fo:font-size="28pt" fo:font-style="italic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8" style:family="text">
      <style:text-properties fo:color="#231815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9" style:family="text">
      <style:text-properties fo:color="#040000" loext:opacity="100%" style:font-name="Arial" fo:font-size="13.6000003814697pt" fo:font-weight="normal" style:font-name-asian="Arial" style:font-size-asian="13.6000003814697pt" style:font-weight-asian="normal" style:font-name-complex="Arial" style:font-size-complex="13.6000003814697pt" style:font-weight-complex="normal"/>
    </style:style>
    <style:style style:name="T10" style:family="text">
      <style:text-properties fo:color="#040000" loext:opacity="100%" style:font-name="Arial" fo:font-size="17.7000007629395pt" fo:font-weight="normal" style:font-name-asian="Arial" style:font-size-asian="17.7000007629395pt" style:font-weight-asian="normal" style:font-name-complex="Arial" style:font-size-complex="17.7000007629395pt" style:font-weight-complex="normal"/>
    </style:style>
    <style:style style:name="T11" style:family="text">
      <style:text-properties fo:color="#040000" loext:opacity="100%" style:font-name="Arial" fo:font-size="16.8999996185303pt" fo:font-weight="bold" style:font-name-asian="Arial" style:font-size-asian="16.8999996185303pt" style:font-weight-asian="bold" style:font-name-complex="Arial" style:font-size-complex="16.8999996185303pt" style:font-weight-complex="bold"/>
    </style:style>
    <style:style style:name="T12" style:family="text">
      <style:text-properties fo:color="#040000" loext:opacity="100%" style:font-name="Arial" fo:font-size="12.3000001907349pt" fo:font-weight="bold" style:font-name-asian="Arial" style:font-size-asian="12.3000001907349pt" style:font-weight-asian="bold" style:font-name-complex="Arial" style:font-size-complex="12.3000001907349pt" style:font-weight-complex="bold"/>
    </style:style>
    <style:style style:name="T13" style:family="text">
      <style:text-properties fo:color="#040000" loext:opacity="100%" style:font-name="Arial" fo:font-size="12.3000001907349pt" fo:font-weight="normal" style:font-name-asian="Arial" style:font-size-asian="12.3000001907349pt" style:font-weight-asian="normal" style:font-name-complex="Arial" style:font-size-complex="12.3000001907349pt" style:font-weight-complex="normal"/>
    </style:style>
    <style:style style:name="T14" style:family="text">
      <style:text-properties fo:color="#040000" loext:opacity="100%" style:font-name="Arial" fo:font-size="9.60000038146973pt" fo:font-weight="normal" style:font-name-asian="Arial" style:font-size-asian="9.60000038146973pt" style:font-weight-asian="normal" style:font-name-complex="Arial" style:font-size-complex="9.60000038146973pt" style:font-weight-complex="normal"/>
    </style:style>
    <style:style style:name="T15" style:family="text">
      <style:text-properties fo:color="#000000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style:style style:name="T16" style:family="text">
      <style:text-properties fo:color="#000000" loext:opacity="100%" style:font-name="Arial" fo:font-size="11.8000001907349pt" fo:font-weight="bold" style:font-name-asian="Arial" style:font-size-asian="11.8000001907349pt" style:font-weight-asian="bold" style:font-name-complex="Arial" style:font-size-complex="11.8000001907349pt" style:font-weight-complex="bold"/>
    </style:style>
    <style:style style:name="T17" style:family="text">
      <style:text-properties fo:color="#000000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266cm" svg:height="20.073cm" svg:x="2.797cm" svg:y="21.519cm" svg:viewBox="0 0 38267 20074" draw:points="0,0 38267,0 38267,20074 0,20074">
          <text:p/>
        </draw:polygon>
        <draw:frame draw:style-name="gr2" draw:text-style-name="P2" draw:layer="layout" svg:width="7.284cm" svg:height="8.977cm" svg:x="17.956cm" svg:y="22.966cm">
          <draw:image xlink:href="Pictures/10000000000005500000068C289027A8.png" xlink:type="simple" xlink:show="embed" xlink:actuate="onLoad" draw:mime-type="image/png">
            <text:p/>
          </draw:image>
        </draw:frame>
        <draw:frame draw:style-name="gr2" draw:text-style-name="P2" draw:layer="layout" svg:width="15.159cm" svg:height="9.029cm" svg:x="25.188cm" svg:y="22.931cm">
          <draw:image xlink:href="Pictures/1000000000000ACD00000675B1C951E4.png" xlink:type="simple" xlink:show="embed" xlink:actuate="onLoad" draw:mime-type="image/png">
            <text:p/>
          </draw:image>
        </draw:frame>
        <draw:polygon draw:style-name="gr3" draw:text-style-name="P3" draw:layer="layout" svg:width="19.227cm" svg:height="19.826cm" svg:x="21.836cm" svg:y="0.317cm" svg:viewBox="0 0 19228 19827" draw:points="0,0 19228,0 19228,19827 0,19827">
          <text:p/>
        </draw:polygon>
        <draw:path draw:style-name="gr4" draw:text-style-name="P4" draw:layer="layout" svg:width="18.421cm" svg:height="4.551cm" svg:x="22.076cm" svg:y="15.151cm" svg:viewBox="0 0 18422 4552" svg:d="M138 4552c-76 0-138-62-138-138v-4276c0-76 62-138 138-138h18147c76 0 137 62 137 138v4276c0 76-61 138-137 138z">
          <text:p/>
        </draw:path>
        <draw:path draw:style-name="gr5" draw:text-style-name="P2" draw:layer="layout" svg:width="18.421cm" svg:height="4.551cm" svg:x="22.076cm" svg:y="15.151cm" svg:viewBox="0 0 18422 4552" svg:d="M18285 4552h-18147c-76 0-138-62-138-138v-4276c0-76 62-138 138-138h18147c76 0 137 62 137 138v4276c0 76-61 138-137 138z">
          <text:p/>
        </draw:path>
        <draw:path draw:style-name="gr6" draw:text-style-name="P5" draw:layer="layout" svg:width="18.441cm" svg:height="1.237cm" svg:x="22.111cm" svg:y="15.136cm" svg:viewBox="0 0 18442 1238" svg:d="M140 1238c-77 0-140-62-140-139v-960c0-77 63-139 140-139h18162c77 0 140 62 140 139v960c0 77-63 139-140 139z">
          <text:p/>
        </draw:path>
        <draw:frame draw:style-name="gr7" draw:text-style-name="P7" draw:layer="layout" svg:width="21.542cm" svg:height="1.102cm" svg:x="18.659cm" svg:y="32.459cm">
          <draw:text-box>
            <text:p text:style-name="P6"><text:span text:style-name="T1">Signature Interactions with Genomic Features</text:span></text:p>
          </draw:text-box>
        </draw:frame>
        <draw:path draw:style-name="gr4" draw:text-style-name="P4" draw:layer="layout" svg:width="18.422cm" svg:height="4.928cm" svg:x="22.111cm" svg:y="8.989cm" svg:viewBox="0 0 18423 4929" svg:d="M138 4929c-76 0-138-62-138-138v-4653c0-76 62-138 138-138h18147c76 0 138 62 138 138v4653c0 76-62 138-138 138z">
          <text:p/>
        </draw:path>
        <draw:path draw:style-name="gr5" draw:text-style-name="P2" draw:layer="layout" svg:width="18.422cm" svg:height="4.928cm" svg:x="22.111cm" svg:y="8.989cm" svg:viewBox="0 0 18423 4929" svg:d="M18285 4929h-18147c-76 0-138-62-138-138v-4653c0-76 62-138 138-138h18147c76 0 138 62 138 138v4653c0 76-62 138-138 138z">
          <text:p/>
        </draw:path>
        <draw:path draw:style-name="gr6" draw:text-style-name="P5" draw:layer="layout" svg:width="18.44cm" svg:height="1.238cm" svg:x="22.102cm" svg:y="8.989cm" svg:viewBox="0 0 18441 1239" svg:d="M139 1239c-77 0-139-63-139-140v-959c0-77 62-140 139-140h18163c77 0 139 63 139 140v959c0 77-62 140-139 140z">
          <text:p/>
        </draw:path>
        <draw:frame draw:style-name="gr8" draw:text-style-name="P8" draw:layer="layout" svg:width="14.133cm" svg:height="0.924cm" svg:x="24.294cm" svg:y="15.265cm">
          <draw:text-box>
            <text:p text:style-name="P6"><text:span text:style-name="T2">83-Type: Classic indel classification</text:span></text:p>
          </draw:text-box>
        </draw:frame>
        <draw:path draw:style-name="gr4" draw:text-style-name="P4" draw:layer="layout" svg:width="18.422cm" svg:height="4.97cm" svg:x="22.111cm" svg:y="2.773cm" svg:viewBox="0 0 18423 4971" svg:d="M138 4971c-76 0-138-62-138-138v-4695c0-76 62-138 138-138h18147c76 0 138 62 138 138v4695c0 76-62 138-138 138z">
          <text:p/>
        </draw:path>
        <draw:path draw:style-name="gr5" draw:text-style-name="P2" draw:layer="layout" svg:width="18.422cm" svg:height="4.97cm" svg:x="22.111cm" svg:y="2.773cm" svg:viewBox="0 0 18423 4971" svg:d="M18285 4971h-18147c-76 0-138-62-138-138v-4695c0-76 62-138 138-138h18147c76 0 138 62 138 138v4695c0 76-62 138-138 138z">
          <text:p/>
        </draw:path>
        <draw:polygon draw:style-name="gr9" draw:text-style-name="P9" draw:layer="layout" svg:width="16.581cm" svg:height="19.968cm" svg:x="2.786cm" svg:y="0.246cm" svg:viewBox="0 0 16582 19969" draw:points="0,0 16582,0 16582,19969 0,19969">
          <text:p/>
        </draw:polygon>
        <draw:polygon draw:style-name="gr4" draw:text-style-name="P4" draw:layer="layout" svg:width="15.255cm" svg:height="2.571cm" svg:x="23.735cm" svg:y="16.781cm" svg:viewBox="0 0 15256 2572" draw:points="0,0 15256,0 15256,2572 0,2572">
          <text:p/>
        </draw:polygon>
        <draw:polygon draw:style-name="gr10" draw:text-style-name="P10" draw:layer="layout" svg:width="0.079cm" svg:height="0.029cm" svg:x="23.741cm" svg:y="19.117cm" svg:viewBox="0 0 80 30" draw:points="0,0 80,0 80,30 0,30">
          <text:p/>
        </draw:polygon>
        <draw:polygon draw:style-name="gr10" draw:text-style-name="P10" draw:layer="layout" svg:width="0.078cm" svg:height="0.013cm" svg:x="23.926cm" svg:y="19.134cm" svg:viewBox="0 0 79 14" draw:points="0,0 79,0 79,14 0,14">
          <text:p/>
        </draw:polygon>
        <draw:polygon draw:style-name="gr10" draw:text-style-name="P10" draw:layer="layout" svg:width="0.078cm" svg:height="0.007cm" svg:x="24.11cm" svg:y="19.139cm" svg:viewBox="0 0 79 8" draw:points="0,0 79,0 79,8 0,8">
          <text:p/>
        </draw:polygon>
        <draw:polygon draw:style-name="gr10" draw:text-style-name="P10" draw:layer="layout" svg:width="0.078cm" svg:height="0.011cm" svg:x="24.294cm" svg:y="19.135cm" svg:viewBox="0 0 79 12" draw:points="0,0 79,0 79,12 0,12">
          <text:p/>
        </draw:polygon>
        <draw:polygon draw:style-name="gr10" draw:text-style-name="P10" draw:layer="layout" svg:width="0.079cm" svg:height="0.023cm" svg:x="24.478cm" svg:y="19.123cm" svg:viewBox="0 0 80 24" draw:points="0,0 80,0 80,24 0,24">
          <text:p/>
        </draw:polygon>
        <draw:polygon draw:style-name="gr10" draw:text-style-name="P10" draw:layer="layout" svg:width="0.078cm" svg:height="0.085cm" svg:x="24.663cm" svg:y="19.061cm" svg:viewBox="0 0 79 86" draw:points="0,0 79,0 79,86 0,86">
          <text:p/>
        </draw:polygon>
        <draw:polygon draw:style-name="gr11" draw:text-style-name="P11" draw:layer="layout" svg:width="0.078cm" svg:height="0.018cm" svg:x="24.847cm" svg:y="19.128cm" svg:viewBox="0 0 79 19" draw:points="0,0 79,0 79,19 0,19">
          <text:p/>
        </draw:polygon>
        <draw:polygon draw:style-name="gr11" draw:text-style-name="P11" draw:layer="layout" svg:width="0.078cm" svg:height="0.013cm" svg:x="25.031cm" svg:y="19.133cm" svg:viewBox="0 0 79 14" draw:points="0,0 79,0 79,14 0,14">
          <text:p/>
        </draw:polygon>
        <draw:polygon draw:style-name="gr11" draw:text-style-name="P11" draw:layer="layout" svg:width="0.079cm" svg:height="0.021cm" svg:x="25.215cm" svg:y="19.125cm" svg:viewBox="0 0 80 22" draw:points="0,0 80,0 80,22 0,22">
          <text:p/>
        </draw:polygon>
        <draw:polygon draw:style-name="gr11" draw:text-style-name="P11" draw:layer="layout" svg:width="0.079cm" svg:height="0.045cm" svg:x="25.399cm" svg:y="19.101cm" svg:viewBox="0 0 80 46" draw:points="0,0 80,0 80,46 0,46">
          <text:p/>
        </draw:polygon>
        <draw:polygon draw:style-name="gr11" draw:text-style-name="P11" draw:layer="layout" svg:width="0.078cm" svg:height="0.1cm" svg:x="25.584cm" svg:y="19.046cm" svg:viewBox="0 0 79 101" draw:points="0,0 79,0 79,101 0,101">
          <text:p/>
        </draw:polygon>
        <draw:polygon draw:style-name="gr11" draw:text-style-name="P11" draw:layer="layout" svg:width="0.078cm" svg:height="1.767cm" svg:x="25.768cm" svg:y="17.379cm" svg:viewBox="0 0 79 1768" draw:points="0,0 79,0 79,1768 0,1768">
          <text:p/>
        </draw:polygon>
        <draw:polygon draw:style-name="gr12" draw:text-style-name="P12" draw:layer="layout" svg:width="0.078cm" svg:height="0.007cm" svg:x="25.952cm" svg:y="19.139cm" svg:viewBox="0 0 79 8" draw:points="0,0 79,0 79,8 0,8">
          <text:p/>
        </draw:polygon>
        <draw:polygon draw:style-name="gr12" draw:text-style-name="P12" draw:layer="layout" svg:width="0.079cm" svg:height="0.003cm" svg:x="26.136cm" svg:y="19.144cm" svg:viewBox="0 0 80 4" draw:points="0,0 80,0 80,4 0,4">
          <text:p/>
        </draw:polygon>
        <draw:polygon draw:style-name="gr12" draw:text-style-name="P12" draw:layer="layout" svg:width="0.078cm" svg:height="0.002cm" svg:x="26.321cm" svg:y="19.144cm" svg:viewBox="0 0 79 3" draw:points="0,0 79,0 79,3 0,3">
          <text:p/>
        </draw:polygon>
        <draw:polygon draw:style-name="gr12" draw:text-style-name="P12" draw:layer="layout" svg:width="0.078cm" svg:height="0.003cm" svg:x="26.505cm" svg:y="19.143cm" svg:viewBox="0 0 79 4" draw:points="0,0 79,0 79,4 0,4">
          <text:p/>
        </draw:polygon>
        <draw:polygon draw:style-name="gr12" draw:text-style-name="P12" draw:layer="layout" svg:width="0.078cm" svg:height="0.007cm" svg:x="26.689cm" svg:y="19.139cm" svg:viewBox="0 0 79 8" draw:points="0,0 79,0 79,8 0,8">
          <text:p/>
        </draw:polygon>
        <draw:polygon draw:style-name="gr12" draw:text-style-name="P12" draw:layer="layout" svg:width="0.079cm" svg:height="0.035cm" svg:x="26.873cm" svg:y="19.111cm" svg:viewBox="0 0 80 36" draw:points="0,0 80,0 80,36 0,36">
          <text:p/>
        </draw:polygon>
        <draw:polygon draw:style-name="gr13" draw:text-style-name="P13" draw:layer="layout" svg:width="0.079cm" svg:height="0.006cm" svg:x="27.057cm" svg:y="19.141cm" svg:viewBox="0 0 80 7" draw:points="0,0 80,0 80,7 0,7">
          <text:p/>
        </draw:polygon>
        <draw:polygon draw:style-name="gr13" draw:text-style-name="P13" draw:layer="layout" svg:width="0.079cm" svg:height="0.002cm" svg:x="27.241cm" svg:y="19.144cm" svg:viewBox="0 0 80 3" draw:points="0,0 80,0 80,3 0,3">
          <text:p/>
        </draw:polygon>
        <draw:polygon draw:style-name="gr13" draw:text-style-name="P13" draw:layer="layout" svg:width="0.078cm" svg:height="0.008cm" svg:x="27.426cm" svg:y="19.138cm" svg:viewBox="0 0 79 9" draw:points="0,0 79,0 79,9 0,9">
          <text:p/>
        </draw:polygon>
        <draw:polygon draw:style-name="gr13" draw:text-style-name="P13" draw:layer="layout" svg:width="0.078cm" svg:height="0.007cm" svg:x="27.61cm" svg:y="19.139cm" svg:viewBox="0 0 79 8" draw:points="0,0 79,0 79,8 0,8">
          <text:p/>
        </draw:polygon>
        <draw:polygon draw:style-name="gr13" draw:text-style-name="P13" draw:layer="layout" svg:width="0.078cm" svg:height="0.01cm" svg:x="27.794cm" svg:y="19.136cm" svg:viewBox="0 0 79 11" draw:points="0,0 79,0 79,11 0,11">
          <text:p/>
        </draw:polygon>
        <draw:polygon draw:style-name="gr13" draw:text-style-name="P13" draw:layer="layout" svg:width="0.079cm" svg:height="0.357cm" svg:x="27.978cm" svg:y="18.789cm" svg:viewBox="0 0 80 358" draw:points="0,0 80,0 80,358 0,358">
          <text:p/>
        </draw:polygon>
        <draw:polygon draw:style-name="gr14" draw:text-style-name="P14" draw:layer="layout" svg:width="0.078cm" svg:height="0.014cm" svg:x="28.163cm" svg:y="19.132cm" svg:viewBox="0 0 79 15" draw:points="0,0 79,0 79,15 0,15">
          <text:p/>
        </draw:polygon>
        <draw:polygon draw:style-name="gr14" draw:text-style-name="P14" draw:layer="layout" svg:width="0.078cm" svg:height="0.026cm" svg:x="28.347cm" svg:y="19.12cm" svg:viewBox="0 0 79 27" draw:points="0,0 79,0 79,27 0,27">
          <text:p/>
        </draw:polygon>
        <draw:polygon draw:style-name="gr14" draw:text-style-name="P14" draw:layer="layout" svg:width="0.078cm" svg:height="0.008cm" svg:x="28.531cm" svg:y="19.138cm" svg:viewBox="0 0 79 9" draw:points="0,0 79,0 79,9 0,9">
          <text:p/>
        </draw:polygon>
        <draw:polygon draw:style-name="gr14" draw:text-style-name="P14" draw:layer="layout" svg:width="0.078cm" svg:height="0.015cm" svg:x="28.715cm" svg:y="19.131cm" svg:viewBox="0 0 79 16" draw:points="0,0 79,0 79,16 0,16">
          <text:p/>
        </draw:polygon>
        <draw:polygon draw:style-name="gr14" draw:text-style-name="P14" draw:layer="layout" svg:width="0.079cm" svg:height="0.01cm" svg:x="28.899cm" svg:y="19.136cm" svg:viewBox="0 0 80 11" draw:points="0,0 80,0 80,11 0,11">
          <text:p/>
        </draw:polygon>
        <draw:polygon draw:style-name="gr14" draw:text-style-name="P14" draw:layer="layout" svg:width="0.078cm" svg:height="0.029cm" svg:x="29.084cm" svg:y="19.117cm" svg:viewBox="0 0 79 30" draw:points="0,0 79,0 79,30 0,30">
          <text:p/>
        </draw:polygon>
        <draw:polygon draw:style-name="gr15" draw:text-style-name="P15" draw:layer="layout" svg:width="0.078cm" svg:height="0.004cm" svg:x="29.268cm" svg:y="19.142cm" svg:viewBox="0 0 79 5" draw:points="0,0 79,0 79,5 0,5">
          <text:p/>
        </draw:polygon>
        <draw:polygon draw:style-name="gr15" draw:text-style-name="P15" draw:layer="layout" svg:width="0.078cm" svg:height="0.019cm" svg:x="29.452cm" svg:y="19.127cm" svg:viewBox="0 0 79 20" draw:points="0,0 79,0 79,20 0,20">
          <text:p/>
        </draw:polygon>
        <draw:polygon draw:style-name="gr15" draw:text-style-name="P15" draw:layer="layout" svg:width="0.079cm" svg:height="0.007cm" svg:x="29.636cm" svg:y="19.139cm" svg:viewBox="0 0 80 8" draw:points="0,0 80,0 80,8 0,8">
          <text:p/>
        </draw:polygon>
        <draw:polygon draw:style-name="gr15" draw:text-style-name="P15" draw:layer="layout" svg:width="0.078cm" svg:height="0.003cm" svg:x="29.821cm" svg:y="19.144cm" svg:viewBox="0 0 79 4" draw:points="0,0 79,0 79,4 0,4">
          <text:p/>
        </draw:polygon>
        <draw:polygon draw:style-name="gr15" draw:text-style-name="P15" draw:layer="layout" svg:width="0.078cm" svg:height="0.001cm" svg:x="30.005cm" svg:y="19.145cm" svg:viewBox="0 0 79 2" draw:points="0,0 79,0 79,2 0,2">
          <text:p/>
        </draw:polygon>
        <draw:polygon draw:style-name="gr15" draw:text-style-name="P15" draw:layer="layout" svg:width="0.078cm" svg:height="0.001cm" svg:x="30.189cm" svg:y="19.145cm" svg:viewBox="0 0 79 2" draw:points="0,0 79,0 79,2 0,2">
          <text:p/>
        </draw:polygon>
        <draw:polygon draw:style-name="gr16" draw:text-style-name="P16" draw:layer="layout" svg:width="0.079cm" svg:height="0.003cm" svg:x="30.373cm" svg:y="19.143cm" svg:viewBox="0 0 80 4" draw:points="0,0 80,0 80,4 0,4">
          <text:p/>
        </draw:polygon>
        <draw:polygon draw:style-name="gr16" draw:text-style-name="P16" draw:layer="layout" svg:width="0.078cm" svg:height="0.019cm" svg:x="30.557cm" svg:y="19.127cm" svg:viewBox="0 0 79 20" draw:points="0,0 79,0 79,20 0,20">
          <text:p/>
        </draw:polygon>
        <draw:polygon draw:style-name="gr16" draw:text-style-name="P16" draw:layer="layout" svg:width="0.079cm" svg:height="0.007cm" svg:x="30.741cm" svg:y="19.139cm" svg:viewBox="0 0 80 8" draw:points="0,0 80,0 80,8 0,8">
          <text:p/>
        </draw:polygon>
        <draw:polygon draw:style-name="gr16" draw:text-style-name="P16" draw:layer="layout" svg:width="0.078cm" svg:height="0.003cm" svg:x="30.926cm" svg:y="19.143cm" svg:viewBox="0 0 79 4" draw:points="0,0 79,0 79,4 0,4">
          <text:p/>
        </draw:polygon>
        <draw:polygon draw:style-name="gr16" draw:text-style-name="P16" draw:layer="layout" svg:width="0.077cm" svg:height="0cm" svg:x="31.11cm" svg:y="19.145cm" svg:viewBox="0 0 78 1" draw:points="0,0 78,0 78,1 0,1">
          <text:p/>
        </draw:polygon>
        <draw:polygon draw:style-name="gr16" draw:text-style-name="P16" draw:layer="layout" svg:width="0.078cm" svg:height="0.001cm" svg:x="31.294cm" svg:y="19.145cm" svg:viewBox="0 0 79 2" draw:points="0,0 79,0 79,2 0,2">
          <text:p/>
        </draw:polygon>
        <draw:polygon draw:style-name="gr17" draw:text-style-name="P17" draw:layer="layout" svg:width="0.079cm" svg:height="0.01cm" svg:x="31.478cm" svg:y="19.136cm" svg:viewBox="0 0 80 11" draw:points="0,0 80,0 80,11 0,11">
          <text:p/>
        </draw:polygon>
        <draw:polygon draw:style-name="gr17" draw:text-style-name="P17" draw:layer="layout" svg:width="0.078cm" svg:height="0.011cm" svg:x="31.663cm" svg:y="19.135cm" svg:viewBox="0 0 79 12" draw:points="0,0 79,0 79,12 0,12">
          <text:p/>
        </draw:polygon>
        <draw:polygon draw:style-name="gr17" draw:text-style-name="P17" draw:layer="layout" svg:width="0.078cm" svg:height="0.004cm" svg:x="31.847cm" svg:y="19.142cm" svg:viewBox="0 0 79 5" draw:points="0,0 79,0 79,5 0,5">
          <text:p/>
        </draw:polygon>
        <draw:polygon draw:style-name="gr17" draw:text-style-name="P17" draw:layer="layout" svg:width="0.078cm" svg:height="0.001cm" svg:x="32.031cm" svg:y="19.145cm" svg:viewBox="0 0 79 2" draw:points="0,0 79,0 79,2 0,2">
          <text:p/>
        </draw:polygon>
        <draw:polygon draw:style-name="gr17" draw:text-style-name="P17" draw:layer="layout" svg:width="0.077cm" svg:height="0cm" svg:x="32.215cm" svg:y="19.145cm" svg:viewBox="0 0 78 1" draw:points="0,0 78,0 78,1 0,1">
          <text:p/>
        </draw:polygon>
        <draw:polygon draw:style-name="gr18" draw:text-style-name="P18" draw:layer="layout" svg:width="0.078cm" svg:height="0.007cm" svg:x="32.584cm" svg:y="19.139cm" svg:viewBox="0 0 79 8" draw:points="0,0 79,0 79,8 0,8">
          <text:p/>
        </draw:polygon>
        <draw:polygon draw:style-name="gr18" draw:text-style-name="P18" draw:layer="layout" svg:width="0.078cm" svg:height="0.006cm" svg:x="32.768cm" svg:y="19.141cm" svg:viewBox="0 0 79 7" draw:points="0,0 79,0 79,7 0,7">
          <text:p/>
        </draw:polygon>
        <draw:polygon draw:style-name="gr18" draw:text-style-name="P18" draw:layer="layout" svg:width="0.078cm" svg:height="0.003cm" svg:x="32.952cm" svg:y="19.143cm" svg:viewBox="0 0 79 4" draw:points="0,0 79,0 79,4 0,4">
          <text:p/>
        </draw:polygon>
        <draw:polygon draw:style-name="gr18" draw:text-style-name="P18" draw:layer="layout" svg:width="0.079cm" svg:height="0.003cm" svg:x="33.136cm" svg:y="19.143cm" svg:viewBox="0 0 80 4" draw:points="0,0 80,0 80,4 0,4">
          <text:p/>
        </draw:polygon>
        <draw:polygon draw:style-name="gr18" draw:text-style-name="P18" draw:layer="layout" svg:width="0.079cm" svg:height="0.007cm" svg:x="33.32cm" svg:y="19.139cm" svg:viewBox="0 0 80 8" draw:points="0,0 80,0 80,8 0,8">
          <text:p/>
        </draw:polygon>
        <draw:polygon draw:style-name="gr18" draw:text-style-name="P18" draw:layer="layout" svg:width="0.078cm" svg:height="0.045cm" svg:x="33.505cm" svg:y="19.101cm" svg:viewBox="0 0 79 46" draw:points="0,0 79,0 79,46 0,46">
          <text:p/>
        </draw:polygon>
        <draw:polygon draw:style-name="gr19" draw:text-style-name="P19" draw:layer="layout" svg:width="0.078cm" svg:height="0.002cm" svg:x="33.689cm" svg:y="19.144cm" svg:viewBox="0 0 79 3" draw:points="0,0 79,0 79,3 0,3">
          <text:p/>
        </draw:polygon>
        <draw:polygon draw:style-name="gr19" draw:text-style-name="P19" draw:layer="layout" svg:width="0.078cm" svg:height="0.003cm" svg:x="33.873cm" svg:y="19.144cm" svg:viewBox="0 0 79 4" draw:points="0,0 79,0 79,4 0,4">
          <text:p/>
        </draw:polygon>
        <draw:polygon draw:style-name="gr19" draw:text-style-name="P19" draw:layer="layout" svg:width="0.077cm" svg:height="0cm" svg:x="34.057cm" svg:y="19.145cm" svg:viewBox="0 0 78 1" draw:points="0,0 78,0 78,1 0,1">
          <text:p/>
        </draw:polygon>
        <draw:polygon draw:style-name="gr19" draw:text-style-name="P19" draw:layer="layout" svg:width="0.078cm" svg:height="0cm" svg:x="34.241cm" svg:y="19.145cm" svg:viewBox="0 0 79 1" draw:points="0,0 79,0 79,1 0,1">
          <text:p/>
        </draw:polygon>
        <draw:polygon draw:style-name="gr19" draw:text-style-name="P19" draw:layer="layout" svg:width="0.077cm" svg:height="0cm" svg:x="34.426cm" svg:y="19.145cm" svg:viewBox="0 0 78 1" draw:points="0,0 78,0 78,1 0,1">
          <text:p/>
        </draw:polygon>
        <draw:polygon draw:style-name="gr19" draw:text-style-name="P19" draw:layer="layout" svg:width="0.078cm" svg:height="0.004cm" svg:x="34.61cm" svg:y="19.142cm" svg:viewBox="0 0 79 5" draw:points="0,0 79,0 79,5 0,5">
          <text:p/>
        </draw:polygon>
        <draw:polygon draw:style-name="gr20" draw:text-style-name="P20" draw:layer="layout" svg:width="0.078cm" svg:height="0.006cm" svg:x="34.794cm" svg:y="19.141cm" svg:viewBox="0 0 79 7" draw:points="0,0 79,0 79,7 0,7">
          <text:p/>
        </draw:polygon>
        <draw:polygon draw:style-name="gr20" draw:text-style-name="P20" draw:layer="layout" svg:width="0.079cm" svg:height="0.005cm" svg:x="34.978cm" svg:y="19.141cm" svg:viewBox="0 0 80 6" draw:points="0,0 80,0 80,6 0,6">
          <text:p/>
        </draw:polygon>
        <draw:polygon draw:style-name="gr20" draw:text-style-name="P20" draw:layer="layout" svg:width="0.077cm" svg:height="0cm" svg:x="35.163cm" svg:y="19.145cm" svg:viewBox="0 0 78 1" draw:points="0,0 78,0 78,1 0,1">
          <text:p/>
        </draw:polygon>
        <draw:polygon draw:style-name="gr20" draw:text-style-name="P20" draw:layer="layout" svg:width="0.077cm" svg:height="0cm" svg:x="35.347cm" svg:y="19.145cm" svg:viewBox="0 0 78 1" draw:points="0,0 78,0 78,1 0,1">
          <text:p/>
        </draw:polygon>
        <draw:polygon draw:style-name="gr20" draw:text-style-name="P20" draw:layer="layout" svg:width="0.077cm" svg:height="0cm" svg:x="35.531cm" svg:y="19.145cm" svg:viewBox="0 0 78 1" draw:points="0,0 78,0 78,1 0,1">
          <text:p/>
        </draw:polygon>
        <draw:polygon draw:style-name="gr20" draw:text-style-name="P20" draw:layer="layout" svg:width="0.078cm" svg:height="0.003cm" svg:x="35.715cm" svg:y="19.144cm" svg:viewBox="0 0 79 4" draw:points="0,0 79,0 79,4 0,4">
          <text:p/>
        </draw:polygon>
        <draw:polygon draw:style-name="gr21" draw:text-style-name="P21" draw:layer="layout" svg:width="0.079cm" svg:height="0.012cm" svg:x="35.899cm" svg:y="19.134cm" svg:viewBox="0 0 80 13" draw:points="0,0 80,0 80,13 0,13">
          <text:p/>
        </draw:polygon>
        <draw:polygon draw:style-name="gr21" draw:text-style-name="P21" draw:layer="layout" svg:width="0.079cm" svg:height="0.006cm" svg:x="36.083cm" svg:y="19.14cm" svg:viewBox="0 0 80 7" draw:points="0,0 80,0 80,7 0,7">
          <text:p/>
        </draw:polygon>
        <draw:polygon draw:style-name="gr21" draw:text-style-name="P21" draw:layer="layout" svg:width="0.078cm" svg:height="0.001cm" svg:x="36.268cm" svg:y="19.145cm" svg:viewBox="0 0 79 2" draw:points="0,0 79,0 79,2 0,2">
          <text:p/>
        </draw:polygon>
        <draw:polygon draw:style-name="gr21" draw:text-style-name="P21" draw:layer="layout" svg:width="0.077cm" svg:height="0cm" svg:x="36.452cm" svg:y="19.145cm" svg:viewBox="0 0 78 1" draw:points="0,0 78,0 78,1 0,1">
          <text:p/>
        </draw:polygon>
        <draw:polygon draw:style-name="gr21" draw:text-style-name="P21" draw:layer="layout" svg:width="0.078cm" svg:height="0cm" svg:x="36.82cm" svg:y="19.145cm" svg:viewBox="0 0 79 1" draw:points="0,0 79,0 79,1 0,1">
          <text:p/>
        </draw:polygon>
        <draw:polygon draw:style-name="gr22" draw:text-style-name="P22" draw:layer="layout" svg:width="0.078cm" svg:height="0.021cm" svg:x="37.005cm" svg:y="19.125cm" svg:viewBox="0 0 79 22" draw:points="0,0 79,0 79,22 0,22">
          <text:p/>
        </draw:polygon>
        <draw:polygon draw:style-name="gr23" draw:text-style-name="P23" draw:layer="layout" svg:width="0.078cm" svg:height="0.003cm" svg:x="37.189cm" svg:y="19.143cm" svg:viewBox="0 0 79 4" draw:points="0,0 79,0 79,4 0,4">
          <text:p/>
        </draw:polygon>
        <draw:polygon draw:style-name="gr23" draw:text-style-name="P23" draw:layer="layout" svg:width="0.078cm" svg:height="0.012cm" svg:x="37.373cm" svg:y="19.134cm" svg:viewBox="0 0 79 13" draw:points="0,0 79,0 79,13 0,13">
          <text:p/>
        </draw:polygon>
        <draw:polygon draw:style-name="gr24" draw:text-style-name="P24" draw:layer="layout" svg:width="0.078cm" svg:height="0.004cm" svg:x="37.557cm" svg:y="19.142cm" svg:viewBox="0 0 79 5" draw:points="0,0 79,0 79,5 0,5">
          <text:p/>
        </draw:polygon>
        <draw:polygon draw:style-name="gr24" draw:text-style-name="P24" draw:layer="layout" svg:width="0.079cm" svg:height="0.008cm" svg:x="37.741cm" svg:y="19.138cm" svg:viewBox="0 0 80 9" draw:points="0,0 80,0 80,9 0,9">
          <text:p/>
        </draw:polygon>
        <draw:polygon draw:style-name="gr24" draw:text-style-name="P24" draw:layer="layout" svg:width="0.078cm" svg:height="0.01cm" svg:x="37.926cm" svg:y="19.136cm" svg:viewBox="0 0 79 11" draw:points="0,0 79,0 79,11 0,11">
          <text:p/>
        </draw:polygon>
        <draw:polygon draw:style-name="gr25" draw:text-style-name="P25" draw:layer="layout" svg:width="0.078cm" svg:height="0.01cm" svg:x="38.11cm" svg:y="19.136cm" svg:viewBox="0 0 79 11" draw:points="0,0 79,0 79,11 0,11">
          <text:p/>
        </draw:polygon>
        <draw:polygon draw:style-name="gr25" draw:text-style-name="P25" draw:layer="layout" svg:width="0.078cm" svg:height="0.012cm" svg:x="38.294cm" svg:y="19.134cm" svg:viewBox="0 0 79 13" draw:points="0,0 79,0 79,13 0,13">
          <text:p/>
        </draw:polygon>
        <draw:polygon draw:style-name="gr25" draw:text-style-name="P25" draw:layer="layout" svg:width="0.079cm" svg:height="0.01cm" svg:x="38.478cm" svg:y="19.136cm" svg:viewBox="0 0 80 11" draw:points="0,0 80,0 80,11 0,11">
          <text:p/>
        </draw:polygon>
        <draw:polygon draw:style-name="gr25" draw:text-style-name="P25" draw:layer="layout" svg:width="0.078cm" svg:height="0.008cm" svg:x="38.663cm" svg:y="19.138cm" svg:viewBox="0 0 79 9" draw:points="0,0 79,0 79,9 0,9">
          <text:p/>
        </draw:polygon>
        <draw:polygon draw:style-name="gr25" draw:text-style-name="P25" draw:layer="layout" svg:width="0.078cm" svg:height="0.01cm" svg:x="38.847cm" svg:y="19.136cm" svg:viewBox="0 0 79 11" draw:points="0,0 79,0 79,11 0,11">
          <text:p/>
        </draw:polygon>
        <draw:polygon draw:style-name="gr10" draw:text-style-name="P10" draw:layer="layout" svg:width="1cm" svg:height="0.184cm" svg:x="23.741cm" svg:y="19.168cm" svg:viewBox="0 0 1001 185" draw:points="0,0 1001,0 1001,185 0,185">
          <text:p/>
        </draw:polygon>
        <draw:polygon draw:style-name="gr11" draw:text-style-name="P11" draw:layer="layout" svg:width="0.999cm" svg:height="0.184cm" svg:x="24.847cm" svg:y="19.168cm" svg:viewBox="0 0 1000 185" draw:points="0,0 1000,0 1000,185 0,185">
          <text:p/>
        </draw:polygon>
        <draw:polygon draw:style-name="gr12" draw:text-style-name="P12" draw:layer="layout" svg:width="1cm" svg:height="0.184cm" svg:x="25.952cm" svg:y="19.168cm" svg:viewBox="0 0 1001 185" draw:points="0,0 1001,0 1001,185 0,185">
          <text:p/>
        </draw:polygon>
        <draw:polygon draw:style-name="gr13" draw:text-style-name="P13" draw:layer="layout" svg:width="1cm" svg:height="0.184cm" svg:x="27.057cm" svg:y="19.168cm" svg:viewBox="0 0 1001 185" draw:points="0,0 1001,0 1001,185 0,185">
          <text:p/>
        </draw:polygon>
        <draw:polygon draw:style-name="gr14" draw:text-style-name="P14" draw:layer="layout" svg:width="0.999cm" svg:height="0.184cm" svg:x="28.163cm" svg:y="19.168cm" svg:viewBox="0 0 1000 185" draw:points="0,0 1000,0 1000,185 0,185">
          <text:p/>
        </draw:polygon>
        <draw:polygon draw:style-name="gr15" draw:text-style-name="P15" draw:layer="layout" svg:width="0.999cm" svg:height="0.184cm" svg:x="29.268cm" svg:y="19.168cm" svg:viewBox="0 0 1000 185" draw:points="0,0 1000,0 1000,185 0,185">
          <text:p/>
        </draw:polygon>
        <draw:polygon draw:style-name="gr16" draw:text-style-name="P16" draw:layer="layout" svg:width="1cm" svg:height="0.184cm" svg:x="30.373cm" svg:y="19.168cm" svg:viewBox="0 0 1001 185" draw:points="0,0 1001,0 1001,185 0,185">
          <text:p/>
        </draw:polygon>
        <draw:polygon draw:style-name="gr17" draw:text-style-name="P17" draw:layer="layout" svg:width="1cm" svg:height="0.184cm" svg:x="31.478cm" svg:y="19.168cm" svg:viewBox="0 0 1001 185" draw:points="0,0 1001,0 1001,185 0,185">
          <text:p/>
        </draw:polygon>
        <draw:polygon draw:style-name="gr18" draw:text-style-name="P18" draw:layer="layout" svg:width="0.999cm" svg:height="0.184cm" svg:x="32.584cm" svg:y="19.168cm" svg:viewBox="0 0 1000 185" draw:points="0,0 1000,0 1000,185 0,185">
          <text:p/>
        </draw:polygon>
        <draw:polygon draw:style-name="gr19" draw:text-style-name="P19" draw:layer="layout" svg:width="0.999cm" svg:height="0.184cm" svg:x="33.689cm" svg:y="19.168cm" svg:viewBox="0 0 1000 185" draw:points="0,0 1000,0 1000,185 0,185">
          <text:p/>
        </draw:polygon>
        <draw:polygon draw:style-name="gr20" draw:text-style-name="P20" draw:layer="layout" svg:width="1cm" svg:height="0.184cm" svg:x="34.794cm" svg:y="19.168cm" svg:viewBox="0 0 1001 185" draw:points="0,0 1001,0 1001,185 0,185">
          <text:p/>
        </draw:polygon>
        <draw:polygon draw:style-name="gr21" draw:text-style-name="P21" draw:layer="layout" svg:width="1cm" svg:height="0.184cm" svg:x="35.899cm" svg:y="19.168cm" svg:viewBox="0 0 1001 185" draw:points="0,0 1001,0 1001,185 0,185">
          <text:p/>
        </draw:polygon>
        <draw:polygon draw:style-name="gr22" draw:text-style-name="P22" draw:layer="layout" svg:width="0.078cm" svg:height="0.184cm" svg:x="37.005cm" svg:y="19.168cm" svg:viewBox="0 0 79 185" draw:points="0,0 79,0 79,185 0,185">
          <text:p/>
        </draw:polygon>
        <draw:polygon draw:style-name="gr23" draw:text-style-name="P23" draw:layer="layout" svg:width="0.262cm" svg:height="0.184cm" svg:x="37.189cm" svg:y="19.168cm" svg:viewBox="0 0 263 185" draw:points="0,0 263,0 263,185 0,185">
          <text:p/>
        </draw:polygon>
        <draw:polygon draw:style-name="gr24" draw:text-style-name="P24" draw:layer="layout" svg:width="0.447cm" svg:height="0.184cm" svg:x="37.557cm" svg:y="19.168cm" svg:viewBox="0 0 448 185" draw:points="0,0 448,0 448,185 0,185">
          <text:p/>
        </draw:polygon>
        <draw:polygon draw:style-name="gr25" draw:text-style-name="P25" draw:layer="layout" svg:width="0.815cm" svg:height="0.184cm" svg:x="38.11cm" svg:y="19.168cm" svg:viewBox="0 0 816 185" draw:points="0,0 816,0 816,185 0,185">
          <text:p/>
        </draw:polygon>
        <draw:polygon draw:style-name="gr26" draw:text-style-name="P26" draw:layer="layout" svg:width="1cm" svg:height="0.19cm" svg:x="23.741cm" svg:y="16.778cm" svg:viewBox="0 0 1001 191" draw:points="0,0 1001,0 1001,191 0,191">
          <text:p/>
        </draw:polygon>
        <draw:polygon draw:style-name="gr27" draw:text-style-name="P27" draw:layer="layout" svg:width="0.999cm" svg:height="0.19cm" svg:x="24.847cm" svg:y="16.778cm" svg:viewBox="0 0 1000 191" draw:points="0,0 1000,0 1000,191 0,191">
          <text:p/>
        </draw:polygon>
        <draw:polygon draw:style-name="gr12" draw:text-style-name="P12" draw:layer="layout" svg:width="1cm" svg:height="0.19cm" svg:x="25.952cm" svg:y="16.778cm" svg:viewBox="0 0 1001 191" draw:points="0,0 1001,0 1001,191 0,191">
          <text:p/>
        </draw:polygon>
        <draw:polygon draw:style-name="gr13" draw:text-style-name="P13" draw:layer="layout" svg:width="1cm" svg:height="0.19cm" svg:x="27.057cm" svg:y="16.778cm" svg:viewBox="0 0 1001 191" draw:points="0,0 1001,0 1001,191 0,191">
          <text:p/>
        </draw:polygon>
        <draw:polygon draw:style-name="gr15" draw:text-style-name="P15" draw:layer="layout" svg:width="4.315cm" svg:height="0.19cm" svg:x="28.163cm" svg:y="16.778cm" svg:viewBox="0 0 4316 191" draw:points="0,0 4316,0 4316,191 0,191">
          <text:p/>
        </draw:polygon>
        <draw:polygon draw:style-name="gr19" draw:text-style-name="P19" draw:layer="layout" svg:width="4.315cm" svg:height="0.19cm" svg:x="32.584cm" svg:y="16.778cm" svg:viewBox="0 0 4316 191" draw:points="0,0 4316,0 4316,191 0,191">
          <text:p/>
        </draw:polygon>
        <draw:polygon draw:style-name="gr24" draw:text-style-name="P24" draw:layer="layout" svg:width="1.92cm" svg:height="0.19cm" svg:x="37.005cm" svg:y="16.778cm" svg:viewBox="0 0 1921 191" draw:points="0,0 1921,0 1921,191 0,191">
          <text:p/>
        </draw:polygon>
        <draw:frame draw:style-name="gr28" draw:text-style-name="P8" draw:layer="layout" svg:width="17.065cm" svg:height="0.924cm" svg:x="22.82cm" svg:y="9.119cm">
          <draw:text-box>
            <text:p text:style-name="P6"><text:span text:style-name="T2">476-Type: Most detailed resolution for indel</text:span></text:p>
          </draw:text-box>
        </draw:frame>
        <draw:path draw:style-name="gr29" draw:text-style-name="P28" draw:layer="layout" svg:width="6.826cm" svg:height="6.826cm" svg:x="7.097cm" svg:y="12.784cm" svg:viewBox="0 0 6827 6827" svg:d="M3414 0c1885 0 3413 1528 3413 3413 0 1886-1528 3414-3413 3414-1886 0-3414-1528-3414-3414 0-1885 1528-3413 3414-3413z">
          <text:p/>
        </draw:path>
        <draw:path draw:style-name="gr30" draw:text-style-name="P2" draw:layer="layout" svg:width="6.826cm" svg:height="6.826cm" svg:x="7.097cm" svg:y="12.784cm" svg:viewBox="0 0 6827 6827" svg:d="M0 3413c0-1885 1528-3413 3414-3413 1885 0 3413 1528 3413 3413 0 1886-1528 3414-3413 3414-1886 0-3414-1528-3414-3414z">
          <text:p/>
        </draw:path>
        <draw:frame draw:style-name="gr2" draw:text-style-name="P2" draw:layer="layout" svg:width="4.94cm" svg:height="6.519cm" svg:x="7.035cm" svg:y="12.524cm">
          <draw:image xlink:href="Pictures/1000000100000171000001E7973D64E6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svg:x="11.426cm" svg:y="15.616cm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2.63789063146423) translate (11.522cm 17.739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2.68379279079168) translate (13.153cm 16.197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2.68379279079168) translate (13.543cm 16.587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2.68379279079168) translate (13.451cm 17.804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2.68379279079168) translate (12.904cm 18.187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2.68379279079168) translate (12.198cm 17.887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56cm" svg:height="0.843cm" svg:x="11.922cm" svg:y="15.67cm">
          <draw:image xlink:href="Pictures/10000001000000400000003FBC905FA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2.63789063146423) translate (11.599cm 17.06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31" draw:text-style-name="P2" draw:layer="layout" svg:width="0.853cm" svg:height="0.839cm" draw:transform="rotate (2.16612813465016) translate (13.01cm 17.594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31" draw:text-style-name="P2" draw:layer="layout" svg:width="0.853cm" svg:height="0.839cm" draw:transform="rotate (2.16612813465016) translate (11.779cm 18.138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31" draw:text-style-name="P2" draw:layer="layout" svg:width="0.853cm" svg:height="0.839cm" draw:transform="rotate (2.16612813465016) translate (12.59cm 18.099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-1.10985487134319) translate (13.003cm 15.957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16cm" svg:height="0.802cm" draw:transform="rotate (1.08681652521687) translate (11.039cm 16.809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1.137cm" svg:height="1.124cm" svg:x="11.641cm" svg:y="16.969cm">
          <draw:image xlink:href="Pictures/1000000100000055000000542FAF6096.png" xlink:type="simple" xlink:show="embed" xlink:actuate="onLoad" draw:mime-type="image/png">
            <text:p/>
          </draw:image>
        </draw:frame>
        <draw:frame draw:style-name="gr31" draw:text-style-name="P2" draw:layer="layout" svg:width="0.853cm" svg:height="0.839cm" draw:transform="rotate (2.09107897681441) translate (11.406cm 17.686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839cm" draw:transform="rotate (-1.92649442835134) translate (13.053cm 16.752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31" draw:text-style-name="P2" draw:layer="layout" svg:width="0.853cm" svg:height="0.839cm" draw:transform="rotate (1.20480078265169) translate (11.501cm 16.453cm)">
          <draw:image xlink:href="Pictures/100000010000003D0000003C594EB3F8.png" xlink:type="simple" xlink:show="embed" xlink:actuate="onLoad" draw:mime-type="image/png">
            <text:p/>
          </draw:image>
        </draw:frame>
        <draw:frame draw:style-name="gr2" draw:text-style-name="P2" draw:layer="layout" svg:width="1.137cm" svg:height="1.124cm" draw:transform="rotate (1.88687545433107) translate (11.579cm 17.226cm)">
          <draw:image xlink:href="Pictures/1000000100000055000000542FAF6096.png" xlink:type="simple" xlink:show="embed" xlink:actuate="onLoad" draw:mime-type="image/png">
            <text:p/>
          </draw:image>
        </draw:frame>
        <draw:frame draw:style-name="gr2" draw:text-style-name="P2" draw:layer="layout" svg:width="1.258cm" svg:height="1.258cm" svg:x="11.975cm" svg:y="15.871cm">
          <draw:image xlink:href="Pictures/100000010000005E0000005EF87D0CC3.png" xlink:type="simple" xlink:show="embed" xlink:actuate="onLoad" draw:mime-type="image/png">
            <text:p/>
          </draw:image>
        </draw:frame>
        <draw:frame draw:style-name="gr2" draw:text-style-name="P2" draw:layer="layout" svg:width="1.258cm" svg:height="1.258cm" draw:transform="rotate (3.0782372017424) translate (13.389cm 17.858cm)">
          <draw:image xlink:href="Pictures/100000010000005E0000005EF87D0CC3.png" xlink:type="simple" xlink:show="embed" xlink:actuate="onLoad" draw:mime-type="image/png">
            <text:p/>
          </draw:image>
        </draw:frame>
        <draw:frame draw:style-name="gr2" draw:text-style-name="P2" draw:layer="layout" svg:width="1.137cm" svg:height="1.124cm" draw:transform="rotate (1.88687545433107) translate (11.913cm 17.702cm)">
          <draw:image xlink:href="Pictures/1000000100000055000000542FAF6096.png" xlink:type="simple" xlink:show="embed" xlink:actuate="onLoad" draw:mime-type="image/png">
            <text:p/>
          </draw:image>
        </draw:frame>
        <draw:frame draw:style-name="gr32" draw:text-style-name="P29" draw:layer="layout" svg:width="1.874cm" svg:height="0.738cm" svg:x="23.82cm" svg:y="17.108cm">
          <draw:text-box>
            <text:p text:style-name="P6"><text:span text:style-name="T3">C_ID2</text:span></text:p>
          </draw:text-box>
        </draw:frame>
        <draw:frame draw:style-name="gr33" draw:text-style-name="P30" draw:layer="layout" svg:width="0.89cm" svg:height="1.001cm" draw:transform="rotate (-0.790634151153432) translate (13.699cm 12.771cm)">
          <draw:text-box>
            <text:p text:style-name="P6"><text:span text:style-name="T4">s</text:span></text:p>
          </draw:text-box>
        </draw:frame>
        <draw:frame draw:style-name="gr33" draw:text-style-name="P30" draw:layer="layout" svg:width="0.89cm" svg:height="1.001cm" draw:transform="rotate (-0.645248224462304) translate (13.222cm 12.386cm)">
          <draw:text-box>
            <text:p text:style-name="P6"><text:span text:style-name="T4">e</text:span></text:p>
          </draw:text-box>
        </draw:frame>
        <draw:frame draw:style-name="gr33" draw:text-style-name="P30" draw:layer="layout" svg:width="0.89cm" svg:height="1.001cm" draw:transform="rotate (-0.530056493830678) translate (12.785cm 12.068cm)">
          <draw:text-box>
            <text:p text:style-name="P6"><text:span text:style-name="T4">p</text:span></text:p>
          </draw:text-box>
        </draw:frame>
        <draw:frame draw:style-name="gr33" draw:text-style-name="P30" draw:layer="layout" svg:width="0.89cm" svg:height="1.001cm" draw:transform="rotate (-0.414864763199052) translate (12.286cm 11.833cm)">
          <draw:text-box>
            <text:p text:style-name="P6"><text:span text:style-name="T4">y</text:span></text:p>
          </draw:text-box>
        </draw:frame>
        <draw:frame draw:style-name="gr33" draw:text-style-name="P30" draw:layer="layout" svg:width="0.89cm" svg:height="1.001cm" draw:transform="rotate (-0.381528974485961) translate (11.757cm 11.655cm)">
          <draw:text-box>
            <text:p text:style-name="P6"><text:span text:style-name="T4">T</text:span></text:p>
          </draw:text-box>
        </draw:frame>
        <draw:frame draw:style-name="gr33" draw:text-style-name="P30" draw:layer="layout" svg:width="0.89cm" svg:height="1.001cm" draw:transform="rotate (-0.105941485596056) translate (10.899cm 11.551cm)">
          <draw:text-box>
            <text:p text:style-name="P6"><text:span text:style-name="T4">r</text:span></text:p>
          </draw:text-box>
        </draw:frame>
        <draw:frame draw:style-name="gr33" draw:text-style-name="P30" draw:layer="layout" svg:width="0.89cm" svg:height="1.001cm" draw:transform="rotate (-0.0151843644923509) translate (10.333cm 11.528cm)">
          <draw:text-box>
            <text:p text:style-name="P6"><text:span text:style-name="T4">e</text:span></text:p>
          </draw:text-box>
        </draw:frame>
        <draw:frame draw:style-name="gr33" draw:text-style-name="P30" draw:layer="layout" svg:width="0.89cm" svg:height="1.001cm" draw:transform="rotate (0.0938987137572949) translate (9.812cm 11.576cm)">
          <draw:text-box>
            <text:p text:style-name="P6"><text:span text:style-name="T4">c</text:span></text:p>
          </draw:text-box>
        </draw:frame>
        <draw:frame draw:style-name="gr33" draw:text-style-name="P30" draw:layer="layout" svg:width="0.89cm" svg:height="1.001cm" draw:transform="rotate (0.202807259081741) translate (9.243cm 11.689cm)">
          <draw:text-box>
            <text:p text:style-name="P6"><text:span text:style-name="T4">n</text:span></text:p>
          </draw:text-box>
        </draw:frame>
        <draw:frame draw:style-name="gr33" draw:text-style-name="P30" draw:layer="layout" svg:width="0.89cm" svg:height="1.001cm" draw:transform="rotate (0.317998989713367) translate (8.692cm 11.866cm)">
          <draw:text-box>
            <text:p text:style-name="P6"><text:span text:style-name="T4">a</text:span></text:p>
          </draw:text-box>
        </draw:frame>
        <draw:frame draw:style-name="gr33" draw:text-style-name="P30" draw:layer="layout" svg:width="0.89cm" svg:height="1.001cm" draw:transform="rotate (0.451342144565734) translate (8.009cm 12.184cm)">
          <draw:text-box>
            <text:p text:style-name="P6"><text:span text:style-name="T4">C</text:span></text:p>
          </draw:text-box>
        </draw:frame>
        <draw:frame draw:style-name="gr33" draw:text-style-name="P30" draw:layer="layout" svg:width="0.89cm" svg:height="1.001cm" draw:transform="rotate (0.554316570433399) translate (7.735cm 12.358cm)">
          <draw:text-box>
            <text:p text:style-name="P6"><text:span text:style-name="T4"><text:s/></text:span></text:p>
          </draw:text-box>
        </draw:frame>
        <draw:frame draw:style-name="gr33" draw:text-style-name="P30" draw:layer="layout" svg:width="0.89cm" svg:height="1.001cm" draw:transform="rotate (0.639139572080324) translate (7.288cm 12.686cm)">
          <draw:text-box>
            <text:p text:style-name="P6"><text:span text:style-name="T4">6</text:span></text:p>
          </draw:text-box>
        </draw:frame>
        <draw:line draw:style-name="gr34" draw:text-style-name="P2" draw:layer="layout" svg:x1="37.984cm" svg:y1="14.068cm" svg:x2="35.465cm" svg:y2="14.913cm">
          <text:p/>
        </draw:line>
        <draw:polygon draw:style-name="gr35" draw:text-style-name="P31" draw:layer="layout" svg:width="0.342cm" svg:height="0.512cm" svg:x="35.243cm" svg:y="14.645cm" svg:viewBox="0 0 343 513" draw:points="343,513 171,0 0,342">
          <text:p/>
        </draw:polygon>
        <draw:line draw:style-name="gr34" draw:text-style-name="P2" draw:layer="layout" svg:x1="31.437cm" svg:y1="14.068cm" svg:x2="31.437cm" svg:y2="14.759cm">
          <text:p/>
        </draw:line>
        <draw:polygon draw:style-name="gr35" draw:text-style-name="P31" draw:layer="layout" svg:width="0.54cm" svg:height="0.27cm" svg:x="31.167cm" svg:y="14.723cm" svg:viewBox="0 0 541 271" draw:points="541,0 0,0 270,271">
          <text:p/>
        </draw:polygon>
        <draw:path draw:style-name="gr34" draw:text-style-name="P2" draw:layer="layout" svg:width="2.651cm" svg:height="0.853cm" svg:x="25.017cm" svg:y="14.068cm" svg:viewBox="0 0 2652 854" svg:d="M0 0c17 6 35 12 53 17l2599 837">
          <text:p/>
        </draw:path>
        <draw:polygon draw:style-name="gr35" draw:text-style-name="P31" draw:layer="layout" svg:width="0.34cm" svg:height="0.514cm" svg:x="27.55cm" svg:y="14.653cm" svg:viewBox="0 0 341 515" draw:points="167,0 0,515 341,340">
          <text:p/>
        </draw:polygon>
        <draw:frame draw:style-name="gr33" draw:text-style-name="P30" draw:layer="layout" svg:width="0.89cm" svg:height="1.001cm" draw:transform="rotate (0.75415676978675) translate (6.858cm 13.073cm)">
          <draw:text-box>
            <text:p text:style-name="P6"><text:span text:style-name="T4">3</text:span></text:p>
          </draw:text-box>
        </draw:frame>
        <draw:polygon draw:style-name="gr4" draw:text-style-name="P4" draw:layer="layout" svg:width="5.93cm" svg:height="2.283cm" svg:x="22.283cm" svg:y="5.104cm" svg:viewBox="0 0 5931 2284" draw:points="0,0 5931,0 5931,2284 0,2284">
          <text:p/>
        </draw:polygon>
        <draw:polygon draw:style-name="gr36" draw:text-style-name="P32" draw:layer="layout" svg:width="0.047cm" svg:height="0.009cm" svg:x="22.838cm" svg:y="7.421cm" svg:viewBox="0 0 48 10" draw:points="0,0 48,0 48,10 0,10">
          <text:p/>
        </draw:polygon>
        <draw:polygon draw:style-name="gr36" draw:text-style-name="P32" draw:layer="layout" svg:width="0.047cm" svg:height="0.018cm" svg:x="22.704cm" svg:y="7.412cm" svg:viewBox="0 0 48 19" draw:points="0,0 48,0 48,19 0,19">
          <text:p/>
        </draw:polygon>
        <draw:polygon draw:style-name="gr36" draw:text-style-name="P32" draw:layer="layout" svg:width="0.047cm" svg:height="0.022cm" svg:x="22.771cm" svg:y="7.408cm" svg:viewBox="0 0 48 23" draw:points="0,0 48,0 48,23 0,23">
          <text:p/>
        </draw:polygon>
        <draw:polygon draw:style-name="gr36" draw:text-style-name="P32" draw:layer="layout" svg:width="0.047cm" svg:height="0.039cm" svg:x="22.3cm" svg:y="7.391cm" svg:viewBox="0 0 48 40" draw:points="0,0 48,0 48,40 0,40">
          <text:p/>
        </draw:polygon>
        <draw:polygon draw:style-name="gr36" draw:text-style-name="P32" draw:layer="layout" svg:width="0.047cm" svg:height="0.036cm" svg:x="22.367cm" svg:y="7.395cm" svg:viewBox="0 0 48 37" draw:points="0,0 48,0 48,37 0,37">
          <text:p/>
        </draw:polygon>
        <draw:polygon draw:style-name="gr36" draw:text-style-name="P32" draw:layer="layout" svg:width="0.047cm" svg:height="0.011cm" svg:x="22.435cm" svg:y="7.419cm" svg:viewBox="0 0 48 12" draw:points="0,0 48,0 48,12 0,12">
          <text:p/>
        </draw:polygon>
        <draw:polygon draw:style-name="gr36" draw:text-style-name="P32" draw:layer="layout" svg:width="0.047cm" svg:height="0.01cm" svg:x="22.502cm" svg:y="7.42cm" svg:viewBox="0 0 48 11" draw:points="0,0 48,0 48,11 0,11">
          <text:p/>
        </draw:polygon>
        <draw:polygon draw:style-name="gr36" draw:text-style-name="P32" draw:layer="layout" svg:width="0.047cm" svg:height="0.006cm" svg:x="22.569cm" svg:y="7.425cm" svg:viewBox="0 0 48 7" draw:points="0,0 48,0 48,7 0,7">
          <text:p/>
        </draw:polygon>
        <draw:polygon draw:style-name="gr36" draw:text-style-name="P32" draw:layer="layout" svg:width="0.047cm" svg:height="0.009cm" svg:x="22.636cm" svg:y="7.421cm" svg:viewBox="0 0 48 10" draw:points="0,0 48,0 48,10 0,10">
          <text:p/>
        </draw:polygon>
        <draw:polygon draw:style-name="gr11" draw:text-style-name="P11" draw:layer="layout" svg:width="0.048cm" svg:height="0.082cm" svg:x="22.972cm" svg:y="7.348cm" svg:viewBox="0 0 49 83" draw:points="0,0 49,0 49,83 0,83">
          <text:p/>
        </draw:polygon>
        <draw:polygon draw:style-name="gr11" draw:text-style-name="P11" draw:layer="layout" svg:width="0.047cm" svg:height="0.025cm" svg:x="23.04cm" svg:y="7.405cm" svg:viewBox="0 0 48 26" draw:points="0,0 48,0 48,26 0,26">
          <text:p/>
        </draw:polygon>
        <draw:polygon draw:style-name="gr11" draw:text-style-name="P11" draw:layer="layout" svg:width="0.047cm" svg:height="0.02cm" svg:x="23.107cm" svg:y="7.41cm" svg:viewBox="0 0 48 21" draw:points="0,0 48,0 48,21 0,21">
          <text:p/>
        </draw:polygon>
        <draw:polygon draw:style-name="gr11" draw:text-style-name="P11" draw:layer="layout" svg:width="0.047cm" svg:height="0.948cm" svg:x="23.578cm" svg:y="6.482cm" svg:viewBox="0 0 48 949" draw:points="0,0 48,0 48,949 0,949">
          <text:p/>
        </draw:polygon>
        <draw:polygon draw:style-name="gr11" draw:text-style-name="P11" draw:layer="layout" svg:width="0.047cm" svg:height="0.537cm" svg:x="23.645cm" svg:y="6.893cm" svg:viewBox="0 0 48 538" draw:points="0,0 48,0 48,538 0,538">
          <text:p/>
        </draw:polygon>
        <draw:polygon draw:style-name="gr11" draw:text-style-name="P11" draw:layer="layout" svg:width="0.047cm" svg:height="0.428cm" svg:x="23.712cm" svg:y="7.002cm" svg:viewBox="0 0 48 429" draw:points="0,0 48,0 48,429 0,429">
          <text:p/>
        </draw:polygon>
        <draw:polygon draw:style-name="gr11" draw:text-style-name="P11" draw:layer="layout" svg:width="0.047cm" svg:height="1.903cm" svg:x="24.183cm" svg:y="5.527cm" svg:viewBox="0 0 48 1904" draw:points="0,0 48,0 48,1904 0,1904">
          <text:p/>
        </draw:polygon>
        <draw:polygon draw:style-name="gr11" draw:text-style-name="P11" draw:layer="layout" svg:width="0.047cm" svg:height="1.28cm" svg:x="24.25cm" svg:y="6.15cm" svg:viewBox="0 0 48 1281" draw:points="0,0 48,0 48,1281 0,1281">
          <text:p/>
        </draw:polygon>
        <draw:polygon draw:style-name="gr11" draw:text-style-name="P11" draw:layer="layout" svg:width="0.047cm" svg:height="0.853cm" svg:x="24.317cm" svg:y="6.577cm" svg:viewBox="0 0 48 854" draw:points="0,0 48,0 48,854 0,854">
          <text:p/>
        </draw:polygon>
        <draw:polygon draw:style-name="gr12" draw:text-style-name="P12" draw:layer="layout" svg:width="0.047cm" svg:height="0.022cm" svg:x="24.788cm" svg:y="7.408cm" svg:viewBox="0 0 48 23" draw:points="0,0 48,0 48,23 0,23">
          <text:p/>
        </draw:polygon>
        <draw:polygon draw:style-name="gr12" draw:text-style-name="P12" draw:layer="layout" svg:width="0.047cm" svg:height="0.003cm" svg:x="24.855cm" svg:y="7.427cm" svg:viewBox="0 0 48 4" draw:points="0,0 48,0 48,4 0,4">
          <text:p/>
        </draw:polygon>
        <draw:polygon draw:style-name="gr13" draw:text-style-name="P13" draw:layer="layout" svg:width="0.047cm" svg:height="0.052cm" svg:x="25.124cm" svg:y="7.378cm" svg:viewBox="0 0 48 53" draw:points="0,0 48,0 48,53 0,53">
          <text:p/>
        </draw:polygon>
        <draw:polygon draw:style-name="gr13" draw:text-style-name="P13" draw:layer="layout" svg:width="0.047cm" svg:height="0.012cm" svg:x="25.191cm" svg:y="7.418cm" svg:viewBox="0 0 48 13" draw:points="0,0 48,0 48,13 0,13">
          <text:p/>
        </draw:polygon>
        <draw:polygon draw:style-name="gr13" draw:text-style-name="P13" draw:layer="layout" svg:width="0.047cm" svg:height="0.022cm" svg:x="25.258cm" svg:y="7.408cm" svg:viewBox="0 0 48 23" draw:points="0,0 48,0 48,23 0,23">
          <text:p/>
        </draw:polygon>
        <draw:polygon draw:style-name="gr13" draw:text-style-name="P13" draw:layer="layout" svg:width="0.047cm" svg:height="0.231cm" svg:x="25.729cm" svg:y="7.199cm" svg:viewBox="0 0 48 232" draw:points="0,0 48,0 48,232 0,232">
          <text:p/>
        </draw:polygon>
        <draw:polygon draw:style-name="gr13" draw:text-style-name="P13" draw:layer="layout" svg:width="0.047cm" svg:height="0.179cm" svg:x="25.796cm" svg:y="7.251cm" svg:viewBox="0 0 48 180" draw:points="0,0 48,0 48,180 0,180">
          <text:p/>
        </draw:polygon>
        <draw:polygon draw:style-name="gr13" draw:text-style-name="P13" draw:layer="layout" svg:width="0.048cm" svg:height="0.258cm" svg:x="25.863cm" svg:y="7.172cm" svg:viewBox="0 0 49 259" draw:points="0,0 49,0 49,259 0,259">
          <text:p/>
        </draw:polygon>
        <draw:polygon draw:style-name="gr13" draw:text-style-name="P13" draw:layer="layout" svg:width="0.047cm" svg:height="0.271cm" svg:x="26.334cm" svg:y="7.159cm" svg:viewBox="0 0 48 272" draw:points="0,0 48,0 48,272 0,272">
          <text:p/>
        </draw:polygon>
        <draw:polygon draw:style-name="gr13" draw:text-style-name="P13" draw:layer="layout" svg:width="0.047cm" svg:height="0.258cm" svg:x="26.401cm" svg:y="7.172cm" svg:viewBox="0 0 48 259" draw:points="0,0 48,0 48,259 0,259">
          <text:p/>
        </draw:polygon>
        <draw:polygon draw:style-name="gr13" draw:text-style-name="P13" draw:layer="layout" svg:width="0.047cm" svg:height="0.263cm" svg:x="26.469cm" svg:y="7.167cm" svg:viewBox="0 0 48 264" draw:points="0,0 48,0 48,264 0,264">
          <text:p/>
        </draw:polygon>
        <draw:polygon draw:style-name="gr11" draw:text-style-name="P11" draw:layer="layout" svg:width="0.047cm" svg:height="0.032cm" svg:x="23.174cm" svg:y="7.398cm" svg:viewBox="0 0 48 33" draw:points="0,0 48,0 48,33 0,33">
          <text:p/>
        </draw:polygon>
        <draw:polygon draw:style-name="gr11" draw:text-style-name="P11" draw:layer="layout" svg:width="0.049cm" svg:height="0.039cm" svg:x="23.241cm" svg:y="7.391cm" svg:viewBox="0 0 50 40" draw:points="0,0 50,0 50,40 0,40">
          <text:p/>
        </draw:polygon>
        <draw:polygon draw:style-name="gr11" draw:text-style-name="P11" draw:layer="layout" svg:width="0.047cm" svg:height="0.019cm" svg:x="23.309cm" svg:y="7.411cm" svg:viewBox="0 0 48 20" draw:points="0,0 48,0 48,20 0,20">
          <text:p/>
        </draw:polygon>
        <draw:polygon draw:style-name="gr11" draw:text-style-name="P11" draw:layer="layout" svg:width="0.047cm" svg:height="0.376cm" svg:x="23.779cm" svg:y="7.054cm" svg:viewBox="0 0 48 377" draw:points="0,0 48,0 48,377 0,377">
          <text:p/>
        </draw:polygon>
        <draw:polygon draw:style-name="gr11" draw:text-style-name="P11" draw:layer="layout" svg:width="0.047cm" svg:height="0.297cm" svg:x="23.847cm" svg:y="7.133cm" svg:viewBox="0 0 48 298" draw:points="0,0 48,0 48,298 0,298">
          <text:p/>
        </draw:polygon>
        <draw:polygon draw:style-name="gr11" draw:text-style-name="P11" draw:layer="layout" svg:width="0.047cm" svg:height="0.254cm" svg:x="23.914cm" svg:y="7.176cm" svg:viewBox="0 0 48 255" draw:points="0,0 48,0 48,255 0,255">
          <text:p/>
        </draw:polygon>
        <draw:polygon draw:style-name="gr11" draw:text-style-name="P11" draw:layer="layout" svg:width="0.047cm" svg:height="0.978cm" svg:x="24.384cm" svg:y="6.452cm" svg:viewBox="0 0 48 979" draw:points="0,0 48,0 48,979 0,979">
          <text:p/>
        </draw:polygon>
        <draw:polygon draw:style-name="gr11" draw:text-style-name="P11" draw:layer="layout" svg:width="0.047cm" svg:height="1.02cm" svg:x="24.452cm" svg:y="6.41cm" svg:viewBox="0 0 48 1021" draw:points="0,0 48,0 48,1021 0,1021">
          <text:p/>
        </draw:polygon>
        <draw:polygon draw:style-name="gr11" draw:text-style-name="P11" draw:layer="layout" svg:width="0.047cm" svg:height="0.756cm" svg:x="24.519cm" svg:y="6.674cm" svg:viewBox="0 0 48 757" draw:points="0,0 48,0 48,757 0,757">
          <text:p/>
        </draw:polygon>
        <draw:polygon draw:style-name="gr13" draw:text-style-name="P13" draw:layer="layout" svg:width="0.047cm" svg:height="0.006cm" svg:x="25.326cm" svg:y="7.424cm" svg:viewBox="0 0 48 7" draw:points="0,0 48,0 48,7 0,7">
          <text:p/>
        </draw:polygon>
        <draw:polygon draw:style-name="gr13" draw:text-style-name="P13" draw:layer="layout" svg:width="0.047cm" svg:height="0.011cm" svg:x="25.393cm" svg:y="7.419cm" svg:viewBox="0 0 48 12" draw:points="0,0 48,0 48,12 0,12">
          <text:p/>
        </draw:polygon>
        <draw:polygon draw:style-name="gr13" draw:text-style-name="P13" draw:layer="layout" svg:width="0.047cm" svg:height="0.009cm" svg:x="25.46cm" svg:y="7.421cm" svg:viewBox="0 0 48 10" draw:points="0,0 48,0 48,10 0,10">
          <text:p/>
        </draw:polygon>
        <draw:polygon draw:style-name="gr13" draw:text-style-name="P13" draw:layer="layout" svg:width="0.047cm" svg:height="0.106cm" svg:x="25.931cm" svg:y="7.324cm" svg:viewBox="0 0 48 107" draw:points="0,0 48,0 48,107 0,107">
          <text:p/>
        </draw:polygon>
        <draw:polygon draw:style-name="gr13" draw:text-style-name="P13" draw:layer="layout" svg:width="0.047cm" svg:height="0.109cm" svg:x="25.998cm" svg:y="7.321cm" svg:viewBox="0 0 48 110" draw:points="0,0 48,0 48,110 0,110">
          <text:p/>
        </draw:polygon>
        <draw:polygon draw:style-name="gr13" draw:text-style-name="P13" draw:layer="layout" svg:width="0.047cm" svg:height="0.1cm" svg:x="26.065cm" svg:y="7.33cm" svg:viewBox="0 0 48 101" draw:points="0,0 48,0 48,101 0,101">
          <text:p/>
        </draw:polygon>
        <draw:polygon draw:style-name="gr13" draw:text-style-name="P13" draw:layer="layout" svg:width="0.047cm" svg:height="0.137cm" svg:x="26.536cm" svg:y="7.293cm" svg:viewBox="0 0 48 138" draw:points="0,0 48,0 48,138 0,138">
          <text:p/>
        </draw:polygon>
        <draw:polygon draw:style-name="gr13" draw:text-style-name="P13" draw:layer="layout" svg:width="0.047cm" svg:height="0.164cm" svg:x="26.603cm" svg:y="7.266cm" svg:viewBox="0 0 48 165" draw:points="0,0 48,0 48,165 0,165">
          <text:p/>
        </draw:polygon>
        <draw:polygon draw:style-name="gr13" draw:text-style-name="P13" draw:layer="layout" svg:width="0.047cm" svg:height="0.207cm" svg:x="26.67cm" svg:y="7.223cm" svg:viewBox="0 0 48 208" draw:points="0,0 48,0 48,208 0,208">
          <text:p/>
        </draw:polygon>
        <draw:polygon draw:style-name="gr37" draw:text-style-name="P33" draw:layer="layout" svg:width="0.047cm" svg:height="0.052cm" svg:x="27.141cm" svg:y="7.378cm" svg:viewBox="0 0 48 53" draw:points="0,0 48,0 48,53 0,53">
          <text:p/>
        </draw:polygon>
        <draw:polygon draw:style-name="gr37" draw:text-style-name="P33" draw:layer="layout" svg:width="0.047cm" svg:height="0.046cm" svg:x="26.939cm" svg:y="7.384cm" svg:viewBox="0 0 48 47" draw:points="0,0 48,0 48,47 0,47">
          <text:p/>
        </draw:polygon>
        <draw:polygon draw:style-name="gr25" draw:text-style-name="P25" draw:layer="layout" svg:width="0.047cm" svg:height="0.055cm" svg:x="27.746cm" svg:y="7.375cm" svg:viewBox="0 0 48 56" draw:points="0,0 48,0 48,56 0,56">
          <text:p/>
        </draw:polygon>
        <draw:polygon draw:style-name="gr37" draw:text-style-name="P33" draw:layer="layout" svg:width="0.047cm" svg:height="0.105cm" svg:x="27.074cm" svg:y="7.325cm" svg:viewBox="0 0 48 106" draw:points="0,0 48,0 48,106 0,106">
          <text:p/>
        </draw:polygon>
        <draw:polygon draw:style-name="gr37" draw:text-style-name="P33" draw:layer="layout" svg:width="0.047cm" svg:height="0.034cm" svg:x="27.275cm" svg:y="7.396cm" svg:viewBox="0 0 48 35" draw:points="0,0 48,0 48,35 0,35">
          <text:p/>
        </draw:polygon>
        <draw:polygon draw:style-name="gr37" draw:text-style-name="P33" draw:layer="layout" svg:width="0.047cm" svg:height="0.055cm" svg:x="27.208cm" svg:y="7.375cm" svg:viewBox="0 0 48 56" draw:points="0,0 48,0 48,56 0,56">
          <text:p/>
        </draw:polygon>
        <draw:polygon draw:style-name="gr25" draw:text-style-name="P25" draw:layer="layout" svg:width="0.047cm" svg:height="0.031cm" svg:x="27.813cm" svg:y="7.399cm" svg:viewBox="0 0 48 32" draw:points="0,0 48,0 48,32 0,32">
          <text:p/>
        </draw:polygon>
        <draw:polygon draw:style-name="gr25" draw:text-style-name="P25" draw:layer="layout" svg:width="0.048cm" svg:height="0.022cm" svg:x="27.88cm" svg:y="7.408cm" svg:viewBox="0 0 49 23" draw:points="0,0 49,0 49,23 0,23">
          <text:p/>
        </draw:polygon>
        <draw:polygon draw:style-name="gr37" draw:text-style-name="P33" draw:layer="layout" svg:width="0.047cm" svg:height="0.015cm" svg:x="27.006cm" svg:y="7.416cm" svg:viewBox="0 0 48 16" draw:points="0,0 48,0 48,16 0,16">
          <text:p/>
        </draw:polygon>
        <draw:polygon draw:style-name="gr25" draw:text-style-name="P25" draw:layer="layout" svg:width="0.047cm" svg:height="0.01cm" svg:x="28.149cm" svg:y="7.42cm" svg:viewBox="0 0 48 11" draw:points="0,0 48,0 48,11 0,11">
          <text:p/>
        </draw:polygon>
        <draw:polygon draw:style-name="gr25" draw:text-style-name="P25" draw:layer="layout" svg:width="0.047cm" svg:height="0.01cm" svg:x="27.948cm" svg:y="7.42cm" svg:viewBox="0 0 48 11" draw:points="0,0 48,0 48,11 0,11">
          <text:p/>
        </draw:polygon>
        <draw:polygon draw:style-name="gr25" draw:text-style-name="P25" draw:layer="layout" svg:width="0.047cm" svg:height="0.005cm" svg:x="28.015cm" svg:y="7.425cm" svg:viewBox="0 0 48 6" draw:points="0,0 48,0 48,6 0,6">
          <text:p/>
        </draw:polygon>
        <draw:polygon draw:style-name="gr25" draw:text-style-name="P25" draw:layer="layout" svg:width="0.047cm" svg:height="0.007cm" svg:x="28.082cm" svg:y="7.423cm" svg:viewBox="0 0 48 8" draw:points="0,0 48,0 48,8 0,8">
          <text:p/>
        </draw:polygon>
        <draw:polygon draw:style-name="gr36" draw:text-style-name="P32" draw:layer="layout" svg:width="0.047cm" svg:height="0.241cm" svg:x="22.905cm" svg:y="7.189cm" svg:viewBox="0 0 48 242" draw:points="0,0 48,0 48,242 0,242">
          <text:p/>
        </draw:polygon>
        <draw:polygon draw:style-name="gr11" draw:text-style-name="P11" draw:layer="layout" svg:width="0.047cm" svg:height="0.029cm" svg:x="23.376cm" svg:y="7.401cm" svg:viewBox="0 0 48 30" draw:points="0,0 48,0 48,30 0,30">
          <text:p/>
        </draw:polygon>
        <draw:polygon draw:style-name="gr11" draw:text-style-name="P11" draw:layer="layout" svg:width="0.047cm" svg:height="0.021cm" svg:x="23.443cm" svg:y="7.409cm" svg:viewBox="0 0 48 22" draw:points="0,0 48,0 48,22 0,22">
          <text:p/>
        </draw:polygon>
        <draw:polygon draw:style-name="gr11" draw:text-style-name="P11" draw:layer="layout" svg:width="0.047cm" svg:height="0.033cm" svg:x="23.51cm" svg:y="7.397cm" svg:viewBox="0 0 48 34" draw:points="0,0 48,0 48,34 0,34">
          <text:p/>
        </draw:polygon>
        <draw:polygon draw:style-name="gr11" draw:text-style-name="P11" draw:layer="layout" svg:width="0.047cm" svg:height="0.212cm" svg:x="23.981cm" svg:y="7.218cm" svg:viewBox="0 0 48 213" draw:points="0,0 48,0 48,213 0,213">
          <text:p/>
        </draw:polygon>
        <draw:polygon draw:style-name="gr11" draw:text-style-name="P11" draw:layer="layout" svg:width="0.047cm" svg:height="0.19cm" svg:x="24.048cm" svg:y="7.24cm" svg:viewBox="0 0 48 191" draw:points="0,0 48,0 48,191 0,191">
          <text:p/>
        </draw:polygon>
        <draw:polygon draw:style-name="gr11" draw:text-style-name="P11" draw:layer="layout" svg:width="0.048cm" svg:height="0.162cm" svg:x="24.115cm" svg:y="7.268cm" svg:viewBox="0 0 49 163" draw:points="0,0 49,0 49,163 0,163">
          <text:p/>
        </draw:polygon>
        <draw:polygon draw:style-name="gr11" draw:text-style-name="P11" draw:layer="layout" svg:width="0.047cm" svg:height="0.563cm" svg:x="24.586cm" svg:y="6.867cm" svg:viewBox="0 0 48 564" draw:points="0,0 48,0 48,564 0,564">
          <text:p/>
        </draw:polygon>
        <draw:polygon draw:style-name="gr11" draw:text-style-name="P11" draw:layer="layout" svg:width="0.047cm" svg:height="0.489cm" svg:x="24.653cm" svg:y="6.941cm" svg:viewBox="0 0 48 490" draw:points="0,0 48,0 48,490 0,490">
          <text:p/>
        </draw:polygon>
        <draw:polygon draw:style-name="gr11" draw:text-style-name="P11" draw:layer="layout" svg:width="0.047cm" svg:height="0.362cm" svg:x="24.721cm" svg:y="7.068cm" svg:viewBox="0 0 48 363" draw:points="0,0 48,0 48,363 0,363">
          <text:p/>
        </draw:polygon>
        <draw:polygon draw:style-name="gr13" draw:text-style-name="P13" draw:layer="layout" svg:width="0.047cm" svg:height="0.005cm" svg:x="25.527cm" svg:y="7.425cm" svg:viewBox="0 0 48 6" draw:points="0,0 48,0 48,6 0,6">
          <text:p/>
        </draw:polygon>
        <draw:polygon draw:style-name="gr13" draw:text-style-name="P13" draw:layer="layout" svg:width="0.047cm" svg:height="0.003cm" svg:x="25.595cm" svg:y="7.427cm" svg:viewBox="0 0 48 4" draw:points="0,0 48,0 48,4 0,4">
          <text:p/>
        </draw:polygon>
        <draw:polygon draw:style-name="gr13" draw:text-style-name="P13" draw:layer="layout" svg:width="0.047cm" svg:height="0.027cm" svg:x="25.662cm" svg:y="7.403cm" svg:viewBox="0 0 48 28" draw:points="0,0 48,0 48,28 0,28">
          <text:p/>
        </draw:polygon>
        <draw:polygon draw:style-name="gr13" draw:text-style-name="P13" draw:layer="layout" svg:width="0.047cm" svg:height="0.111cm" svg:x="26.132cm" svg:y="7.319cm" svg:viewBox="0 0 48 112" draw:points="0,0 48,0 48,112 0,112">
          <text:p/>
        </draw:polygon>
        <draw:polygon draw:style-name="gr13" draw:text-style-name="P13" draw:layer="layout" svg:width="0.047cm" svg:height="0.101cm" svg:x="26.2cm" svg:y="7.329cm" svg:viewBox="0 0 48 102" draw:points="0,0 48,0 48,102 0,102">
          <text:p/>
        </draw:polygon>
        <draw:polygon draw:style-name="gr13" draw:text-style-name="P13" draw:layer="layout" svg:width="0.047cm" svg:height="0.158cm" svg:x="26.267cm" svg:y="7.272cm" svg:viewBox="0 0 48 159" draw:points="0,0 48,0 48,159 0,159">
          <text:p/>
        </draw:polygon>
        <draw:polygon draw:style-name="gr13" draw:text-style-name="P13" draw:layer="layout" svg:width="0.047cm" svg:height="0.146cm" svg:x="26.738cm" svg:y="7.284cm" svg:viewBox="0 0 48 147" draw:points="0,0 48,0 48,147 0,147">
          <text:p/>
        </draw:polygon>
        <draw:polygon draw:style-name="gr13" draw:text-style-name="P13" draw:layer="layout" svg:width="0.047cm" svg:height="0.168cm" svg:x="26.805cm" svg:y="7.262cm" svg:viewBox="0 0 48 169" draw:points="0,0 48,0 48,169 0,169">
          <text:p/>
        </draw:polygon>
        <draw:polygon draw:style-name="gr13" draw:text-style-name="P13" draw:layer="layout" svg:width="0.047cm" svg:height="0.185cm" svg:x="26.872cm" svg:y="7.245cm" svg:viewBox="0 0 48 186" draw:points="0,0 48,0 48,186 0,186">
          <text:p/>
        </draw:polygon>
        <draw:polygon draw:style-name="gr20" draw:text-style-name="P20" draw:layer="layout" svg:width="0.047cm" svg:height="0.068cm" svg:x="27.612cm" svg:y="7.362cm" svg:viewBox="0 0 48 69" draw:points="0,0 48,0 48,69 0,69">
          <text:p/>
        </draw:polygon>
        <draw:polygon draw:style-name="gr20" draw:text-style-name="P20" draw:layer="layout" svg:width="0.047cm" svg:height="0.366cm" svg:x="27.679cm" svg:y="7.064cm" svg:viewBox="0 0 48 367" draw:points="0,0 48,0 48,367 0,367">
          <text:p/>
        </draw:polygon>
        <draw:polygon draw:style-name="gr20" draw:text-style-name="P20" draw:layer="layout" svg:width="0.047cm" svg:height="0.098cm" svg:x="27.343cm" svg:y="7.332cm" svg:viewBox="0 0 48 99" draw:points="0,0 48,0 48,99 0,99">
          <text:p/>
        </draw:polygon>
        <draw:polygon draw:style-name="gr20" draw:text-style-name="P20" draw:layer="layout" svg:width="0.047cm" svg:height="0.02cm" svg:x="27.477cm" svg:y="7.41cm" svg:viewBox="0 0 48 21" draw:points="0,0 48,0 48,21 0,21">
          <text:p/>
        </draw:polygon>
        <draw:polygon draw:style-name="gr20" draw:text-style-name="P20" draw:layer="layout" svg:width="0.047cm" svg:height="0.11cm" svg:x="27.41cm" svg:y="7.32cm" svg:viewBox="0 0 48 111" draw:points="0,0 48,0 48,111 0,111">
          <text:p/>
        </draw:polygon>
        <draw:polygon draw:style-name="gr20" draw:text-style-name="P20" draw:layer="layout" svg:width="0.047cm" svg:height="0.011cm" svg:x="27.544cm" svg:y="7.42cm" svg:viewBox="0 0 48 12" draw:points="0,0 48,0 48,12 0,12">
          <text:p/>
        </draw:polygon>
        <draw:polygon draw:style-name="gr12" draw:text-style-name="P12" draw:layer="layout" svg:width="0.047cm" svg:height="0.036cm" svg:x="24.922cm" svg:y="7.394cm" svg:viewBox="0 0 48 37" draw:points="0,0 48,0 48,37 0,37">
          <text:p/>
        </draw:polygon>
        <draw:polygon draw:style-name="gr12" draw:text-style-name="P12" draw:layer="layout" svg:width="0.047cm" svg:height="0.086cm" svg:x="24.99cm" svg:y="7.344cm" svg:viewBox="0 0 48 87" draw:points="0,0 48,0 48,87 0,87">
          <text:p/>
        </draw:polygon>
        <draw:polygon draw:style-name="gr12" draw:text-style-name="P12" draw:layer="layout" svg:width="0.047cm" svg:height="0.176cm" svg:x="25.057cm" svg:y="7.254cm" svg:viewBox="0 0 48 177" draw:points="0,0 48,0 48,177 0,177">
          <text:p/>
        </draw:polygon>
        <draw:polygon draw:style-name="gr38" draw:text-style-name="P32" draw:layer="layout" svg:width="0.672cm" svg:height="0.228cm" svg:x="22.29cm" svg:y="5.146cm" svg:viewBox="0 0 673 229" draw:points="0,0 673,0 673,229 0,229">
          <text:p/>
        </draw:polygon>
        <draw:polygon draw:style-name="gr39" draw:text-style-name="P34" draw:layer="layout" svg:width="0.605cm" svg:height="0.228cm" svg:x="22.962cm" svg:y="5.146cm" svg:viewBox="0 0 606 229" draw:points="0,0 606,0 606,229 0,229">
          <text:p/>
        </draw:polygon>
        <draw:polygon draw:style-name="gr40" draw:text-style-name="P2" draw:layer="layout" svg:width="0.605cm" svg:height="0.228cm" svg:x="22.962cm" svg:y="5.146cm" svg:viewBox="0 0 606 229" draw:points="0,0 606,0 606,229 0,229">
          <text:p/>
        </draw:polygon>
        <draw:polygon draw:style-name="gr11" draw:text-style-name="P11" draw:layer="layout" svg:width="0.606cm" svg:height="0.228cm" svg:x="23.567cm" svg:y="5.146cm" svg:viewBox="0 0 607 229" draw:points="0,0 607,0 607,229 0,229">
          <text:p/>
        </draw:polygon>
        <draw:polygon draw:style-name="gr40" draw:text-style-name="P2" draw:layer="layout" svg:width="0.606cm" svg:height="0.228cm" svg:x="23.567cm" svg:y="5.146cm" svg:viewBox="0 0 607 229" draw:points="0,0 607,0 607,229 0,229">
          <text:p/>
        </draw:polygon>
        <draw:polygon draw:style-name="gr41" draw:text-style-name="P35" draw:layer="layout" svg:width="0.605cm" svg:height="0.228cm" svg:x="24.173cm" svg:y="5.146cm" svg:viewBox="0 0 606 229" draw:points="0,0 606,0 606,229 0,229">
          <text:p/>
        </draw:polygon>
        <draw:polygon draw:style-name="gr12" draw:text-style-name="P12" draw:layer="layout" svg:width="0.336cm" svg:height="0.228cm" svg:x="24.778cm" svg:y="5.146cm" svg:viewBox="0 0 337 229" draw:points="0,0 337,0 337,229 0,229">
          <text:p/>
        </draw:polygon>
        <draw:polygon draw:style-name="gr40" draw:text-style-name="P2" draw:layer="layout" svg:width="0.336cm" svg:height="0.228cm" svg:x="24.778cm" svg:y="5.146cm" svg:viewBox="0 0 337 229" draw:points="0,0 337,0 337,229 0,229">
          <text:p/>
        </draw:polygon>
        <draw:polygon draw:style-name="gr42" draw:text-style-name="P36" draw:layer="layout" svg:width="0.605cm" svg:height="0.228cm" svg:x="25.114cm" svg:y="5.146cm" svg:viewBox="0 0 606 229" draw:points="0,0 606,0 606,229 0,229">
          <text:p/>
        </draw:polygon>
        <draw:polygon draw:style-name="gr40" draw:text-style-name="P2" draw:layer="layout" svg:width="0.605cm" svg:height="0.228cm" svg:x="25.114cm" svg:y="5.146cm" svg:viewBox="0 0 606 229" draw:points="0,0 606,0 606,229 0,229">
          <text:p/>
        </draw:polygon>
        <draw:polygon draw:style-name="gr13" draw:text-style-name="P13" draw:layer="layout" svg:width="0.605cm" svg:height="0.228cm" svg:x="25.719cm" svg:y="5.146cm" svg:viewBox="0 0 606 229" draw:points="0,0 606,0 606,229 0,229">
          <text:p/>
        </draw:polygon>
        <draw:polygon draw:style-name="gr40" draw:text-style-name="P2" draw:layer="layout" svg:width="0.605cm" svg:height="0.228cm" svg:x="25.719cm" svg:y="5.146cm" svg:viewBox="0 0 606 229" draw:points="0,0 606,0 606,229 0,229">
          <text:p/>
        </draw:polygon>
        <draw:polygon draw:style-name="gr43" draw:text-style-name="P37" draw:layer="layout" svg:width="0.605cm" svg:height="0.228cm" svg:x="26.324cm" svg:y="5.146cm" svg:viewBox="0 0 606 229" draw:points="0,0 606,0 606,229 0,229">
          <text:p/>
        </draw:polygon>
        <draw:polygon draw:style-name="gr37" draw:text-style-name="P33" draw:layer="layout" svg:width="0.404cm" svg:height="0.228cm" svg:x="26.929cm" svg:y="5.146cm" svg:viewBox="0 0 405 229" draw:points="0,0 405,0 405,229 0,229">
          <text:p/>
        </draw:polygon>
        <draw:polygon draw:style-name="gr40" draw:text-style-name="P2" draw:layer="layout" svg:width="0.404cm" svg:height="0.228cm" svg:x="26.929cm" svg:y="5.146cm" svg:viewBox="0 0 405 229" draw:points="0,0 405,0 405,229 0,229">
          <text:p/>
        </draw:polygon>
        <draw:polygon draw:style-name="gr44" draw:text-style-name="P20" draw:layer="layout" svg:width="0.403cm" svg:height="0.228cm" svg:x="27.333cm" svg:y="5.146cm" svg:viewBox="0 0 404 229" draw:points="0,0 404,0 404,229 0,229">
          <text:p/>
        </draw:polygon>
        <draw:polygon draw:style-name="gr25" draw:text-style-name="P25" draw:layer="layout" svg:width="0.471cm" svg:height="0.228cm" svg:x="27.736cm" svg:y="5.146cm" svg:viewBox="0 0 472 229" draw:points="0,0 472,0 472,229 0,229">
          <text:p/>
        </draw:polygon>
        <draw:polygon draw:style-name="gr40" draw:text-style-name="P2" draw:layer="layout" svg:width="0.471cm" svg:height="0.228cm" svg:x="27.736cm" svg:y="5.146cm" svg:viewBox="0 0 472 229" draw:points="0,0 472,0 472,229 0,229">
          <text:p/>
        </draw:polygon>
        <draw:line draw:style-name="gr45" draw:text-style-name="P2" draw:layer="layout" svg:x1="22.283cm" svg:y1="7.43cm" svg:x2="22.283cm" svg:y2="5.146cm">
          <text:p/>
        </draw:line>
        <draw:line draw:style-name="gr45" draw:text-style-name="P2" draw:layer="layout" svg:x1="22.283cm" svg:y1="7.43cm" svg:x2="28.213cm" svg:y2="7.43cm">
          <text:p/>
        </draw:line>
        <draw:polygon draw:style-name="gr4" draw:text-style-name="P4" draw:layer="layout" svg:width="5.557cm" svg:height="2.284cm" svg:x="22.478cm" svg:y="11.432cm" svg:viewBox="0 0 5558 2285" draw:points="0,0 5558,0 5558,2285 0,2285">
          <text:p/>
        </draw:polygon>
        <draw:polygon draw:style-name="gr26" draw:text-style-name="P26" draw:layer="layout" svg:width="0.022cm" svg:height="0.032cm" svg:x="23.26cm" svg:y="13.623cm" svg:viewBox="0 0 23 33" draw:points="0,0 23,0 23,33 0,33">
          <text:p/>
        </draw:polygon>
        <draw:polygon draw:style-name="gr26" draw:text-style-name="P26" draw:layer="layout" svg:width="0.021cm" svg:height="0.003cm" svg:x="23.291cm" svg:y="13.653cm" svg:viewBox="0 0 22 4" draw:points="0,0 22,0 22,4 0,4">
          <text:p/>
        </draw:polygon>
        <draw:polygon draw:style-name="gr26" draw:text-style-name="P26" draw:layer="layout" svg:width="0.022cm" svg:height="0.005cm" svg:x="23.321cm" svg:y="13.651cm" svg:viewBox="0 0 23 6" draw:points="0,0 23,0 23,6 0,6">
          <text:p/>
        </draw:polygon>
        <draw:polygon draw:style-name="gr26" draw:text-style-name="P26" draw:layer="layout" svg:width="0.021cm" svg:height="0.281cm" svg:x="22.53cm" svg:y="13.374cm" svg:viewBox="0 0 22 282" draw:points="0,0 22,0 22,282 0,282">
          <text:p/>
        </draw:polygon>
        <draw:polygon draw:style-name="gr26" draw:text-style-name="P26" draw:layer="layout" svg:width="0.022cm" svg:height="0.014cm" svg:x="22.56cm" svg:y="13.641cm" svg:viewBox="0 0 23 15" draw:points="0,0 23,0 23,15 0,15">
          <text:p/>
        </draw:polygon>
        <draw:polygon draw:style-name="gr26" draw:text-style-name="P26" draw:layer="layout" svg:width="0.021cm" svg:height="0.216cm" svg:x="22.591cm" svg:y="13.439cm" svg:viewBox="0 0 22 217" draw:points="0,0 22,0 22,217 0,217">
          <text:p/>
        </draw:polygon>
        <draw:polygon draw:style-name="gr26" draw:text-style-name="P26" draw:layer="layout" svg:width="0.022cm" svg:height="0.018cm" svg:x="22.621cm" svg:y="13.637cm" svg:viewBox="0 0 23 19" draw:points="0,0 23,0 23,19 0,19">
          <text:p/>
        </draw:polygon>
        <draw:polygon draw:style-name="gr26" draw:text-style-name="P26" draw:layer="layout" svg:width="0.021cm" svg:height="0.005cm" svg:x="22.652cm" svg:y="13.65cm" svg:viewBox="0 0 22 6" draw:points="0,0 22,0 22,6 0,6">
          <text:p/>
        </draw:polygon>
        <draw:polygon draw:style-name="gr26" draw:text-style-name="P26" draw:layer="layout" svg:width="0.021cm" svg:height="0.108cm" svg:x="22.682cm" svg:y="13.547cm" svg:viewBox="0 0 22 109" draw:points="0,0 22,0 22,109 0,109">
          <text:p/>
        </draw:polygon>
        <draw:polygon draw:style-name="gr26" draw:text-style-name="P26" draw:layer="layout" svg:width="0.021cm" svg:height="0.029cm" svg:x="22.713cm" svg:y="13.626cm" svg:viewBox="0 0 22 30" draw:points="0,0 22,0 22,30 0,30">
          <text:p/>
        </draw:polygon>
        <draw:polygon draw:style-name="gr26" draw:text-style-name="P26" draw:layer="layout" svg:width="0.021cm" svg:height="0.006cm" svg:x="22.743cm" svg:y="13.649cm" svg:viewBox="0 0 22 7" draw:points="0,0 22,0 22,7 0,7">
          <text:p/>
        </draw:polygon>
        <draw:polygon draw:style-name="gr26" draw:text-style-name="P26" draw:layer="layout" svg:width="0.022cm" svg:height="0.046cm" svg:x="22.773cm" svg:y="13.609cm" svg:viewBox="0 0 23 47" draw:points="0,0 23,0 23,47 0,47">
          <text:p/>
        </draw:polygon>
        <draw:polygon draw:style-name="gr26" draw:text-style-name="P26" draw:layer="layout" svg:width="0.021cm" svg:height="0.016cm" svg:x="22.804cm" svg:y="13.639cm" svg:viewBox="0 0 22 17" draw:points="0,0 22,0 22,17 0,17">
          <text:p/>
        </draw:polygon>
        <draw:polygon draw:style-name="gr26" draw:text-style-name="P26" draw:layer="layout" svg:width="0.022cm" svg:height="0.006cm" svg:x="22.834cm" svg:y="13.649cm" svg:viewBox="0 0 23 7" draw:points="0,0 23,0 23,7 0,7">
          <text:p/>
        </draw:polygon>
        <draw:polygon draw:style-name="gr26" draw:text-style-name="P26" draw:layer="layout" svg:width="0.021cm" svg:height="0.026cm" svg:x="22.865cm" svg:y="13.629cm" svg:viewBox="0 0 22 27" draw:points="0,0 22,0 22,27 0,27">
          <text:p/>
        </draw:polygon>
        <draw:polygon draw:style-name="gr26" draw:text-style-name="P26" draw:layer="layout" svg:width="0.022cm" svg:height="0.031cm" svg:x="22.895cm" svg:y="13.624cm" svg:viewBox="0 0 23 32" draw:points="0,0 23,0 23,32 0,32">
          <text:p/>
        </draw:polygon>
        <draw:polygon draw:style-name="gr26" draw:text-style-name="P26" draw:layer="layout" svg:width="0.021cm" svg:height="0.012cm" svg:x="22.926cm" svg:y="13.644cm" svg:viewBox="0 0 22 13" draw:points="0,0 22,0 22,13 0,13">
          <text:p/>
        </draw:polygon>
        <draw:polygon draw:style-name="gr26" draw:text-style-name="P26" draw:layer="layout" svg:width="0.021cm" svg:height="0.031cm" svg:x="22.956cm" svg:y="13.624cm" svg:viewBox="0 0 22 32" draw:points="0,0 22,0 22,32 0,32">
          <text:p/>
        </draw:polygon>
        <draw:polygon draw:style-name="gr26" draw:text-style-name="P26" draw:layer="layout" svg:width="0.022cm" svg:height="0.047cm" svg:x="22.987cm" svg:y="13.608cm" svg:viewBox="0 0 23 48" draw:points="0,0 23,0 23,48 0,48">
          <text:p/>
        </draw:polygon>
        <draw:polygon draw:style-name="gr26" draw:text-style-name="P26" draw:layer="layout" svg:width="0.021cm" svg:height="0.003cm" svg:x="23.017cm" svg:y="13.653cm" svg:viewBox="0 0 22 4" draw:points="0,0 22,0 22,4 0,4">
          <text:p/>
        </draw:polygon>
        <draw:polygon draw:style-name="gr26" draw:text-style-name="P26" draw:layer="layout" svg:width="0.023cm" svg:height="0.017cm" svg:x="23.047cm" svg:y="13.638cm" svg:viewBox="0 0 24 18" draw:points="0,0 24,0 24,18 0,18">
          <text:p/>
        </draw:polygon>
        <draw:polygon draw:style-name="gr26" draw:text-style-name="P26" draw:layer="layout" svg:width="0.021cm" svg:height="0.02cm" svg:x="23.078cm" svg:y="13.635cm" svg:viewBox="0 0 22 21" draw:points="0,0 22,0 22,21 0,21">
          <text:p/>
        </draw:polygon>
        <draw:polygon draw:style-name="gr26" draw:text-style-name="P26" draw:layer="layout" svg:width="0.022cm" svg:height="0.003cm" svg:x="23.108cm" svg:y="13.653cm" svg:viewBox="0 0 23 4" draw:points="0,0 23,0 23,4 0,4">
          <text:p/>
        </draw:polygon>
        <draw:polygon draw:style-name="gr26" draw:text-style-name="P26" draw:layer="layout" svg:width="0.021cm" svg:height="0.005cm" svg:x="23.139cm" svg:y="13.651cm" svg:viewBox="0 0 22 6" draw:points="0,0 22,0 22,6 0,6">
          <text:p/>
        </draw:polygon>
        <draw:polygon draw:style-name="gr26" draw:text-style-name="P26" draw:layer="layout" svg:width="0.021cm" svg:height="0.012cm" svg:x="23.169cm" svg:y="13.643cm" svg:viewBox="0 0 22 13" draw:points="0,0 22,0 22,13 0,13">
          <text:p/>
        </draw:polygon>
        <draw:polygon draw:style-name="gr26" draw:text-style-name="P26" draw:layer="layout" svg:width="0.021cm" svg:height="0.003cm" svg:x="23.2cm" svg:y="13.653cm" svg:viewBox="0 0 22 4" draw:points="0,0 22,0 22,4 0,4">
          <text:p/>
        </draw:polygon>
        <draw:polygon draw:style-name="gr26" draw:text-style-name="P26" draw:layer="layout" svg:width="0.021cm" svg:height="0.006cm" svg:x="23.23cm" svg:y="13.649cm" svg:viewBox="0 0 22 7" draw:points="0,0 22,0 22,7 0,7">
          <text:p/>
        </draw:polygon>
        <draw:polygon draw:style-name="gr27" draw:text-style-name="P27" draw:layer="layout" svg:width="0.021cm" svg:height="1.437cm" svg:x="25.726cm" svg:y="12.218cm" svg:viewBox="0 0 22 1438" draw:points="0,0 22,0 22,1438 0,1438">
          <text:p/>
        </draw:polygon>
        <draw:polygon draw:style-name="gr27" draw:text-style-name="P27" draw:layer="layout" svg:width="0.021cm" svg:height="1.185cm" svg:x="25.756cm" svg:y="12.47cm" svg:viewBox="0 0 22 1186" draw:points="0,0 22,0 22,1186 0,1186">
          <text:p/>
        </draw:polygon>
        <draw:polygon draw:style-name="gr27" draw:text-style-name="P27" draw:layer="layout" svg:width="0.021cm" svg:height="0.644cm" svg:x="25.787cm" svg:y="13.011cm" svg:viewBox="0 0 22 645" draw:points="0,0 22,0 22,645 0,645">
          <text:p/>
        </draw:polygon>
        <draw:polygon draw:style-name="gr27" draw:text-style-name="P27" draw:layer="layout" svg:width="0.021cm" svg:height="0.11cm" svg:x="24.995cm" svg:y="13.545cm" svg:viewBox="0 0 22 111" draw:points="0,0 22,0 22,111 0,111">
          <text:p/>
        </draw:polygon>
        <draw:polygon draw:style-name="gr27" draw:text-style-name="P27" draw:layer="layout" svg:width="0.021cm" svg:height="0.088cm" svg:x="25.026cm" svg:y="13.567cm" svg:viewBox="0 0 22 89" draw:points="0,0 22,0 22,89 0,89">
          <text:p/>
        </draw:polygon>
        <draw:polygon draw:style-name="gr27" draw:text-style-name="P27" draw:layer="layout" svg:width="0.021cm" svg:height="0.082cm" svg:x="25.056cm" svg:y="13.573cm" svg:viewBox="0 0 22 83" draw:points="0,0 22,0 22,83 0,83">
          <text:p/>
        </draw:polygon>
        <draw:polygon draw:style-name="gr27" draw:text-style-name="P27" draw:layer="layout" svg:width="0.021cm" svg:height="0.064cm" svg:x="25.087cm" svg:y="13.591cm" svg:viewBox="0 0 22 65" draw:points="0,0 22,0 22,65 0,65">
          <text:p/>
        </draw:polygon>
        <draw:polygon draw:style-name="gr27" draw:text-style-name="P27" draw:layer="layout" svg:width="0.021cm" svg:height="0.057cm" svg:x="25.117cm" svg:y="13.598cm" svg:viewBox="0 0 22 58" draw:points="0,0 22,0 22,58 0,58">
          <text:p/>
        </draw:polygon>
        <draw:polygon draw:style-name="gr27" draw:text-style-name="P27" draw:layer="layout" svg:width="0.023cm" svg:height="0.037cm" svg:x="25.147cm" svg:y="13.618cm" svg:viewBox="0 0 24 38" draw:points="0,0 24,0 24,38 0,38">
          <text:p/>
        </draw:polygon>
        <draw:polygon draw:style-name="gr27" draw:text-style-name="P27" draw:layer="layout" svg:width="0.021cm" svg:height="0.093cm" svg:x="25.178cm" svg:y="13.562cm" svg:viewBox="0 0 22 94" draw:points="0,0 22,0 22,94 0,94">
          <text:p/>
        </draw:polygon>
        <draw:polygon draw:style-name="gr27" draw:text-style-name="P27" draw:layer="layout" svg:width="0.022cm" svg:height="0.031cm" svg:x="25.208cm" svg:y="13.624cm" svg:viewBox="0 0 23 32" draw:points="0,0 23,0 23,32 0,32">
          <text:p/>
        </draw:polygon>
        <draw:polygon draw:style-name="gr27" draw:text-style-name="P27" draw:layer="layout" svg:width="0.021cm" svg:height="0.031cm" svg:x="25.239cm" svg:y="13.624cm" svg:viewBox="0 0 22 32" draw:points="0,0 22,0 22,32 0,32">
          <text:p/>
        </draw:polygon>
        <draw:polygon draw:style-name="gr27" draw:text-style-name="P27" draw:layer="layout" svg:width="0.021cm" svg:height="0.126cm" svg:x="25.269cm" svg:y="13.529cm" svg:viewBox="0 0 22 127" draw:points="0,0 22,0 22,127 0,127">
          <text:p/>
        </draw:polygon>
        <draw:polygon draw:style-name="gr27" draw:text-style-name="P27" draw:layer="layout" svg:width="0.021cm" svg:height="0.089cm" svg:x="25.3cm" svg:y="13.566cm" svg:viewBox="0 0 22 90" draw:points="0,0 22,0 22,90 0,90">
          <text:p/>
        </draw:polygon>
        <draw:polygon draw:style-name="gr27" draw:text-style-name="P27" draw:layer="layout" svg:width="0.021cm" svg:height="0.083cm" svg:x="25.33cm" svg:y="13.572cm" svg:viewBox="0 0 22 84" draw:points="0,0 22,0 22,84 0,84">
          <text:p/>
        </draw:polygon>
        <draw:polygon draw:style-name="gr27" draw:text-style-name="P27" draw:layer="layout" svg:width="0.022cm" svg:height="0.289cm" svg:x="25.36cm" svg:y="13.366cm" svg:viewBox="0 0 23 290" draw:points="0,0 23,0 23,290 0,290">
          <text:p/>
        </draw:polygon>
        <draw:polygon draw:style-name="gr27" draw:text-style-name="P27" draw:layer="layout" svg:width="0.021cm" svg:height="0.167cm" svg:x="25.391cm" svg:y="13.488cm" svg:viewBox="0 0 22 168" draw:points="0,0 22,0 22,168 0,168">
          <text:p/>
        </draw:polygon>
        <draw:polygon draw:style-name="gr27" draw:text-style-name="P27" draw:layer="layout" svg:width="0.022cm" svg:height="0.086cm" svg:x="25.421cm" svg:y="13.569cm" svg:viewBox="0 0 23 87" draw:points="0,0 23,0 23,87 0,87">
          <text:p/>
        </draw:polygon>
        <draw:polygon draw:style-name="gr27" draw:text-style-name="P27" draw:layer="layout" svg:width="0.021cm" svg:height="0.529cm" svg:x="25.452cm" svg:y="13.126cm" svg:viewBox="0 0 22 530" draw:points="0,0 22,0 22,530 0,530">
          <text:p/>
        </draw:polygon>
        <draw:polygon draw:style-name="gr27" draw:text-style-name="P27" draw:layer="layout" svg:width="0.021cm" svg:height="0.265cm" svg:x="25.482cm" svg:y="13.39cm" svg:viewBox="0 0 22 266" draw:points="0,0 22,0 22,266 0,266">
          <text:p/>
        </draw:polygon>
        <draw:polygon draw:style-name="gr27" draw:text-style-name="P27" draw:layer="layout" svg:width="0.021cm" svg:height="0.158cm" svg:x="25.513cm" svg:y="13.497cm" svg:viewBox="0 0 22 159" draw:points="0,0 22,0 22,159 0,159">
          <text:p/>
        </draw:polygon>
        <draw:polygon draw:style-name="gr27" draw:text-style-name="P27" draw:layer="layout" svg:width="0.021cm" svg:height="0.596cm" svg:x="25.543cm" svg:y="13.059cm" svg:viewBox="0 0 22 597" draw:points="0,0 22,0 22,597 0,597">
          <text:p/>
        </draw:polygon>
        <draw:polygon draw:style-name="gr27" draw:text-style-name="P27" draw:layer="layout" svg:width="0.022cm" svg:height="0.484cm" svg:x="25.573cm" svg:y="13.171cm" svg:viewBox="0 0 23 485" draw:points="0,0 23,0 23,485 0,485">
          <text:p/>
        </draw:polygon>
        <draw:polygon draw:style-name="gr27" draw:text-style-name="P27" draw:layer="layout" svg:width="0.021cm" svg:height="0.363cm" svg:x="25.604cm" svg:y="13.292cm" svg:viewBox="0 0 22 364" draw:points="0,0 22,0 22,364 0,364">
          <text:p/>
        </draw:polygon>
        <draw:polygon draw:style-name="gr27" draw:text-style-name="P27" draw:layer="layout" svg:width="0.022cm" svg:height="0.908cm" svg:x="25.634cm" svg:y="12.747cm" svg:viewBox="0 0 23 909" draw:points="0,0 23,0 23,909 0,909">
          <text:p/>
        </draw:polygon>
        <draw:polygon draw:style-name="gr27" draw:text-style-name="P27" draw:layer="layout" svg:width="0.021cm" svg:height="0.66cm" svg:x="25.665cm" svg:y="12.995cm" svg:viewBox="0 0 22 661" draw:points="0,0 22,0 22,661 0,661">
          <text:p/>
        </draw:polygon>
        <draw:polygon draw:style-name="gr27" draw:text-style-name="P27" draw:layer="layout" svg:width="0.022cm" svg:height="0.399cm" svg:x="25.695cm" svg:y="13.256cm" svg:viewBox="0 0 23 400" draw:points="0,0 23,0 23,400 0,400">
          <text:p/>
        </draw:polygon>
        <draw:polygon draw:style-name="gr27" draw:text-style-name="P27" draw:layer="layout" svg:width="0.022cm" svg:height="0.702cm" svg:x="26.547cm" svg:y="12.953cm" svg:viewBox="0 0 23 703" draw:points="0,0 23,0 23,703 0,703">
          <text:p/>
        </draw:polygon>
        <draw:polygon draw:style-name="gr27" draw:text-style-name="P27" draw:layer="layout" svg:width="0.021cm" svg:height="0.879cm" svg:x="26.578cm" svg:y="12.776cm" svg:viewBox="0 0 22 880" draw:points="0,0 22,0 22,880 0,880">
          <text:p/>
        </draw:polygon>
        <draw:polygon draw:style-name="gr27" draw:text-style-name="P27" draw:layer="layout" svg:width="0.022cm" svg:height="0.53cm" svg:x="26.608cm" svg:y="13.125cm" svg:viewBox="0 0 23 531" draw:points="0,0 23,0 23,531 0,531">
          <text:p/>
        </draw:polygon>
        <draw:polygon draw:style-name="gr27" draw:text-style-name="P27" draw:layer="layout" svg:width="0.021cm" svg:height="0.08cm" svg:x="25.817cm" svg:y="13.575cm" svg:viewBox="0 0 22 81" draw:points="0,0 22,0 22,81 0,81">
          <text:p/>
        </draw:polygon>
        <draw:polygon draw:style-name="gr27" draw:text-style-name="P27" draw:layer="layout" svg:width="0.022cm" svg:height="0.03cm" svg:x="25.847cm" svg:y="13.625cm" svg:viewBox="0 0 23 31" draw:points="0,0 23,0 23,31 0,31">
          <text:p/>
        </draw:polygon>
        <draw:polygon draw:style-name="gr27" draw:text-style-name="P27" draw:layer="layout" svg:width="0.021cm" svg:height="0.05cm" svg:x="25.878cm" svg:y="13.605cm" svg:viewBox="0 0 22 51" draw:points="0,0 22,0 22,51 0,51">
          <text:p/>
        </draw:polygon>
        <draw:polygon draw:style-name="gr27" draw:text-style-name="P27" draw:layer="layout" svg:width="0.022cm" svg:height="0.047cm" svg:x="25.908cm" svg:y="13.608cm" svg:viewBox="0 0 23 48" draw:points="0,0 23,0 23,48 0,48">
          <text:p/>
        </draw:polygon>
        <draw:polygon draw:style-name="gr27" draw:text-style-name="P27" draw:layer="layout" svg:width="0.021cm" svg:height="0.034cm" svg:x="25.939cm" svg:y="13.621cm" svg:viewBox="0 0 22 35" draw:points="0,0 22,0 22,35 0,35">
          <text:p/>
        </draw:polygon>
        <draw:polygon draw:style-name="gr27" draw:text-style-name="P27" draw:layer="layout" svg:width="0.021cm" svg:height="0.056cm" svg:x="25.969cm" svg:y="13.599cm" svg:viewBox="0 0 22 57" draw:points="0,0 22,0 22,57 0,57">
          <text:p/>
        </draw:polygon>
        <draw:polygon draw:style-name="gr27" draw:text-style-name="P27" draw:layer="layout" svg:width="0.021cm" svg:height="0.081cm" svg:x="26cm" svg:y="13.574cm" svg:viewBox="0 0 22 82" draw:points="0,0 22,0 22,82 0,82">
          <text:p/>
        </draw:polygon>
        <draw:polygon draw:style-name="gr27" draw:text-style-name="P27" draw:layer="layout" svg:width="0.021cm" svg:height="0.05cm" svg:x="26.03cm" svg:y="13.605cm" svg:viewBox="0 0 22 51" draw:points="0,0 22,0 22,51 0,51">
          <text:p/>
        </draw:polygon>
        <draw:polygon draw:style-name="gr27" draw:text-style-name="P27" draw:layer="layout" svg:width="0.022cm" svg:height="0.095cm" svg:x="26.06cm" svg:y="13.56cm" svg:viewBox="0 0 23 96" draw:points="0,0 23,0 23,96 0,96">
          <text:p/>
        </draw:polygon>
        <draw:polygon draw:style-name="gr27" draw:text-style-name="P27" draw:layer="layout" svg:width="0.021cm" svg:height="0.106cm" svg:x="26.091cm" svg:y="13.549cm" svg:viewBox="0 0 22 107" draw:points="0,0 22,0 22,107 0,107">
          <text:p/>
        </draw:polygon>
        <draw:polygon draw:style-name="gr27" draw:text-style-name="P27" draw:layer="layout" svg:width="0.022cm" svg:height="0.028cm" svg:x="26.121cm" svg:y="13.627cm" svg:viewBox="0 0 23 29" draw:points="0,0 23,0 23,29 0,29">
          <text:p/>
        </draw:polygon>
        <draw:polygon draw:style-name="gr27" draw:text-style-name="P27" draw:layer="layout" svg:width="0.021cm" svg:height="0.048cm" svg:x="26.152cm" svg:y="13.607cm" svg:viewBox="0 0 22 49" draw:points="0,0 22,0 22,49 0,49">
          <text:p/>
        </draw:polygon>
        <draw:polygon draw:style-name="gr27" draw:text-style-name="P27" draw:layer="layout" svg:width="0.021cm" svg:height="0.093cm" svg:x="26.182cm" svg:y="13.562cm" svg:viewBox="0 0 22 94" draw:points="0,0 22,0 22,94 0,94">
          <text:p/>
        </draw:polygon>
        <draw:polygon draw:style-name="gr27" draw:text-style-name="P27" draw:layer="layout" svg:width="0.021cm" svg:height="0.051cm" svg:x="26.213cm" svg:y="13.604cm" svg:viewBox="0 0 22 52" draw:points="0,0 22,0 22,52 0,52">
          <text:p/>
        </draw:polygon>
        <draw:polygon draw:style-name="gr27" draw:text-style-name="P27" draw:layer="layout" svg:width="0.021cm" svg:height="0.058cm" svg:x="26.243cm" svg:y="13.597cm" svg:viewBox="0 0 22 59" draw:points="0,0 22,0 22,59 0,59">
          <text:p/>
        </draw:polygon>
        <draw:polygon draw:style-name="gr27" draw:text-style-name="P27" draw:layer="layout" svg:width="0.021cm" svg:height="0.115cm" svg:x="26.274cm" svg:y="13.54cm" svg:viewBox="0 0 22 116" draw:points="0,0 22,0 22,116 0,116">
          <text:p/>
        </draw:polygon>
        <draw:polygon draw:style-name="gr27" draw:text-style-name="P27" draw:layer="layout" svg:width="0.021cm" svg:height="0.09cm" svg:x="26.304cm" svg:y="13.565cm" svg:viewBox="0 0 22 91" draw:points="0,0 22,0 22,91 0,91">
          <text:p/>
        </draw:polygon>
        <draw:polygon draw:style-name="gr27" draw:text-style-name="P27" draw:layer="layout" svg:width="0.022cm" svg:height="0.052cm" svg:x="26.334cm" svg:y="13.603cm" svg:viewBox="0 0 23 53" draw:points="0,0 23,0 23,53 0,53">
          <text:p/>
        </draw:polygon>
        <draw:polygon draw:style-name="gr27" draw:text-style-name="P27" draw:layer="layout" svg:width="0.021cm" svg:height="0.318cm" svg:x="26.365cm" svg:y="13.337cm" svg:viewBox="0 0 22 319" draw:points="0,0 22,0 22,319 0,319">
          <text:p/>
        </draw:polygon>
        <draw:polygon draw:style-name="gr27" draw:text-style-name="P27" draw:layer="layout" svg:width="0.021cm" svg:height="0.277cm" svg:x="26.395cm" svg:y="13.378cm" svg:viewBox="0 0 22 278" draw:points="0,0 22,0 22,278 0,278">
          <text:p/>
        </draw:polygon>
        <draw:polygon draw:style-name="gr27" draw:text-style-name="P27" draw:layer="layout" svg:width="0.021cm" svg:height="0.245cm" svg:x="26.426cm" svg:y="13.41cm" svg:viewBox="0 0 22 246" draw:points="0,0 22,0 22,246 0,246">
          <text:p/>
        </draw:polygon>
        <draw:polygon draw:style-name="gr27" draw:text-style-name="P27" draw:layer="layout" svg:width="0.021cm" svg:height="0.497cm" svg:x="26.456cm" svg:y="13.158cm" svg:viewBox="0 0 22 498" draw:points="0,0 22,0 22,498 0,498">
          <text:p/>
        </draw:polygon>
        <draw:polygon draw:style-name="gr27" draw:text-style-name="P27" draw:layer="layout" svg:width="0.021cm" svg:height="0.396cm" svg:x="26.487cm" svg:y="13.259cm" svg:viewBox="0 0 22 397" draw:points="0,0 22,0 22,397 0,397">
          <text:p/>
        </draw:polygon>
        <draw:polygon draw:style-name="gr27" draw:text-style-name="P27" draw:layer="layout" svg:width="0.021cm" svg:height="0.332cm" svg:x="26.517cm" svg:y="13.323cm" svg:viewBox="0 0 22 333" draw:points="0,0 22,0 22,333 0,333">
          <text:p/>
        </draw:polygon>
        <draw:polygon draw:style-name="gr26" draw:text-style-name="P26" draw:layer="layout" svg:width="0.021cm" svg:height="0.015cm" svg:x="24.082cm" svg:y="13.64cm" svg:viewBox="0 0 22 16" draw:points="0,0 22,0 22,16 0,16">
          <text:p/>
        </draw:polygon>
        <draw:polygon draw:style-name="gr26" draw:text-style-name="P26" draw:layer="layout" svg:width="0.021cm" svg:height="0.002cm" svg:x="24.113cm" svg:y="13.653cm" svg:viewBox="0 0 22 3" draw:points="0,0 22,0 22,3 0,3">
          <text:p/>
        </draw:polygon>
        <draw:polygon draw:style-name="gr26" draw:text-style-name="P26" draw:layer="layout" svg:width="0.021cm" svg:height="0.003cm" svg:x="24.143cm" svg:y="13.652cm" svg:viewBox="0 0 22 4" draw:points="0,0 22,0 22,4 0,4">
          <text:p/>
        </draw:polygon>
        <draw:polygon draw:style-name="gr26" draw:text-style-name="P26" draw:layer="layout" svg:width="0.021cm" svg:height="0.105cm" svg:x="23.352cm" svg:y="13.55cm" svg:viewBox="0 0 22 106" draw:points="0,0 22,0 22,106 0,106">
          <text:p/>
        </draw:polygon>
        <draw:polygon draw:style-name="gr26" draw:text-style-name="P26" draw:layer="layout" svg:width="0.021cm" svg:height="0.022cm" svg:x="23.382cm" svg:y="13.633cm" svg:viewBox="0 0 22 23" draw:points="0,0 22,0 22,23 0,23">
          <text:p/>
        </draw:polygon>
        <draw:polygon draw:style-name="gr26" draw:text-style-name="P26" draw:layer="layout" svg:width="0.021cm" svg:height="0.162cm" svg:x="23.413cm" svg:y="13.493cm" svg:viewBox="0 0 22 163" draw:points="0,0 22,0 22,163 0,163">
          <text:p/>
        </draw:polygon>
        <draw:polygon draw:style-name="gr26" draw:text-style-name="P26" draw:layer="layout" svg:width="0.021cm" svg:height="0.099cm" svg:x="23.443cm" svg:y="13.556cm" svg:viewBox="0 0 22 100" draw:points="0,0 22,0 22,100 0,100">
          <text:p/>
        </draw:polygon>
        <draw:polygon draw:style-name="gr26" draw:text-style-name="P26" draw:layer="layout" svg:width="0.022cm" svg:height="0.008cm" svg:x="23.473cm" svg:y="13.647cm" svg:viewBox="0 0 23 9" draw:points="0,0 23,0 23,9 0,9">
          <text:p/>
        </draw:polygon>
        <draw:polygon draw:style-name="gr26" draw:text-style-name="P26" draw:layer="layout" svg:width="0.021cm" svg:height="0.052cm" svg:x="23.504cm" svg:y="13.603cm" svg:viewBox="0 0 22 53" draw:points="0,0 22,0 22,53 0,53">
          <text:p/>
        </draw:polygon>
        <draw:polygon draw:style-name="gr26" draw:text-style-name="P26" draw:layer="layout" svg:width="0.022cm" svg:height="0.046cm" svg:x="23.534cm" svg:y="13.609cm" svg:viewBox="0 0 23 47" draw:points="0,0 23,0 23,47 0,47">
          <text:p/>
        </draw:polygon>
        <draw:polygon draw:style-name="gr26" draw:text-style-name="P26" draw:layer="layout" svg:width="0.021cm" svg:height="0.011cm" svg:x="23.565cm" svg:y="13.644cm" svg:viewBox="0 0 22 12" draw:points="0,0 22,0 22,12 0,12">
          <text:p/>
        </draw:polygon>
        <draw:polygon draw:style-name="gr26" draw:text-style-name="P26" draw:layer="layout" svg:width="0.021cm" svg:height="0.04cm" svg:x="23.595cm" svg:y="13.615cm" svg:viewBox="0 0 22 41" draw:points="0,0 22,0 22,41 0,41">
          <text:p/>
        </draw:polygon>
        <draw:polygon draw:style-name="gr26" draw:text-style-name="P26" draw:layer="layout" svg:width="0.021cm" svg:height="0.013cm" svg:x="23.626cm" svg:y="13.642cm" svg:viewBox="0 0 22 14" draw:points="0,0 22,0 22,14 0,14">
          <text:p/>
        </draw:polygon>
        <draw:polygon draw:style-name="gr26" draw:text-style-name="P26" draw:layer="layout" svg:width="0.021cm" svg:height="0.003cm" svg:x="23.656cm" svg:y="13.652cm" svg:viewBox="0 0 22 4" draw:points="0,0 22,0 22,4 0,4">
          <text:p/>
        </draw:polygon>
        <draw:polygon draw:style-name="gr26" draw:text-style-name="P26" draw:layer="layout" svg:width="0.021cm" svg:height="0.016cm" svg:x="23.687cm" svg:y="13.639cm" svg:viewBox="0 0 22 17" draw:points="0,0 22,0 22,17 0,17">
          <text:p/>
        </draw:polygon>
        <draw:polygon draw:style-name="gr26" draw:text-style-name="P26" draw:layer="layout" svg:width="0.021cm" svg:height="0.012cm" svg:x="23.717cm" svg:y="13.643cm" svg:viewBox="0 0 22 13" draw:points="0,0 22,0 22,13 0,13">
          <text:p/>
        </draw:polygon>
        <draw:polygon draw:style-name="gr26" draw:text-style-name="P26" draw:layer="layout" svg:width="0.022cm" svg:height="0.003cm" svg:x="23.747cm" svg:y="13.652cm" svg:viewBox="0 0 23 4" draw:points="0,0 23,0 23,4 0,4">
          <text:p/>
        </draw:polygon>
        <draw:polygon draw:style-name="gr26" draw:text-style-name="P26" draw:layer="layout" svg:width="0.021cm" svg:height="0.024cm" svg:x="23.778cm" svg:y="13.631cm" svg:viewBox="0 0 22 25" draw:points="0,0 22,0 22,25 0,25">
          <text:p/>
        </draw:polygon>
        <draw:polygon draw:style-name="gr26" draw:text-style-name="P26" draw:layer="layout" svg:width="0.022cm" svg:height="0.005cm" svg:x="23.808cm" svg:y="13.65cm" svg:viewBox="0 0 23 6" draw:points="0,0 23,0 23,6 0,6">
          <text:p/>
        </draw:polygon>
        <draw:polygon draw:style-name="gr26" draw:text-style-name="P26" draw:layer="layout" svg:width="0.021cm" svg:height="0.004cm" svg:x="23.839cm" svg:y="13.652cm" svg:viewBox="0 0 22 5" draw:points="0,0 22,0 22,5 0,5">
          <text:p/>
        </draw:polygon>
        <draw:polygon draw:style-name="gr26" draw:text-style-name="P26" draw:layer="layout" svg:width="0.021cm" svg:height="0.008cm" svg:x="23.869cm" svg:y="13.647cm" svg:viewBox="0 0 22 9" draw:points="0,0 22,0 22,9 0,9">
          <text:p/>
        </draw:polygon>
        <draw:polygon draw:style-name="gr26" draw:text-style-name="P26" draw:layer="layout" svg:width="0.021cm" svg:height="0.003cm" svg:x="23.9cm" svg:y="13.652cm" svg:viewBox="0 0 22 4" draw:points="0,0 22,0 22,4 0,4">
          <text:p/>
        </draw:polygon>
        <draw:polygon draw:style-name="gr26" draw:text-style-name="P26" draw:layer="layout" svg:width="0.021cm" svg:height="0.002cm" svg:x="23.93cm" svg:y="13.653cm" svg:viewBox="0 0 22 3" draw:points="0,0 22,0 22,3 0,3">
          <text:p/>
        </draw:polygon>
        <draw:polygon draw:style-name="gr26" draw:text-style-name="P26" draw:layer="layout" svg:width="0.022cm" svg:height="0.004cm" svg:x="23.96cm" svg:y="13.651cm" svg:viewBox="0 0 23 5" draw:points="0,0 23,0 23,5 0,5">
          <text:p/>
        </draw:polygon>
        <draw:polygon draw:style-name="gr26" draw:text-style-name="P26" draw:layer="layout" svg:width="0.021cm" svg:height="0.012cm" svg:x="23.991cm" svg:y="13.643cm" svg:viewBox="0 0 22 13" draw:points="0,0 22,0 22,13 0,13">
          <text:p/>
        </draw:polygon>
        <draw:polygon draw:style-name="gr26" draw:text-style-name="P26" draw:layer="layout" svg:width="0.022cm" svg:height="0.003cm" svg:x="24.021cm" svg:y="13.653cm" svg:viewBox="0 0 23 4" draw:points="0,0 23,0 23,4 0,4">
          <text:p/>
        </draw:polygon>
        <draw:polygon draw:style-name="gr26" draw:text-style-name="P26" draw:layer="layout" svg:width="0.021cm" svg:height="0.007cm" svg:x="24.052cm" svg:y="13.648cm" svg:viewBox="0 0 22 8" draw:points="0,0 22,0 22,8 0,8">
          <text:p/>
        </draw:polygon>
        <draw:polygon draw:style-name="gr27" draw:text-style-name="P27" draw:layer="layout" svg:width="0.021cm" svg:height="0.483cm" svg:x="27.369cm" svg:y="13.172cm" svg:viewBox="0 0 22 484" draw:points="0,0 22,0 22,484 0,484">
          <text:p/>
        </draw:polygon>
        <draw:polygon draw:style-name="gr27" draw:text-style-name="P27" draw:layer="layout" svg:width="0.021cm" svg:height="0.395cm" svg:x="27.4cm" svg:y="13.26cm" svg:viewBox="0 0 22 396" draw:points="0,0 22,0 22,396 0,396">
          <text:p/>
        </draw:polygon>
        <draw:polygon draw:style-name="gr27" draw:text-style-name="P27" draw:layer="layout" svg:width="0.021cm" svg:height="0.303cm" svg:x="27.43cm" svg:y="13.352cm" svg:viewBox="0 0 22 304" draw:points="0,0 22,0 22,304 0,304">
          <text:p/>
        </draw:polygon>
        <draw:polygon draw:style-name="gr27" draw:text-style-name="P27" draw:layer="layout" svg:width="0.021cm" svg:height="0.054cm" svg:x="26.639cm" svg:y="13.601cm" svg:viewBox="0 0 22 55" draw:points="0,0 22,0 22,55 0,55">
          <text:p/>
        </draw:polygon>
        <draw:polygon draw:style-name="gr27" draw:text-style-name="P27" draw:layer="layout" svg:width="0.021cm" svg:height="0.052cm" svg:x="26.669cm" svg:y="13.603cm" svg:viewBox="0 0 22 53" draw:points="0,0 22,0 22,53 0,53">
          <text:p/>
        </draw:polygon>
        <draw:polygon draw:style-name="gr27" draw:text-style-name="P27" draw:layer="layout" svg:width="0.021cm" svg:height="0.031cm" svg:x="26.7cm" svg:y="13.624cm" svg:viewBox="0 0 22 32" draw:points="0,0 22,0 22,32 0,32">
          <text:p/>
        </draw:polygon>
        <draw:polygon draw:style-name="gr27" draw:text-style-name="P27" draw:layer="layout" svg:width="0.021cm" svg:height="0.072cm" svg:x="26.73cm" svg:y="13.583cm" svg:viewBox="0 0 22 73" draw:points="0,0 22,0 22,73 0,73">
          <text:p/>
        </draw:polygon>
        <draw:polygon draw:style-name="gr27" draw:text-style-name="P27" draw:layer="layout" svg:width="0.022cm" svg:height="0.017cm" svg:x="26.76cm" svg:y="13.638cm" svg:viewBox="0 0 23 18" draw:points="0,0 23,0 23,18 0,18">
          <text:p/>
        </draw:polygon>
        <draw:polygon draw:style-name="gr27" draw:text-style-name="P27" draw:layer="layout" svg:width="0.021cm" svg:height="0.054cm" svg:x="26.791cm" svg:y="13.601cm" svg:viewBox="0 0 22 55" draw:points="0,0 22,0 22,55 0,55">
          <text:p/>
        </draw:polygon>
        <draw:polygon draw:style-name="gr27" draw:text-style-name="P27" draw:layer="layout" svg:width="0.022cm" svg:height="0.052cm" svg:x="26.821cm" svg:y="13.603cm" svg:viewBox="0 0 23 53" draw:points="0,0 23,0 23,53 0,53">
          <text:p/>
        </draw:polygon>
        <draw:polygon draw:style-name="gr27" draw:text-style-name="P27" draw:layer="layout" svg:width="0.021cm" svg:height="0.053cm" svg:x="26.852cm" svg:y="13.602cm" svg:viewBox="0 0 22 54" draw:points="0,0 22,0 22,54 0,54">
          <text:p/>
        </draw:polygon>
        <draw:polygon draw:style-name="gr27" draw:text-style-name="P27" draw:layer="layout" svg:width="0.021cm" svg:height="0.051cm" svg:x="26.882cm" svg:y="13.604cm" svg:viewBox="0 0 22 52" draw:points="0,0 22,0 22,52 0,52">
          <text:p/>
        </draw:polygon>
        <draw:polygon draw:style-name="gr27" draw:text-style-name="P27" draw:layer="layout" svg:width="0.021cm" svg:height="0.083cm" svg:x="26.913cm" svg:y="13.572cm" svg:viewBox="0 0 22 84" draw:points="0,0 22,0 22,84 0,84">
          <text:p/>
        </draw:polygon>
        <draw:polygon draw:style-name="gr27" draw:text-style-name="P27" draw:layer="layout" svg:width="0.021cm" svg:height="0.033cm" svg:x="26.943cm" svg:y="13.622cm" svg:viewBox="0 0 22 34" draw:points="0,0 22,0 22,34 0,34">
          <text:p/>
        </draw:polygon>
        <draw:polygon draw:style-name="gr27" draw:text-style-name="P27" draw:layer="layout" svg:width="0.022cm" svg:height="0.089cm" svg:x="26.973cm" svg:y="13.566cm" svg:viewBox="0 0 23 90" draw:points="0,0 23,0 23,90 0,90">
          <text:p/>
        </draw:polygon>
        <draw:polygon draw:style-name="gr27" draw:text-style-name="P27" draw:layer="layout" svg:width="0.021cm" svg:height="0.096cm" svg:x="27.004cm" svg:y="13.559cm" svg:viewBox="0 0 22 97" draw:points="0,0 22,0 22,97 0,97">
          <text:p/>
        </draw:polygon>
        <draw:polygon draw:style-name="gr27" draw:text-style-name="P27" draw:layer="layout" svg:width="0.022cm" svg:height="0.026cm" svg:x="27.034cm" svg:y="13.629cm" svg:viewBox="0 0 23 27" draw:points="0,0 23,0 23,27 0,27">
          <text:p/>
        </draw:polygon>
        <draw:polygon draw:style-name="gr27" draw:text-style-name="P27" draw:layer="layout" svg:width="0.021cm" svg:height="0.102cm" svg:x="27.065cm" svg:y="13.553cm" svg:viewBox="0 0 22 103" draw:points="0,0 22,0 22,103 0,103">
          <text:p/>
        </draw:polygon>
        <draw:polygon draw:style-name="gr27" draw:text-style-name="P27" draw:layer="layout" svg:width="0.022cm" svg:height="0.09cm" svg:x="27.095cm" svg:y="13.565cm" svg:viewBox="0 0 23 91" draw:points="0,0 23,0 23,91 0,91">
          <text:p/>
        </draw:polygon>
        <draw:polygon draw:style-name="gr27" draw:text-style-name="P27" draw:layer="layout" svg:width="0.021cm" svg:height="0.063cm" svg:x="27.126cm" svg:y="13.592cm" svg:viewBox="0 0 22 64" draw:points="0,0 22,0 22,64 0,64">
          <text:p/>
        </draw:polygon>
        <draw:polygon draw:style-name="gr27" draw:text-style-name="P27" draw:layer="layout" svg:width="0.021cm" svg:height="0.08cm" svg:x="27.156cm" svg:y="13.575cm" svg:viewBox="0 0 22 81" draw:points="0,0 22,0 22,81 0,81">
          <text:p/>
        </draw:polygon>
        <draw:polygon draw:style-name="gr27" draw:text-style-name="P27" draw:layer="layout" svg:width="0.021cm" svg:height="0.118cm" svg:x="27.187cm" svg:y="13.537cm" svg:viewBox="0 0 22 119" draw:points="0,0 22,0 22,119 0,119">
          <text:p/>
        </draw:polygon>
        <draw:polygon draw:style-name="gr27" draw:text-style-name="P27" draw:layer="layout" svg:width="0.021cm" svg:height="0.138cm" svg:x="27.217cm" svg:y="13.517cm" svg:viewBox="0 0 22 139" draw:points="0,0 22,0 22,139 0,139">
          <text:p/>
        </draw:polygon>
        <draw:polygon draw:style-name="gr27" draw:text-style-name="P27" draw:layer="layout" svg:width="0.023cm" svg:height="0.137cm" svg:x="27.247cm" svg:y="13.518cm" svg:viewBox="0 0 24 138" draw:points="0,0 24,0 24,138 0,138">
          <text:p/>
        </draw:polygon>
        <draw:polygon draw:style-name="gr27" draw:text-style-name="P27" draw:layer="layout" svg:width="0.021cm" svg:height="0.244cm" svg:x="27.278cm" svg:y="13.411cm" svg:viewBox="0 0 22 245" draw:points="0,0 22,0 22,245 0,245">
          <text:p/>
        </draw:polygon>
        <draw:polygon draw:style-name="gr27" draw:text-style-name="P27" draw:layer="layout" svg:width="0.022cm" svg:height="0.191cm" svg:x="27.308cm" svg:y="13.464cm" svg:viewBox="0 0 23 192" draw:points="0,0 23,0 23,192 0,192">
          <text:p/>
        </draw:polygon>
        <draw:polygon draw:style-name="gr27" draw:text-style-name="P27" draw:layer="layout" svg:width="0.021cm" svg:height="0.172cm" svg:x="27.339cm" svg:y="13.483cm" svg:viewBox="0 0 22 173" draw:points="0,0 22,0 22,173 0,173">
          <text:p/>
        </draw:polygon>
        <draw:polygon draw:style-name="gr26" draw:text-style-name="P26" draw:layer="layout" svg:width="0.021cm" svg:height="0.015cm" svg:x="24.904cm" svg:y="13.64cm" svg:viewBox="0 0 22 16" draw:points="0,0 22,0 22,16 0,16">
          <text:p/>
        </draw:polygon>
        <draw:polygon draw:style-name="gr26" draw:text-style-name="P26" draw:layer="layout" svg:width="0.022cm" svg:height="0.002cm" svg:x="24.934cm" svg:y="13.653cm" svg:viewBox="0 0 23 3" draw:points="0,0 23,0 23,3 0,3">
          <text:p/>
        </draw:polygon>
        <draw:polygon draw:style-name="gr26" draw:text-style-name="P26" draw:layer="layout" svg:width="0.021cm" svg:height="0.006cm" svg:x="24.965cm" svg:y="13.649cm" svg:viewBox="0 0 22 7" draw:points="0,0 22,0 22,7 0,7">
          <text:p/>
        </draw:polygon>
        <draw:polygon draw:style-name="gr26" draw:text-style-name="P26" draw:layer="layout" svg:width="0.022cm" svg:height="0.218cm" svg:x="24.173cm" svg:y="13.437cm" svg:viewBox="0 0 23 219" draw:points="0,0 23,0 23,219 0,219">
          <text:p/>
        </draw:polygon>
        <draw:polygon draw:style-name="gr26" draw:text-style-name="P26" draw:layer="layout" svg:width="0.021cm" svg:height="0.029cm" svg:x="24.204cm" svg:y="13.626cm" svg:viewBox="0 0 22 30" draw:points="0,0 22,0 22,30 0,30">
          <text:p/>
        </draw:polygon>
        <draw:polygon draw:style-name="gr26" draw:text-style-name="P26" draw:layer="layout" svg:width="0.022cm" svg:height="0.48cm" svg:x="24.234cm" svg:y="13.175cm" svg:viewBox="0 0 23 481" draw:points="0,0 23,0 23,481 0,481">
          <text:p/>
        </draw:polygon>
        <draw:polygon draw:style-name="gr26" draw:text-style-name="P26" draw:layer="layout" svg:width="0.021cm" svg:height="0.036cm" svg:x="24.265cm" svg:y="13.619cm" svg:viewBox="0 0 22 37" draw:points="0,0 22,0 22,37 0,37">
          <text:p/>
        </draw:polygon>
        <draw:polygon draw:style-name="gr26" draw:text-style-name="P26" draw:layer="layout" svg:width="0.021cm" svg:height="0.01cm" svg:x="24.295cm" svg:y="13.645cm" svg:viewBox="0 0 22 11" draw:points="0,0 22,0 22,11 0,11">
          <text:p/>
        </draw:polygon>
        <draw:polygon draw:style-name="gr26" draw:text-style-name="P26" draw:layer="layout" svg:width="0.021cm" svg:height="0.164cm" svg:x="24.326cm" svg:y="13.491cm" svg:viewBox="0 0 22 165" draw:points="0,0 22,0 22,165 0,165">
          <text:p/>
        </draw:polygon>
        <draw:polygon draw:style-name="gr26" draw:text-style-name="P26" draw:layer="layout" svg:width="0.021cm" svg:height="0.021cm" svg:x="24.356cm" svg:y="13.634cm" svg:viewBox="0 0 22 22" draw:points="0,0 22,0 22,22 0,22">
          <text:p/>
        </draw:polygon>
        <draw:polygon draw:style-name="gr26" draw:text-style-name="P26" draw:layer="layout" svg:width="0.021cm" svg:height="0.009cm" svg:x="24.387cm" svg:y="13.646cm" svg:viewBox="0 0 22 10" draw:points="0,0 22,0 22,10 0,10">
          <text:p/>
        </draw:polygon>
        <draw:polygon draw:style-name="gr26" draw:text-style-name="P26" draw:layer="layout" svg:width="0.021cm" svg:height="0.035cm" svg:x="24.417cm" svg:y="13.62cm" svg:viewBox="0 0 22 36" draw:points="0,0 22,0 22,36 0,36">
          <text:p/>
        </draw:polygon>
        <draw:polygon draw:style-name="gr26" draw:text-style-name="P26" draw:layer="layout" svg:width="0.022cm" svg:height="0.074cm" svg:x="24.447cm" svg:y="13.581cm" svg:viewBox="0 0 23 75" draw:points="0,0 23,0 23,75 0,75">
          <text:p/>
        </draw:polygon>
        <draw:polygon draw:style-name="gr26" draw:text-style-name="P26" draw:layer="layout" svg:width="0.021cm" svg:height="0.008cm" svg:x="24.478cm" svg:y="13.647cm" svg:viewBox="0 0 22 9" draw:points="0,0 22,0 22,9 0,9">
          <text:p/>
        </draw:polygon>
        <draw:polygon draw:style-name="gr26" draw:text-style-name="P26" draw:layer="layout" svg:width="0.022cm" svg:height="0.039cm" svg:x="24.508cm" svg:y="13.616cm" svg:viewBox="0 0 23 40" draw:points="0,0 23,0 23,40 0,40">
          <text:p/>
        </draw:polygon>
        <draw:polygon draw:style-name="gr26" draw:text-style-name="P26" draw:layer="layout" svg:width="0.021cm" svg:height="0.013cm" svg:x="24.539cm" svg:y="13.642cm" svg:viewBox="0 0 22 14" draw:points="0,0 22,0 22,14 0,14">
          <text:p/>
        </draw:polygon>
        <draw:polygon draw:style-name="gr26" draw:text-style-name="P26" draw:layer="layout" svg:width="0.021cm" svg:height="0.002cm" svg:x="24.569cm" svg:y="13.653cm" svg:viewBox="0 0 22 3" draw:points="0,0 22,0 22,3 0,3">
          <text:p/>
        </draw:polygon>
        <draw:polygon draw:style-name="gr26" draw:text-style-name="P26" draw:layer="layout" svg:width="0.021cm" svg:height="0.015cm" svg:x="24.6cm" svg:y="13.64cm" svg:viewBox="0 0 22 16" draw:points="0,0 22,0 22,16 0,16">
          <text:p/>
        </draw:polygon>
        <draw:polygon draw:style-name="gr26" draw:text-style-name="P26" draw:layer="layout" svg:width="0.021cm" svg:height="0.009cm" svg:x="24.63cm" svg:y="13.646cm" svg:viewBox="0 0 22 10" draw:points="0,0 22,0 22,10 0,10">
          <text:p/>
        </draw:polygon>
        <draw:polygon draw:style-name="gr26" draw:text-style-name="P26" draw:layer="layout" svg:width="0.022cm" svg:height="0.001cm" svg:x="24.66cm" svg:y="13.654cm" svg:viewBox="0 0 23 2" draw:points="0,0 23,0 23,2 0,2">
          <text:p/>
        </draw:polygon>
        <draw:polygon draw:style-name="gr26" draw:text-style-name="P26" draw:layer="layout" svg:width="0.021cm" svg:height="0.005cm" svg:x="24.691cm" svg:y="13.65cm" svg:viewBox="0 0 22 6" draw:points="0,0 22,0 22,6 0,6">
          <text:p/>
        </draw:polygon>
        <draw:polygon draw:style-name="gr26" draw:text-style-name="P26" draw:layer="layout" svg:width="0.022cm" svg:height="0.007cm" svg:x="24.721cm" svg:y="13.648cm" svg:viewBox="0 0 23 8" draw:points="0,0 23,0 23,8 0,8">
          <text:p/>
        </draw:polygon>
        <draw:polygon draw:style-name="gr26" draw:text-style-name="P26" draw:layer="layout" svg:width="0.021cm" svg:height="0.001cm" svg:x="24.752cm" svg:y="13.654cm" svg:viewBox="0 0 22 2" draw:points="0,0 22,0 22,2 0,2">
          <text:p/>
        </draw:polygon>
        <draw:polygon draw:style-name="gr26" draw:text-style-name="P26" draw:layer="layout" svg:width="0.021cm" svg:height="0.012cm" svg:x="24.782cm" svg:y="13.643cm" svg:viewBox="0 0 22 13" draw:points="0,0 22,0 22,13 0,13">
          <text:p/>
        </draw:polygon>
        <draw:polygon draw:style-name="gr26" draw:text-style-name="P26" draw:layer="layout" svg:width="0.021cm" svg:height="0.005cm" svg:x="24.813cm" svg:y="13.65cm" svg:viewBox="0 0 22 6" draw:points="0,0 22,0 22,6 0,6">
          <text:p/>
        </draw:polygon>
        <draw:polygon draw:style-name="gr26" draw:text-style-name="P26" draw:layer="layout" svg:width="0.02cm" svg:height="0cm" svg:x="24.843cm" svg:y="13.654cm" svg:viewBox="0 0 21 1" draw:points="0,0 21,0 21,1 0,1">
          <text:p/>
        </draw:polygon>
        <draw:polygon draw:style-name="gr26" draw:text-style-name="P26" draw:layer="layout" svg:width="0.022cm" svg:height="0.009cm" svg:x="24.873cm" svg:y="13.646cm" svg:viewBox="0 0 23 10" draw:points="0,0 23,0 23,10 0,10">
          <text:p/>
        </draw:polygon>
        <draw:polygon draw:style-name="gr46" draw:text-style-name="P26" draw:layer="layout" svg:width="2.466cm" svg:height="0.173cm" svg:x="22.525cm" svg:y="11.543cm" svg:viewBox="0 0 2467 174" draw:points="0,0 2467,0 2467,174 0,174">
          <text:p/>
        </draw:polygon>
        <draw:polygon draw:style-name="gr47" draw:text-style-name="P27" draw:layer="layout" svg:width="2.465cm" svg:height="0.173cm" svg:x="24.991cm" svg:y="11.543cm" svg:viewBox="0 0 2466 174" draw:points="0,0 2466,0 2466,174 0,174">
          <text:p/>
        </draw:polygon>
        <draw:polygon draw:style-name="gr4" draw:text-style-name="P4" draw:layer="layout" svg:width="0.021cm" svg:height="0.021cm" svg:x="22.546cm" svg:y="13.318cm" svg:viewBox="0 0 22 22" draw:points="0,0 6,22 22,8">
          <text:p/>
        </draw:polygon>
        <draw:polygon draw:style-name="gr4" draw:text-style-name="P4" draw:layer="layout" svg:width="0.02cm" svg:height="0.022cm" svg:x="24.399cm" svg:y="13.407cm" svg:viewBox="0 0 21 23" draw:points="19,0 0,13 21,23">
          <text:p/>
        </draw:polygon>
        <draw:polygon draw:style-name="gr4" draw:text-style-name="P4" draw:layer="layout" svg:width="0.021cm" svg:height="0.02cm" svg:x="22.675cm" svg:y="13.388cm" svg:viewBox="0 0 22 21" draw:points="12,0 0,19 22,21">
          <text:p/>
        </draw:polygon>
        <draw:line draw:style-name="gr48" draw:text-style-name="P2" draw:layer="layout" svg:x1="24.965cm" svg:y1="12.157cm" svg:x2="25.521cm" svg:y2="12.202cm">
          <text:p/>
        </draw:line>
        <draw:polygon draw:style-name="gr49" draw:text-style-name="P4" draw:layer="layout" svg:width="0.019cm" svg:height="0.022cm" svg:x="25.501cm" svg:y="12.189cm" svg:viewBox="0 0 20 23" draw:points="0,23 20,13 1,0">
          <text:p/>
        </draw:polygon>
        <draw:line draw:style-name="gr48" draw:text-style-name="P2" draw:layer="layout" svg:x1="26.494cm" svg:y1="12.179cm" svg:x2="25.803cm" svg:y2="12.486cm">
          <text:p/>
        </draw:line>
        <draw:polygon draw:style-name="gr48" draw:text-style-name="P2" draw:layer="layout" svg:width="0.016cm" svg:height="0.026cm" svg:x="25.803cm" svg:y="12.466cm" svg:viewBox="0 0 17 27" draw:points="12,0 0,20 17,27">
          <text:p/>
        </draw:polygon>
        <draw:line draw:style-name="gr48" draw:text-style-name="P2" draw:layer="layout" svg:x1="24.727cm" svg:y1="12.532cm" svg:x2="25.519cm" svg:y2="12.718cm">
          <text:p/>
        </draw:line>
        <draw:polygon draw:style-name="gr49" draw:text-style-name="P4" draw:layer="layout" svg:width="0.021cm" svg:height="0.021cm" svg:x="25.497cm" svg:y="12.702cm" svg:viewBox="0 0 22 22" draw:points="0,22 22,16 5,0">
          <text:p/>
        </draw:polygon>
        <draw:frame draw:style-name="gr50" draw:text-style-name="P38" draw:layer="layout" svg:width="3.026cm" svg:height="0.856cm" svg:x="23.741cm" svg:y="4.174cm">
          <draw:text-box>
            <text:p text:style-name="P6"><text:span text:style-name="T5">InsDel2a</text:span></text:p>
          </draw:text-box>
        </draw:frame>
        <draw:frame draw:style-name="gr51" draw:text-style-name="P39" draw:layer="layout" svg:width="2.278cm" svg:height="0.357cm" svg:x="22.686cm" svg:y="11.839cm">
          <draw:text-box>
            <text:p text:style-name="P6"><text:span text:style-name="T6">A[Del(T):R(9,)]A</text:span></text:p>
          </draw:text-box>
        </draw:frame>
        <draw:frame draw:style-name="gr52" draw:text-style-name="P39" draw:layer="layout" svg:width="2.295cm" svg:height="0.357cm" svg:x="25.676cm" svg:y="11.807cm">
          <draw:text-box>
            <text:p text:style-name="P6"><text:span text:style-name="T6">A[Del(T):R(9,)]C</text:span></text:p>
          </draw:text-box>
        </draw:frame>
        <draw:line draw:style-name="gr45" draw:text-style-name="P2" draw:layer="layout" svg:x1="22.462cm" svg:y1="13.718cm" svg:x2="22.462cm" svg:y2="11.543cm">
          <text:p/>
        </draw:line>
        <draw:line draw:style-name="gr53" draw:text-style-name="P2" draw:layer="layout" svg:x1="24.991cm" svg:y1="13.301cm" svg:x2="24.991cm" svg:y2="13.719cm">
          <text:p/>
        </draw:line>
        <draw:line draw:style-name="gr53" draw:text-style-name="P2" draw:layer="layout" svg:x1="23.347cm" svg:y1="13.301cm" svg:x2="23.347cm" svg:y2="13.719cm">
          <text:p/>
        </draw:line>
        <draw:line draw:style-name="gr53" draw:text-style-name="P2" draw:layer="layout" svg:x1="26.634cm" svg:y1="13.301cm" svg:x2="26.634cm" svg:y2="13.719cm">
          <text:p/>
        </draw:line>
        <draw:line draw:style-name="gr53" draw:text-style-name="P2" draw:layer="layout" svg:x1="24.169cm" svg:y1="13.301cm" svg:x2="24.169cm" svg:y2="13.719cm">
          <text:p/>
        </draw:line>
        <draw:line draw:style-name="gr53" draw:text-style-name="P2" draw:layer="layout" svg:x1="27.456cm" svg:y1="13.301cm" svg:x2="27.456cm" svg:y2="13.719cm">
          <text:p/>
        </draw:line>
        <draw:line draw:style-name="gr53" draw:text-style-name="P2" draw:layer="layout" svg:x1="25.812cm" svg:y1="13.301cm" svg:x2="25.812cm" svg:y2="13.719cm">
          <text:p/>
        </draw:line>
        <draw:frame draw:style-name="gr54" draw:text-style-name="P39" draw:layer="layout" svg:width="1.978cm" svg:height="0.357cm" svg:x="22.704cm" svg:y="12.346cm">
          <draw:text-box>
            <text:p text:style-name="P6"><text:span text:style-name="T6">A[Del(T):R8]A</text:span></text:p>
          </draw:text-box>
        </draw:frame>
        <draw:line draw:style-name="gr34" draw:text-style-name="P2" draw:layer="layout" svg:x1="25.248cm" svg:y1="8.819cm" svg:x2="25.248cm" svg:y2="8.1cm">
          <text:p/>
        </draw:line>
        <draw:polygon draw:style-name="gr35" draw:text-style-name="P31" draw:layer="layout" svg:width="0.54cm" svg:height="0.27cm" svg:x="24.978cm" svg:y="7.866cm" svg:viewBox="0 0 541 271" draw:points="0,271 541,271 271,0">
          <text:p/>
        </draw:polygon>
        <draw:polygon draw:style-name="gr4" draw:text-style-name="P4" draw:layer="layout" svg:width="5.93cm" svg:height="2.284cm" svg:x="34.505cm" svg:y="5.146cm" svg:viewBox="0 0 5931 2285" draw:points="0,0 5931,0 5931,2285 0,2285">
          <text:p/>
        </draw:polygon>
        <draw:polygon draw:style-name="gr26" draw:text-style-name="P26" draw:layer="layout" svg:width="0.047cm" svg:height="0.041cm" svg:x="35.059cm" svg:y="7.39cm" svg:viewBox="0 0 48 42" draw:points="0,0 48,0 48,42 0,42">
          <text:p/>
        </draw:polygon>
        <draw:polygon draw:style-name="gr26" draw:text-style-name="P26" draw:layer="layout" svg:width="0.047cm" svg:height="0.116cm" svg:x="34.925cm" svg:y="7.314cm" svg:viewBox="0 0 48 117" draw:points="0,0 48,0 48,117 0,117">
          <text:p/>
        </draw:polygon>
        <draw:polygon draw:style-name="gr26" draw:text-style-name="P26" draw:layer="layout" svg:width="0.047cm" svg:height="0.065cm" svg:x="34.992cm" svg:y="7.365cm" svg:viewBox="0 0 48 66" draw:points="0,0 48,0 48,66 0,66">
          <text:p/>
        </draw:polygon>
        <draw:polygon draw:style-name="gr26" draw:text-style-name="P26" draw:layer="layout" svg:width="0.047cm" svg:height="0.019cm" svg:x="34.522cm" svg:y="7.411cm" svg:viewBox="0 0 48 20" draw:points="0,0 48,0 48,20 0,20">
          <text:p/>
        </draw:polygon>
        <draw:polygon draw:style-name="gr26" draw:text-style-name="P26" draw:layer="layout" svg:width="0.047cm" svg:height="0.013cm" svg:x="34.589cm" svg:y="7.417cm" svg:viewBox="0 0 48 14" draw:points="0,0 48,0 48,14 0,14">
          <text:p/>
        </draw:polygon>
        <draw:polygon draw:style-name="gr26" draw:text-style-name="P26" draw:layer="layout" svg:width="0.047cm" svg:height="0.007cm" svg:x="34.656cm" svg:y="7.423cm" svg:viewBox="0 0 48 8" draw:points="0,0 48,0 48,8 0,8">
          <text:p/>
        </draw:polygon>
        <draw:polygon draw:style-name="gr26" draw:text-style-name="P26" draw:layer="layout" svg:width="0.047cm" svg:height="0.006cm" svg:x="34.723cm" svg:y="7.425cm" svg:viewBox="0 0 48 7" draw:points="0,0 48,0 48,7 0,7">
          <text:p/>
        </draw:polygon>
        <draw:polygon draw:style-name="gr26" draw:text-style-name="P26" draw:layer="layout" svg:width="0.048cm" svg:height="0.012cm" svg:x="34.79cm" svg:y="7.418cm" svg:viewBox="0 0 49 13" draw:points="0,0 49,0 49,13 0,13">
          <text:p/>
        </draw:polygon>
        <draw:polygon draw:style-name="gr26" draw:text-style-name="P26" draw:layer="layout" svg:width="0.047cm" svg:height="0.008cm" svg:x="34.858cm" svg:y="7.422cm" svg:viewBox="0 0 48 9" draw:points="0,0 48,0 48,9 0,9">
          <text:p/>
        </draw:polygon>
        <draw:polygon draw:style-name="gr27" draw:text-style-name="P27" draw:layer="layout" svg:width="0.047cm" svg:height="0.038cm" svg:x="35.194cm" svg:y="7.392cm" svg:viewBox="0 0 48 39" draw:points="0,0 48,0 48,39 0,39">
          <text:p/>
        </draw:polygon>
        <draw:polygon draw:style-name="gr27" draw:text-style-name="P27" draw:layer="layout" svg:width="0.047cm" svg:height="0.041cm" svg:x="35.261cm" svg:y="7.389cm" svg:viewBox="0 0 48 42" draw:points="0,0 48,0 48,42 0,42">
          <text:p/>
        </draw:polygon>
        <draw:polygon draw:style-name="gr27" draw:text-style-name="P27" draw:layer="layout" svg:width="0.047cm" svg:height="0.016cm" svg:x="35.328cm" svg:y="7.414cm" svg:viewBox="0 0 48 17" draw:points="0,0 48,0 48,17 0,17">
          <text:p/>
        </draw:polygon>
        <draw:polygon draw:style-name="gr27" draw:text-style-name="P27" draw:layer="layout" svg:width="0.047cm" svg:height="0.321cm" svg:x="35.799cm" svg:y="7.109cm" svg:viewBox="0 0 48 322" draw:points="0,0 48,0 48,322 0,322">
          <text:p/>
        </draw:polygon>
        <draw:polygon draw:style-name="gr27" draw:text-style-name="P27" draw:layer="layout" svg:width="0.047cm" svg:height="0.585cm" svg:x="35.866cm" svg:y="6.845cm" svg:viewBox="0 0 48 586" draw:points="0,0 48,0 48,586 0,586">
          <text:p/>
        </draw:polygon>
        <draw:polygon draw:style-name="gr27" draw:text-style-name="P27" draw:layer="layout" svg:width="0.047cm" svg:height="0.213cm" svg:x="35.933cm" svg:y="7.217cm" svg:viewBox="0 0 48 214" draw:points="0,0 48,0 48,214 0,214">
          <text:p/>
        </draw:polygon>
        <draw:polygon draw:style-name="gr27" draw:text-style-name="P27" draw:layer="layout" svg:width="0.047cm" svg:height="0.54cm" svg:x="36.404cm" svg:y="6.89cm" svg:viewBox="0 0 48 541" draw:points="0,0 48,0 48,541 0,541">
          <text:p/>
        </draw:polygon>
        <draw:polygon draw:style-name="gr27" draw:text-style-name="P27" draw:layer="layout" svg:width="0.047cm" svg:height="1.227cm" svg:x="36.471cm" svg:y="6.203cm" svg:viewBox="0 0 48 1228" draw:points="0,0 48,0 48,1228 0,1228">
          <text:p/>
        </draw:polygon>
        <draw:polygon draw:style-name="gr27" draw:text-style-name="P27" draw:layer="layout" svg:width="0.047cm" svg:height="0.304cm" svg:x="36.539cm" svg:y="7.126cm" svg:viewBox="0 0 48 305" draw:points="0,0 48,0 48,305 0,305">
          <text:p/>
        </draw:polygon>
        <draw:polygon draw:style-name="gr12" draw:text-style-name="P12" draw:layer="layout" svg:width="0.047cm" svg:height="0.008cm" svg:x="37.009cm" svg:y="7.422cm" svg:viewBox="0 0 48 9" draw:points="0,0 48,0 48,9 0,9">
          <text:p/>
        </draw:polygon>
        <draw:polygon draw:style-name="gr12" draw:text-style-name="P12" draw:layer="layout" svg:width="0.046cm" svg:height="0cm" svg:x="37.076cm" svg:y="7.429cm" svg:viewBox="0 0 47 1" draw:points="0,0 47,0 47,1 0,1">
          <text:p/>
        </draw:polygon>
        <draw:polygon draw:style-name="gr13" draw:text-style-name="P13" draw:layer="layout" svg:width="0.047cm" svg:height="0.009cm" svg:x="37.345cm" svg:y="7.421cm" svg:viewBox="0 0 48 10" draw:points="0,0 48,0 48,10 0,10">
          <text:p/>
        </draw:polygon>
        <draw:polygon draw:style-name="gr13" draw:text-style-name="P13" draw:layer="layout" svg:width="0.047cm" svg:height="0.005cm" svg:x="37.413cm" svg:y="7.426cm" svg:viewBox="0 0 48 6" draw:points="0,0 48,0 48,6 0,6">
          <text:p/>
        </draw:polygon>
        <draw:polygon draw:style-name="gr13" draw:text-style-name="P13" draw:layer="layout" svg:width="0.047cm" svg:height="0.008cm" svg:x="37.48cm" svg:y="7.422cm" svg:viewBox="0 0 48 9" draw:points="0,0 48,0 48,9 0,9">
          <text:p/>
        </draw:polygon>
        <draw:polygon draw:style-name="gr13" draw:text-style-name="P13" draw:layer="layout" svg:width="0.047cm" svg:height="0.039cm" svg:x="37.95cm" svg:y="7.391cm" svg:viewBox="0 0 48 40" draw:points="0,0 48,0 48,40 0,40">
          <text:p/>
        </draw:polygon>
        <draw:polygon draw:style-name="gr13" draw:text-style-name="P13" draw:layer="layout" svg:width="0.047cm" svg:height="0.041cm" svg:x="38.018cm" svg:y="7.389cm" svg:viewBox="0 0 48 42" draw:points="0,0 48,0 48,42 0,42">
          <text:p/>
        </draw:polygon>
        <draw:polygon draw:style-name="gr13" draw:text-style-name="P13" draw:layer="layout" svg:width="0.047cm" svg:height="0.052cm" svg:x="38.085cm" svg:y="7.378cm" svg:viewBox="0 0 48 53" draw:points="0,0 48,0 48,53 0,53">
          <text:p/>
        </draw:polygon>
        <draw:polygon draw:style-name="gr13" draw:text-style-name="P13" draw:layer="layout" svg:width="0.047cm" svg:height="0.033cm" svg:x="38.556cm" svg:y="7.397cm" svg:viewBox="0 0 48 34" draw:points="0,0 48,0 48,34 0,34">
          <text:p/>
        </draw:polygon>
        <draw:polygon draw:style-name="gr13" draw:text-style-name="P13" draw:layer="layout" svg:width="0.047cm" svg:height="0.031cm" svg:x="38.623cm" svg:y="7.399cm" svg:viewBox="0 0 48 32" draw:points="0,0 48,0 48,32 0,32">
          <text:p/>
        </draw:polygon>
        <draw:polygon draw:style-name="gr13" draw:text-style-name="P13" draw:layer="layout" svg:width="0.047cm" svg:height="0.028cm" svg:x="38.69cm" svg:y="7.402cm" svg:viewBox="0 0 48 29" draw:points="0,0 48,0 48,29 0,29">
          <text:p/>
        </draw:polygon>
        <draw:polygon draw:style-name="gr27" draw:text-style-name="P27" draw:layer="layout" svg:width="0.047cm" svg:height="0.017cm" svg:x="35.396cm" svg:y="7.413cm" svg:viewBox="0 0 48 18" draw:points="0,0 48,0 48,18 0,18">
          <text:p/>
        </draw:polygon>
        <draw:polygon draw:style-name="gr27" draw:text-style-name="P27" draw:layer="layout" svg:width="0.047cm" svg:height="0.037cm" svg:x="35.463cm" svg:y="7.393cm" svg:viewBox="0 0 48 38" draw:points="0,0 48,0 48,38 0,38">
          <text:p/>
        </draw:polygon>
        <draw:polygon draw:style-name="gr27" draw:text-style-name="P27" draw:layer="layout" svg:width="0.047cm" svg:height="0.013cm" svg:x="35.53cm" svg:y="7.417cm" svg:viewBox="0 0 48 14" draw:points="0,0 48,0 48,14 0,14">
          <text:p/>
        </draw:polygon>
        <draw:polygon draw:style-name="gr27" draw:text-style-name="P27" draw:layer="layout" svg:width="0.047cm" svg:height="0.161cm" svg:x="36.001cm" svg:y="7.269cm" svg:viewBox="0 0 48 162" draw:points="0,0 48,0 48,162 0,162">
          <text:p/>
        </draw:polygon>
        <draw:polygon draw:style-name="gr27" draw:text-style-name="P27" draw:layer="layout" svg:width="0.047cm" svg:height="0.805cm" svg:x="36.068cm" svg:y="6.625cm" svg:viewBox="0 0 48 806" draw:points="0,0 48,0 48,806 0,806">
          <text:p/>
        </draw:polygon>
        <draw:polygon draw:style-name="gr27" draw:text-style-name="P27" draw:layer="layout" svg:width="0.047cm" svg:height="0.14cm" svg:x="36.135cm" svg:y="7.29cm" svg:viewBox="0 0 48 141" draw:points="0,0 48,0 48,141 0,141">
          <text:p/>
        </draw:polygon>
        <draw:polygon draw:style-name="gr27" draw:text-style-name="P27" draw:layer="layout" svg:width="0.047cm" svg:height="0.332cm" svg:x="36.606cm" svg:y="7.098cm" svg:viewBox="0 0 48 333" draw:points="0,0 48,0 48,333 0,333">
          <text:p/>
        </draw:polygon>
        <draw:polygon draw:style-name="gr27" draw:text-style-name="P27" draw:layer="layout" svg:width="0.047cm" svg:height="1.903cm" svg:x="36.673cm" svg:y="5.527cm" svg:viewBox="0 0 48 1904" draw:points="0,0 48,0 48,1904 0,1904">
          <text:p/>
        </draw:polygon>
        <draw:polygon draw:style-name="gr27" draw:text-style-name="P27" draw:layer="layout" svg:width="0.047cm" svg:height="0.313cm" svg:x="36.74cm" svg:y="7.117cm" svg:viewBox="0 0 48 314" draw:points="0,0 48,0 48,314 0,314">
          <text:p/>
        </draw:polygon>
        <draw:polygon draw:style-name="gr13" draw:text-style-name="P13" draw:layer="layout" svg:width="0.047cm" svg:height="0.003cm" svg:x="37.547cm" svg:y="7.428cm" svg:viewBox="0 0 48 4" draw:points="0,0 48,0 48,4 0,4">
          <text:p/>
        </draw:polygon>
        <draw:polygon draw:style-name="gr13" draw:text-style-name="P13" draw:layer="layout" svg:width="0.047cm" svg:height="0.006cm" svg:x="37.614cm" svg:y="7.425cm" svg:viewBox="0 0 48 7" draw:points="0,0 48,0 48,7 0,7">
          <text:p/>
        </draw:polygon>
        <draw:polygon draw:style-name="gr13" draw:text-style-name="P13" draw:layer="layout" svg:width="0.048cm" svg:height="0.003cm" svg:x="37.681cm" svg:y="7.427cm" svg:viewBox="0 0 49 4" draw:points="0,0 49,0 49,4 0,4">
          <text:p/>
        </draw:polygon>
        <draw:polygon draw:style-name="gr13" draw:text-style-name="P13" draw:layer="layout" svg:width="0.047cm" svg:height="0.015cm" svg:x="38.152cm" svg:y="7.416cm" svg:viewBox="0 0 48 16" draw:points="0,0 48,0 48,16 0,16">
          <text:p/>
        </draw:polygon>
        <draw:polygon draw:style-name="gr13" draw:text-style-name="P13" draw:layer="layout" svg:width="0.047cm" svg:height="0.024cm" svg:x="38.219cm" svg:y="7.406cm" svg:viewBox="0 0 48 25" draw:points="0,0 48,0 48,25 0,25">
          <text:p/>
        </draw:polygon>
        <draw:polygon draw:style-name="gr13" draw:text-style-name="P13" draw:layer="layout" svg:width="0.047cm" svg:height="0.033cm" svg:x="38.287cm" svg:y="7.397cm" svg:viewBox="0 0 48 34" draw:points="0,0 48,0 48,34 0,34">
          <text:p/>
        </draw:polygon>
        <draw:polygon draw:style-name="gr13" draw:text-style-name="P13" draw:layer="layout" svg:width="0.047cm" svg:height="0.014cm" svg:x="38.757cm" svg:y="7.416cm" svg:viewBox="0 0 48 15" draw:points="0,0 48,0 48,15 0,15">
          <text:p/>
        </draw:polygon>
        <draw:polygon draw:style-name="gr13" draw:text-style-name="P13" draw:layer="layout" svg:width="0.047cm" svg:height="0.015cm" svg:x="38.824cm" svg:y="7.415cm" svg:viewBox="0 0 48 16" draw:points="0,0 48,0 48,16 0,16">
          <text:p/>
        </draw:polygon>
        <draw:polygon draw:style-name="gr13" draw:text-style-name="P13" draw:layer="layout" svg:width="0.047cm" svg:height="0.037cm" svg:x="38.892cm" svg:y="7.393cm" svg:viewBox="0 0 48 38" draw:points="0,0 48,0 48,38 0,38">
          <text:p/>
        </draw:polygon>
        <draw:polygon draw:style-name="gr16" draw:text-style-name="P16" draw:layer="layout" svg:width="0.047cm" svg:height="0.181cm" svg:x="39.362cm" svg:y="7.249cm" svg:viewBox="0 0 48 182" draw:points="0,0 48,0 48,182 0,182">
          <text:p/>
        </draw:polygon>
        <draw:polygon draw:style-name="gr16" draw:text-style-name="P16" draw:layer="layout" svg:width="0.047cm" svg:height="0.023cm" svg:x="39.161cm" svg:y="7.407cm" svg:viewBox="0 0 48 24" draw:points="0,0 48,0 48,24 0,24">
          <text:p/>
        </draw:polygon>
        <draw:polygon draw:style-name="gr55" draw:text-style-name="P40" draw:layer="layout" svg:width="0.047cm" svg:height="0.015cm" svg:x="39.967cm" svg:y="7.415cm" svg:viewBox="0 0 48 16" draw:points="0,0 48,0 48,16 0,16">
          <text:p/>
        </draw:polygon>
        <draw:polygon draw:style-name="gr16" draw:text-style-name="P16" draw:layer="layout" svg:width="0.047cm" svg:height="0.033cm" svg:x="39.295cm" svg:y="7.397cm" svg:viewBox="0 0 48 34" draw:points="0,0 48,0 48,34 0,34">
          <text:p/>
        </draw:polygon>
        <draw:polygon draw:style-name="gr16" draw:text-style-name="P16" draw:layer="layout" svg:width="0.047cm" svg:height="0.015cm" svg:x="39.497cm" svg:y="7.415cm" svg:viewBox="0 0 48 16" draw:points="0,0 48,0 48,16 0,16">
          <text:p/>
        </draw:polygon>
        <draw:polygon draw:style-name="gr16" draw:text-style-name="P16" draw:layer="layout" svg:width="0.047cm" svg:height="0.009cm" svg:x="39.43cm" svg:y="7.421cm" svg:viewBox="0 0 48 10" draw:points="0,0 48,0 48,10 0,10">
          <text:p/>
        </draw:polygon>
        <draw:polygon draw:style-name="gr55" draw:text-style-name="P40" draw:layer="layout" svg:width="0.047cm" svg:height="0.008cm" svg:x="40.035cm" svg:y="7.422cm" svg:viewBox="0 0 48 9" draw:points="0,0 48,0 48,9 0,9">
          <text:p/>
        </draw:polygon>
        <draw:polygon draw:style-name="gr55" draw:text-style-name="P40" draw:layer="layout" svg:width="0.047cm" svg:height="0.003cm" svg:x="40.102cm" svg:y="7.427cm" svg:viewBox="0 0 48 4" draw:points="0,0 48,0 48,4 0,4">
          <text:p/>
        </draw:polygon>
        <draw:polygon draw:style-name="gr16" draw:text-style-name="P16" draw:layer="layout" svg:width="0.047cm" svg:height="0.003cm" svg:x="39.228cm" svg:y="7.428cm" svg:viewBox="0 0 48 4" draw:points="0,0 48,0 48,4 0,4">
          <text:p/>
        </draw:polygon>
        <draw:polygon draw:style-name="gr55" draw:text-style-name="P40" draw:layer="layout" svg:width="0.047cm" svg:height="0.003cm" svg:x="40.371cm" svg:y="7.428cm" svg:viewBox="0 0 48 4" draw:points="0,0 48,0 48,4 0,4">
          <text:p/>
        </draw:polygon>
        <draw:polygon draw:style-name="gr55" draw:text-style-name="P40" draw:layer="layout" svg:width="0.047cm" svg:height="0.004cm" svg:x="40.169cm" svg:y="7.426cm" svg:viewBox="0 0 48 5" draw:points="0,0 48,0 48,5 0,5">
          <text:p/>
        </draw:polygon>
        <draw:polygon draw:style-name="gr55" draw:text-style-name="P40" draw:layer="layout" svg:width="0.046cm" svg:height="0cm" svg:x="40.236cm" svg:y="7.429cm" svg:viewBox="0 0 47 1" draw:points="0,0 47,0 47,1 0,1">
          <text:p/>
        </draw:polygon>
        <draw:polygon draw:style-name="gr55" draw:text-style-name="P40" draw:layer="layout" svg:width="0.047cm" svg:height="0.001cm" svg:x="40.304cm" svg:y="7.429cm" svg:viewBox="0 0 48 2" draw:points="0,0 48,0 48,2 0,2">
          <text:p/>
        </draw:polygon>
        <draw:polygon draw:style-name="gr26" draw:text-style-name="P26" draw:layer="layout" svg:width="0.047cm" svg:height="0.289cm" svg:x="35.127cm" svg:y="7.141cm" svg:viewBox="0 0 48 290" draw:points="0,0 48,0 48,290 0,290">
          <text:p/>
        </draw:polygon>
        <draw:polygon draw:style-name="gr27" draw:text-style-name="P27" draw:layer="layout" svg:width="0.047cm" svg:height="0.096cm" svg:x="35.597cm" svg:y="7.334cm" svg:viewBox="0 0 48 97" draw:points="0,0 48,0 48,97 0,97">
          <text:p/>
        </draw:polygon>
        <draw:polygon draw:style-name="gr27" draw:text-style-name="P27" draw:layer="layout" svg:width="0.047cm" svg:height="0.12cm" svg:x="35.665cm" svg:y="7.31cm" svg:viewBox="0 0 48 121" draw:points="0,0 48,0 48,121 0,121">
          <text:p/>
        </draw:polygon>
        <draw:polygon draw:style-name="gr27" draw:text-style-name="P27" draw:layer="layout" svg:width="0.047cm" svg:height="0.08cm" svg:x="35.732cm" svg:y="7.35cm" svg:viewBox="0 0 48 81" draw:points="0,0 48,0 48,81 0,81">
          <text:p/>
        </draw:polygon>
        <draw:polygon draw:style-name="gr27" draw:text-style-name="P27" draw:layer="layout" svg:width="0.047cm" svg:height="0.701cm" svg:x="36.202cm" svg:y="6.729cm" svg:viewBox="0 0 48 702" draw:points="0,0 48,0 48,702 0,702">
          <text:p/>
        </draw:polygon>
        <draw:polygon draw:style-name="gr27" draw:text-style-name="P27" draw:layer="layout" svg:width="0.047cm" svg:height="0.568cm" svg:x="36.27cm" svg:y="6.862cm" svg:viewBox="0 0 48 569" draw:points="0,0 48,0 48,569 0,569">
          <text:p/>
        </draw:polygon>
        <draw:polygon draw:style-name="gr27" draw:text-style-name="P27" draw:layer="layout" svg:width="0.047cm" svg:height="0.488cm" svg:x="36.337cm" svg:y="6.942cm" svg:viewBox="0 0 48 489" draw:points="0,0 48,0 48,489 0,489">
          <text:p/>
        </draw:polygon>
        <draw:polygon draw:style-name="gr27" draw:text-style-name="P27" draw:layer="layout" svg:width="0.047cm" svg:height="0.817cm" svg:x="36.807cm" svg:y="6.613cm" svg:viewBox="0 0 48 818" draw:points="0,0 48,0 48,818 0,818">
          <text:p/>
        </draw:polygon>
        <draw:polygon draw:style-name="gr27" draw:text-style-name="P27" draw:layer="layout" svg:width="0.047cm" svg:height="0.854cm" svg:x="36.875cm" svg:y="6.576cm" svg:viewBox="0 0 48 855" draw:points="0,0 48,0 48,855 0,855">
          <text:p/>
        </draw:polygon>
        <draw:polygon draw:style-name="gr27" draw:text-style-name="P27" draw:layer="layout" svg:width="0.047cm" svg:height="0.521cm" svg:x="36.942cm" svg:y="6.909cm" svg:viewBox="0 0 48 522" draw:points="0,0 48,0 48,522 0,522">
          <text:p/>
        </draw:polygon>
        <draw:polygon draw:style-name="gr13" draw:text-style-name="P13" draw:layer="layout" svg:width="0.047cm" svg:height="0.001cm" svg:x="37.749cm" svg:y="7.429cm" svg:viewBox="0 0 48 2" draw:points="0,0 48,0 48,2 0,2">
          <text:p/>
        </draw:polygon>
        <draw:polygon draw:style-name="gr13" draw:text-style-name="P13" draw:layer="layout" svg:width="0.047cm" svg:height="0.003cm" svg:x="37.816cm" svg:y="7.428cm" svg:viewBox="0 0 48 4" draw:points="0,0 48,0 48,4 0,4">
          <text:p/>
        </draw:polygon>
        <draw:polygon draw:style-name="gr13" draw:text-style-name="P13" draw:layer="layout" svg:width="0.047cm" svg:height="0.003cm" svg:x="37.883cm" svg:y="7.428cm" svg:viewBox="0 0 48 4" draw:points="0,0 48,0 48,4 0,4">
          <text:p/>
        </draw:polygon>
        <draw:polygon draw:style-name="gr13" draw:text-style-name="P13" draw:layer="layout" svg:width="0.047cm" svg:height="0.024cm" svg:x="38.354cm" svg:y="7.406cm" svg:viewBox="0 0 48 25" draw:points="0,0 48,0 48,25 0,25">
          <text:p/>
        </draw:polygon>
        <draw:polygon draw:style-name="gr13" draw:text-style-name="P13" draw:layer="layout" svg:width="0.047cm" svg:height="0.036cm" svg:x="38.421cm" svg:y="7.395cm" svg:viewBox="0 0 48 37" draw:points="0,0 48,0 48,37 0,37">
          <text:p/>
        </draw:polygon>
        <draw:polygon draw:style-name="gr13" draw:text-style-name="P13" draw:layer="layout" svg:width="0.047cm" svg:height="0.045cm" svg:x="38.488cm" svg:y="7.385cm" svg:viewBox="0 0 48 46" draw:points="0,0 48,0 48,46 0,46">
          <text:p/>
        </draw:polygon>
        <draw:polygon draw:style-name="gr13" draw:text-style-name="P13" draw:layer="layout" svg:width="0.047cm" svg:height="0.011cm" svg:x="38.959cm" svg:y="7.419cm" svg:viewBox="0 0 48 12" draw:points="0,0 48,0 48,12 0,12">
          <text:p/>
        </draw:polygon>
        <draw:polygon draw:style-name="gr13" draw:text-style-name="P13" draw:layer="layout" svg:width="0.047cm" svg:height="0.019cm" svg:x="39.026cm" svg:y="7.411cm" svg:viewBox="0 0 48 20" draw:points="0,0 48,0 48,20 0,20">
          <text:p/>
        </draw:polygon>
        <draw:polygon draw:style-name="gr13" draw:text-style-name="P13" draw:layer="layout" svg:width="0.047cm" svg:height="0.019cm" svg:x="39.093cm" svg:y="7.411cm" svg:viewBox="0 0 48 20" draw:points="0,0 48,0 48,20 0,20">
          <text:p/>
        </draw:polygon>
        <draw:polygon draw:style-name="gr20" draw:text-style-name="P20" draw:layer="layout" svg:width="0.047cm" svg:height="0.023cm" svg:x="39.833cm" svg:y="7.407cm" svg:viewBox="0 0 48 24" draw:points="0,0 48,0 48,24 0,24">
          <text:p/>
        </draw:polygon>
        <draw:polygon draw:style-name="gr20" draw:text-style-name="P20" draw:layer="layout" svg:width="0.047cm" svg:height="0.125cm" svg:x="39.9cm" svg:y="7.305cm" svg:viewBox="0 0 48 126" draw:points="0,0 48,0 48,126 0,126">
          <text:p/>
        </draw:polygon>
        <draw:polygon draw:style-name="gr20" draw:text-style-name="P20" draw:layer="layout" svg:width="0.047cm" svg:height="0.032cm" svg:x="39.564cm" svg:y="7.398cm" svg:viewBox="0 0 48 33" draw:points="0,0 48,0 48,33 0,33">
          <text:p/>
        </draw:polygon>
        <draw:polygon draw:style-name="gr20" draw:text-style-name="P20" draw:layer="layout" svg:width="0.047cm" svg:height="0.005cm" svg:x="39.698cm" svg:y="7.426cm" svg:viewBox="0 0 48 6" draw:points="0,0 48,0 48,6 0,6">
          <text:p/>
        </draw:polygon>
        <draw:polygon draw:style-name="gr20" draw:text-style-name="P20" draw:layer="layout" svg:width="0.047cm" svg:height="0.031cm" svg:x="39.631cm" svg:y="7.399cm" svg:viewBox="0 0 48 32" draw:points="0,0 48,0 48,32 0,32">
          <text:p/>
        </draw:polygon>
        <draw:polygon draw:style-name="gr20" draw:text-style-name="P20" draw:layer="layout" svg:width="0.046cm" svg:height="0cm" svg:x="39.766cm" svg:y="7.429cm" svg:viewBox="0 0 47 1" draw:points="0,0 47,0 47,1 0,1">
          <text:p/>
        </draw:polygon>
        <draw:polygon draw:style-name="gr12" draw:text-style-name="P12" draw:layer="layout" svg:width="0.047cm" svg:height="0.039cm" svg:x="37.144cm" svg:y="7.391cm" svg:viewBox="0 0 48 40" draw:points="0,0 48,0 48,40 0,40">
          <text:p/>
        </draw:polygon>
        <draw:polygon draw:style-name="gr12" draw:text-style-name="P12" draw:layer="layout" svg:width="0.047cm" svg:height="0.126cm" svg:x="37.211cm" svg:y="7.304cm" svg:viewBox="0 0 48 127" draw:points="0,0 48,0 48,127 0,127">
          <text:p/>
        </draw:polygon>
        <draw:polygon draw:style-name="gr12" draw:text-style-name="P12" draw:layer="layout" svg:width="0.047cm" svg:height="0.223cm" svg:x="37.278cm" svg:y="7.207cm" svg:viewBox="0 0 48 224" draw:points="0,0 48,0 48,224 0,224">
          <text:p/>
        </draw:polygon>
        <draw:polygon draw:style-name="gr46" draw:text-style-name="P26" draw:layer="layout" svg:width="0.673cm" svg:height="0.229cm" svg:x="34.511cm" svg:y="5.146cm" svg:viewBox="0 0 674 230" draw:points="0,0 674,0 674,230 0,230">
          <text:p/>
        </draw:polygon>
        <draw:polygon draw:style-name="gr56" draw:text-style-name="P41" draw:layer="layout" svg:width="0.605cm" svg:height="0.229cm" svg:x="35.184cm" svg:y="5.146cm" svg:viewBox="0 0 606 230" draw:points="0,0 606,0 606,230 0,230">
          <text:p/>
        </draw:polygon>
        <draw:polygon draw:style-name="gr40" draw:text-style-name="P2" draw:layer="layout" svg:width="0.605cm" svg:height="0.229cm" svg:x="35.184cm" svg:y="5.146cm" svg:viewBox="0 0 606 230" draw:points="0,0 606,0 606,230 0,230">
          <text:p/>
        </draw:polygon>
        <draw:polygon draw:style-name="gr27" draw:text-style-name="P27" draw:layer="layout" svg:width="0.605cm" svg:height="0.229cm" svg:x="35.789cm" svg:y="5.146cm" svg:viewBox="0 0 606 230" draw:points="0,0 606,0 606,230 0,230">
          <text:p/>
        </draw:polygon>
        <draw:polygon draw:style-name="gr40" draw:text-style-name="P2" draw:layer="layout" svg:width="0.605cm" svg:height="0.229cm" svg:x="35.789cm" svg:y="5.146cm" svg:viewBox="0 0 606 230" draw:points="0,0 606,0 606,230 0,230">
          <text:p/>
        </draw:polygon>
        <draw:polygon draw:style-name="gr41" draw:text-style-name="P35" draw:layer="layout" svg:width="0.605cm" svg:height="0.229cm" svg:x="36.394cm" svg:y="5.146cm" svg:viewBox="0 0 606 230" draw:points="0,0 606,0 606,230 0,230">
          <text:p/>
        </draw:polygon>
        <draw:polygon draw:style-name="gr12" draw:text-style-name="P12" draw:layer="layout" svg:width="0.336cm" svg:height="0.229cm" svg:x="36.999cm" svg:y="5.146cm" svg:viewBox="0 0 337 230" draw:points="0,0 337,0 337,230 0,230">
          <text:p/>
        </draw:polygon>
        <draw:polygon draw:style-name="gr40" draw:text-style-name="P2" draw:layer="layout" svg:width="0.336cm" svg:height="0.229cm" svg:x="36.999cm" svg:y="5.146cm" svg:viewBox="0 0 337 230" draw:points="0,0 337,0 337,230 0,230">
          <text:p/>
        </draw:polygon>
        <draw:polygon draw:style-name="gr42" draw:text-style-name="P36" draw:layer="layout" svg:width="0.605cm" svg:height="0.229cm" svg:x="37.335cm" svg:y="5.146cm" svg:viewBox="0 0 606 230" draw:points="0,0 606,0 606,230 0,230">
          <text:p/>
        </draw:polygon>
        <draw:polygon draw:style-name="gr40" draw:text-style-name="P2" draw:layer="layout" svg:width="0.605cm" svg:height="0.229cm" svg:x="37.335cm" svg:y="5.146cm" svg:viewBox="0 0 606 230" draw:points="0,0 606,0 606,230 0,230">
          <text:p/>
        </draw:polygon>
        <draw:polygon draw:style-name="gr13" draw:text-style-name="P13" draw:layer="layout" svg:width="0.605cm" svg:height="0.229cm" svg:x="37.94cm" svg:y="5.146cm" svg:viewBox="0 0 606 230" draw:points="0,0 606,0 606,230 0,230">
          <text:p/>
        </draw:polygon>
        <draw:polygon draw:style-name="gr40" draw:text-style-name="P2" draw:layer="layout" svg:width="0.605cm" svg:height="0.229cm" svg:x="37.94cm" svg:y="5.146cm" svg:viewBox="0 0 606 230" draw:points="0,0 606,0 606,230 0,230">
          <text:p/>
        </draw:polygon>
        <draw:polygon draw:style-name="gr57" draw:text-style-name="P42" draw:layer="layout" svg:width="0.605cm" svg:height="0.229cm" svg:x="38.545cm" svg:y="5.146cm" svg:viewBox="0 0 606 230" draw:points="0,0 606,0 606,230 0,230">
          <text:p/>
        </draw:polygon>
        <draw:polygon draw:style-name="gr16" draw:text-style-name="P16" draw:layer="layout" svg:width="0.404cm" svg:height="0.229cm" svg:x="39.15cm" svg:y="5.146cm" svg:viewBox="0 0 405 230" draw:points="0,0 405,0 405,230 0,230">
          <text:p/>
        </draw:polygon>
        <draw:polygon draw:style-name="gr40" draw:text-style-name="P2" draw:layer="layout" svg:width="0.404cm" svg:height="0.229cm" svg:x="39.15cm" svg:y="5.146cm" svg:viewBox="0 0 405 230" draw:points="0,0 405,0 405,230 0,230">
          <text:p/>
        </draw:polygon>
        <draw:polygon draw:style-name="gr44" draw:text-style-name="P20" draw:layer="layout" svg:width="0.403cm" svg:height="0.229cm" svg:x="39.554cm" svg:y="5.146cm" svg:viewBox="0 0 404 230" draw:points="0,0 404,0 404,230 0,230">
          <text:p/>
        </draw:polygon>
        <draw:polygon draw:style-name="gr55" draw:text-style-name="P40" draw:layer="layout" svg:width="0.471cm" svg:height="0.229cm" svg:x="39.957cm" svg:y="5.146cm" svg:viewBox="0 0 472 230" draw:points="0,0 472,0 472,230 0,230">
          <text:p/>
        </draw:polygon>
        <draw:polygon draw:style-name="gr40" draw:text-style-name="P2" draw:layer="layout" svg:width="0.471cm" svg:height="0.229cm" svg:x="39.957cm" svg:y="5.146cm" svg:viewBox="0 0 472 230" draw:points="0,0 472,0 472,230 0,230">
          <text:p/>
        </draw:polygon>
        <draw:line draw:style-name="gr45" draw:text-style-name="P2" draw:layer="layout" svg:x1="34.505cm" svg:y1="7.43cm" svg:x2="34.505cm" svg:y2="5.146cm">
          <text:p/>
        </draw:line>
        <draw:line draw:style-name="gr45" draw:text-style-name="P2" draw:layer="layout" svg:x1="34.505cm" svg:y1="7.43cm" svg:x2="40.435cm" svg:y2="7.43cm">
          <text:p/>
        </draw:line>
        <draw:frame draw:style-name="gr50" draw:text-style-name="P38" draw:layer="layout" svg:width="3.026cm" svg:height="0.856cm" svg:x="23.743cm" svg:y="10.451cm">
          <draw:text-box>
            <text:p text:style-name="P6"><text:span text:style-name="T5">InsDel2a</text:span></text:p>
          </draw:text-box>
        </draw:frame>
        <draw:polygon draw:style-name="gr4" draw:text-style-name="P4" draw:layer="layout" svg:width="5.95cm" svg:height="2.284cm" svg:x="34.495cm" svg:y="11.432cm" svg:viewBox="0 0 5951 2285" draw:points="0,0 5951,0 5951,2285 0,2285">
          <text:p/>
        </draw:polygon>
        <draw:polygon draw:style-name="gr26" draw:text-style-name="P26" draw:layer="layout" svg:width="0.021cm" svg:height="0cm" svg:x="35.446cm" svg:y="13.682cm" svg:viewBox="0 0 22 1" draw:points="0,0 22,0 22,1 0,1">
          <text:p/>
        </draw:polygon>
        <draw:polygon draw:style-name="gr26" draw:text-style-name="P26" draw:layer="layout" svg:width="0.021cm" svg:height="0cm" svg:x="35.478cm" svg:y="13.682cm" svg:viewBox="0 0 22 1" draw:points="0,0 22,0 22,1 0,1">
          <text:p/>
        </draw:polygon>
        <draw:polygon draw:style-name="gr26" draw:text-style-name="P26" draw:layer="layout" svg:width="0.021cm" svg:height="0cm" svg:x="35.51cm" svg:y="13.682cm" svg:viewBox="0 0 22 1" draw:points="0,0 22,0 22,1 0,1">
          <text:p/>
        </draw:polygon>
        <draw:polygon draw:style-name="gr26" draw:text-style-name="P26" draw:layer="layout" svg:width="0.022cm" svg:height="0.022cm" svg:x="34.685cm" svg:y="13.661cm" svg:viewBox="0 0 23 23" draw:points="0,0 23,0 23,23 0,23">
          <text:p/>
        </draw:polygon>
        <draw:polygon draw:style-name="gr26" draw:text-style-name="P26" draw:layer="layout" svg:width="0.022cm" svg:height="0.004cm" svg:x="34.717cm" svg:y="13.679cm" svg:viewBox="0 0 23 5" draw:points="0,0 23,0 23,5 0,5">
          <text:p/>
        </draw:polygon>
        <draw:polygon draw:style-name="gr26" draw:text-style-name="P26" draw:layer="layout" svg:width="0.022cm" svg:height="0.004cm" svg:x="34.749cm" svg:y="13.68cm" svg:viewBox="0 0 23 5" draw:points="0,0 23,0 23,5 0,5">
          <text:p/>
        </draw:polygon>
        <draw:polygon draw:style-name="gr26" draw:text-style-name="P26" draw:layer="layout" svg:width="0.023cm" svg:height="0.007cm" svg:x="34.78cm" svg:y="13.677cm" svg:viewBox="0 0 24 8" draw:points="0,0 24,0 24,8 0,8">
          <text:p/>
        </draw:polygon>
        <draw:polygon draw:style-name="gr26" draw:text-style-name="P26" draw:layer="layout" svg:width="0.021cm" svg:height="0cm" svg:x="34.812cm" svg:y="13.683cm" svg:viewBox="0 0 22 0" draw:points="0,0 22,0">
          <text:p/>
        </draw:polygon>
        <draw:polygon draw:style-name="gr26" draw:text-style-name="P26" draw:layer="layout" svg:width="0.022cm" svg:height="0.004cm" svg:x="34.844cm" svg:y="13.679cm" svg:viewBox="0 0 23 5" draw:points="0,0 23,0 23,5 0,5">
          <text:p/>
        </draw:polygon>
        <draw:polygon draw:style-name="gr26" draw:text-style-name="P26" draw:layer="layout" svg:width="0.022cm" svg:height="0.005cm" svg:x="34.876cm" svg:y="13.678cm" svg:viewBox="0 0 23 6" draw:points="0,0 23,0 23,6 0,6">
          <text:p/>
        </draw:polygon>
        <draw:polygon draw:style-name="gr26" draw:text-style-name="P26" draw:layer="layout" svg:width="0.022cm" svg:height="0.001cm" svg:x="34.907cm" svg:y="13.682cm" svg:viewBox="0 0 23 2" draw:points="0,0 23,0 23,2 0,2">
          <text:p/>
        </draw:polygon>
        <draw:polygon draw:style-name="gr26" draw:text-style-name="P26" draw:layer="layout" svg:width="0.022cm" svg:height="0.002cm" svg:x="34.939cm" svg:y="13.681cm" svg:viewBox="0 0 23 3" draw:points="0,0 23,0 23,3 0,3">
          <text:p/>
        </draw:polygon>
        <draw:polygon draw:style-name="gr26" draw:text-style-name="P26" draw:layer="layout" svg:width="0.022cm" svg:height="0.012cm" svg:x="34.971cm" svg:y="13.671cm" svg:viewBox="0 0 23 13" draw:points="0,0 23,0 23,13 0,13">
          <text:p/>
        </draw:polygon>
        <draw:polygon draw:style-name="gr26" draw:text-style-name="P26" draw:layer="layout" svg:width="0.023cm" svg:height="0.004cm" svg:x="35.002cm" svg:y="13.68cm" svg:viewBox="0 0 24 5" draw:points="0,0 24,0 24,5 0,5">
          <text:p/>
        </draw:polygon>
        <draw:polygon draw:style-name="gr26" draw:text-style-name="P26" draw:layer="layout" svg:width="0.022cm" svg:height="0.007cm" svg:x="35.034cm" svg:y="13.677cm" svg:viewBox="0 0 23 8" draw:points="0,0 23,0 23,8 0,8">
          <text:p/>
        </draw:polygon>
        <draw:polygon draw:style-name="gr26" draw:text-style-name="P26" draw:layer="layout" svg:width="0.022cm" svg:height="0.01cm" svg:x="35.066cm" svg:y="13.673cm" svg:viewBox="0 0 23 11" draw:points="0,0 23,0 23,11 0,11">
          <text:p/>
        </draw:polygon>
        <draw:polygon draw:style-name="gr26" draw:text-style-name="P26" draw:layer="layout" svg:width="0.023cm" svg:height="0.003cm" svg:x="35.097cm" svg:y="13.68cm" svg:viewBox="0 0 24 4" draw:points="0,0 24,0 24,4 0,4">
          <text:p/>
        </draw:polygon>
        <draw:polygon draw:style-name="gr26" draw:text-style-name="P26" draw:layer="layout" svg:width="0.022cm" svg:height="0.016cm" svg:x="35.129cm" svg:y="13.667cm" svg:viewBox="0 0 23 17" draw:points="0,0 23,0 23,17 0,17">
          <text:p/>
        </draw:polygon>
        <draw:polygon draw:style-name="gr26" draw:text-style-name="P26" draw:layer="layout" svg:width="0.022cm" svg:height="0.022cm" svg:x="35.161cm" svg:y="13.661cm" svg:viewBox="0 0 23 23" draw:points="0,0 23,0 23,23 0,23">
          <text:p/>
        </draw:polygon>
        <draw:polygon draw:style-name="gr26" draw:text-style-name="P26" draw:layer="layout" svg:width="0.022cm" svg:height="0.005cm" svg:x="35.193cm" svg:y="13.678cm" svg:viewBox="0 0 23 6" draw:points="0,0 23,0 23,6 0,6">
          <text:p/>
        </draw:polygon>
        <draw:polygon draw:style-name="gr26" draw:text-style-name="P26" draw:layer="layout" svg:width="0.022cm" svg:height="0.014cm" svg:x="35.224cm" svg:y="13.669cm" svg:viewBox="0 0 23 15" draw:points="0,0 23,0 23,15 0,15">
          <text:p/>
        </draw:polygon>
        <draw:polygon draw:style-name="gr26" draw:text-style-name="P26" draw:layer="layout" svg:width="0.022cm" svg:height="0.018cm" svg:x="35.256cm" svg:y="13.665cm" svg:viewBox="0 0 23 19" draw:points="0,0 23,0 23,19 0,19">
          <text:p/>
        </draw:polygon>
        <draw:polygon draw:style-name="gr26" draw:text-style-name="P26" draw:layer="layout" svg:width="0.022cm" svg:height="0.009cm" svg:x="35.288cm" svg:y="13.674cm" svg:viewBox="0 0 23 10" draw:points="0,0 23,0 23,10 0,10">
          <text:p/>
        </draw:polygon>
        <draw:polygon draw:style-name="gr26" draw:text-style-name="P26" draw:layer="layout" svg:width="0.023cm" svg:height="0.003cm" svg:x="35.319cm" svg:y="13.68cm" svg:viewBox="0 0 24 4" draw:points="0,0 24,0 24,4 0,4">
          <text:p/>
        </draw:polygon>
        <draw:polygon draw:style-name="gr26" draw:text-style-name="P26" draw:layer="layout" svg:width="0.022cm" svg:height="0.003cm" svg:x="35.351cm" svg:y="13.681cm" svg:viewBox="0 0 23 4" draw:points="0,0 23,0 23,4 0,4">
          <text:p/>
        </draw:polygon>
        <draw:polygon draw:style-name="gr26" draw:text-style-name="P26" draw:layer="layout" svg:width="0.022cm" svg:height="0.003cm" svg:x="35.383cm" svg:y="13.681cm" svg:viewBox="0 0 23 4" draw:points="0,0 23,0 23,4 0,4">
          <text:p/>
        </draw:polygon>
        <draw:polygon draw:style-name="gr26" draw:text-style-name="P26" draw:layer="layout" svg:width="0.022cm" svg:height="0.001cm" svg:x="35.415cm" svg:y="13.682cm" svg:viewBox="0 0 23 2" draw:points="0,0 23,0 23,2 0,2">
          <text:p/>
        </draw:polygon>
        <draw:polygon draw:style-name="gr27" draw:text-style-name="P27" draw:layer="layout" svg:width="0.023cm" svg:height="0.483cm" svg:x="38.014cm" svg:y="13.2cm" svg:viewBox="0 0 24 484" draw:points="0,0 24,0 24,484 0,484">
          <text:p/>
        </draw:polygon>
        <draw:polygon draw:style-name="gr27" draw:text-style-name="P27" draw:layer="layout" svg:width="0.022cm" svg:height="0.909cm" svg:x="38.046cm" svg:y="12.774cm" svg:viewBox="0 0 23 910" draw:points="0,0 23,0 23,910 0,910">
          <text:p/>
        </draw:polygon>
        <draw:polygon draw:style-name="gr27" draw:text-style-name="P27" draw:layer="layout" svg:width="0.022cm" svg:height="0.281cm" svg:x="38.078cm" svg:y="13.402cm" svg:viewBox="0 0 23 282" draw:points="0,0 23,0 23,282 0,282">
          <text:p/>
        </draw:polygon>
        <draw:polygon draw:style-name="gr27" draw:text-style-name="P27" draw:layer="layout" svg:width="0.022cm" svg:height="0.011cm" svg:x="37.254cm" svg:y="13.672cm" svg:viewBox="0 0 23 12" draw:points="0,0 23,0 23,12 0,12">
          <text:p/>
        </draw:polygon>
        <draw:polygon draw:style-name="gr27" draw:text-style-name="P27" draw:layer="layout" svg:width="0.022cm" svg:height="0.005cm" svg:x="37.285cm" svg:y="13.678cm" svg:viewBox="0 0 23 6" draw:points="0,0 23,0 23,6 0,6">
          <text:p/>
        </draw:polygon>
        <draw:polygon draw:style-name="gr27" draw:text-style-name="P27" draw:layer="layout" svg:width="0.022cm" svg:height="0.005cm" svg:x="37.317cm" svg:y="13.678cm" svg:viewBox="0 0 23 6" draw:points="0,0 23,0 23,6 0,6">
          <text:p/>
        </draw:polygon>
        <draw:polygon draw:style-name="gr27" draw:text-style-name="P27" draw:layer="layout" svg:width="0.022cm" svg:height="0.008cm" svg:x="37.349cm" svg:y="13.675cm" svg:viewBox="0 0 23 9" draw:points="0,0 23,0 23,9 0,9">
          <text:p/>
        </draw:polygon>
        <draw:polygon draw:style-name="gr27" draw:text-style-name="P27" draw:layer="layout" svg:width="0.023cm" svg:height="0.009cm" svg:x="37.38cm" svg:y="13.674cm" svg:viewBox="0 0 24 10" draw:points="0,0 24,0 24,10 0,10">
          <text:p/>
        </draw:polygon>
        <draw:polygon draw:style-name="gr27" draw:text-style-name="P27" draw:layer="layout" svg:width="0.022cm" svg:height="0.004cm" svg:x="37.412cm" svg:y="13.679cm" svg:viewBox="0 0 23 5" draw:points="0,0 23,0 23,5 0,5">
          <text:p/>
        </draw:polygon>
        <draw:polygon draw:style-name="gr27" draw:text-style-name="P27" draw:layer="layout" svg:width="0.022cm" svg:height="0.012cm" svg:x="37.444cm" svg:y="13.671cm" svg:viewBox="0 0 23 13" draw:points="0,0 23,0 23,13 0,13">
          <text:p/>
        </draw:polygon>
        <draw:polygon draw:style-name="gr27" draw:text-style-name="P27" draw:layer="layout" svg:width="0.023cm" svg:height="0.019cm" svg:x="37.475cm" svg:y="13.664cm" svg:viewBox="0 0 24 20" draw:points="0,0 24,0 24,20 0,20">
          <text:p/>
        </draw:polygon>
        <draw:polygon draw:style-name="gr27" draw:text-style-name="P27" draw:layer="layout" svg:width="0.022cm" svg:height="0.005cm" svg:x="37.507cm" svg:y="13.678cm" svg:viewBox="0 0 23 6" draw:points="0,0 23,0 23,6 0,6">
          <text:p/>
        </draw:polygon>
        <draw:polygon draw:style-name="gr27" draw:text-style-name="P27" draw:layer="layout" svg:width="0.022cm" svg:height="0.028cm" svg:x="37.539cm" svg:y="13.655cm" svg:viewBox="0 0 23 29" draw:points="0,0 23,0 23,29 0,29">
          <text:p/>
        </draw:polygon>
        <draw:polygon draw:style-name="gr27" draw:text-style-name="P27" draw:layer="layout" svg:width="0.022cm" svg:height="0.043cm" svg:x="37.571cm" svg:y="13.64cm" svg:viewBox="0 0 23 44" draw:points="0,0 23,0 23,44 0,44">
          <text:p/>
        </draw:polygon>
        <draw:polygon draw:style-name="gr27" draw:text-style-name="P27" draw:layer="layout" svg:width="0.022cm" svg:height="0.013cm" svg:x="37.602cm" svg:y="13.67cm" svg:viewBox="0 0 23 14" draw:points="0,0 23,0 23,14 0,14">
          <text:p/>
        </draw:polygon>
        <draw:polygon draw:style-name="gr27" draw:text-style-name="P27" draw:layer="layout" svg:width="0.022cm" svg:height="0.106cm" svg:x="37.634cm" svg:y="13.577cm" svg:viewBox="0 0 23 107" draw:points="0,0 23,0 23,107 0,107">
          <text:p/>
        </draw:polygon>
        <draw:polygon draw:style-name="gr27" draw:text-style-name="P27" draw:layer="layout" svg:width="0.022cm" svg:height="0.135cm" svg:x="37.666cm" svg:y="13.548cm" svg:viewBox="0 0 23 136" draw:points="0,0 23,0 23,136 0,136">
          <text:p/>
        </draw:polygon>
        <draw:polygon draw:style-name="gr27" draw:text-style-name="P27" draw:layer="layout" svg:width="0.023cm" svg:height="0.065cm" svg:x="37.697cm" svg:y="13.618cm" svg:viewBox="0 0 24 66" draw:points="0,0 24,0 24,66 0,66">
          <text:p/>
        </draw:polygon>
        <draw:polygon draw:style-name="gr27" draw:text-style-name="P27" draw:layer="layout" svg:width="0.022cm" svg:height="0.192cm" svg:x="37.729cm" svg:y="13.491cm" svg:viewBox="0 0 23 193" draw:points="0,0 23,0 23,193 0,193">
          <text:p/>
        </draw:polygon>
        <draw:polygon draw:style-name="gr27" draw:text-style-name="P27" draw:layer="layout" svg:width="0.022cm" svg:height="0.272cm" svg:x="37.761cm" svg:y="13.411cm" svg:viewBox="0 0 23 273" draw:points="0,0 23,0 23,273 0,273">
          <text:p/>
        </draw:polygon>
        <draw:polygon draw:style-name="gr27" draw:text-style-name="P27" draw:layer="layout" svg:width="0.022cm" svg:height="0.132cm" svg:x="37.793cm" svg:y="13.551cm" svg:viewBox="0 0 23 133" draw:points="0,0 23,0 23,133 0,133">
          <text:p/>
        </draw:polygon>
        <draw:polygon draw:style-name="gr27" draw:text-style-name="P27" draw:layer="layout" svg:width="0.022cm" svg:height="0.248cm" svg:x="37.824cm" svg:y="13.435cm" svg:viewBox="0 0 23 249" draw:points="0,0 23,0 23,249 0,249">
          <text:p/>
        </draw:polygon>
        <draw:polygon draw:style-name="gr27" draw:text-style-name="P27" draw:layer="layout" svg:width="0.022cm" svg:height="0.74cm" svg:x="37.856cm" svg:y="12.943cm" svg:viewBox="0 0 23 741" draw:points="0,0 23,0 23,741 0,741">
          <text:p/>
        </draw:polygon>
        <draw:polygon draw:style-name="gr27" draw:text-style-name="P27" draw:layer="layout" svg:width="0.022cm" svg:height="0.264cm" svg:x="37.888cm" svg:y="13.419cm" svg:viewBox="0 0 23 265" draw:points="0,0 23,0 23,265 0,265">
          <text:p/>
        </draw:polygon>
        <draw:polygon draw:style-name="gr27" draw:text-style-name="P27" draw:layer="layout" svg:width="0.023cm" svg:height="0.353cm" svg:x="37.919cm" svg:y="13.33cm" svg:viewBox="0 0 24 354" draw:points="0,0 24,0 24,354 0,354">
          <text:p/>
        </draw:polygon>
        <draw:polygon draw:style-name="gr27" draw:text-style-name="P27" draw:layer="layout" svg:width="0.022cm" svg:height="1.1cm" svg:x="37.951cm" svg:y="12.583cm" svg:viewBox="0 0 23 1101" draw:points="0,0 23,0 23,1101 0,1101">
          <text:p/>
        </draw:polygon>
        <draw:polygon draw:style-name="gr27" draw:text-style-name="P27" draw:layer="layout" svg:width="0.022cm" svg:height="0.259cm" svg:x="37.983cm" svg:y="13.424cm" svg:viewBox="0 0 23 260" draw:points="0,0 23,0 23,260 0,260">
          <text:p/>
        </draw:polygon>
        <draw:polygon draw:style-name="gr27" draw:text-style-name="P27" draw:layer="layout" svg:width="0.022cm" svg:height="0.256cm" svg:x="38.871cm" svg:y="13.427cm" svg:viewBox="0 0 23 257" draw:points="0,0 23,0 23,257 0,257">
          <text:p/>
        </draw:polygon>
        <draw:polygon draw:style-name="gr27" draw:text-style-name="P27" draw:layer="layout" svg:width="0.022cm" svg:height="1.389cm" svg:x="38.902cm" svg:y="12.294cm" svg:viewBox="0 0 23 1390" draw:points="0,0 23,0 23,1390 0,1390">
          <text:p/>
        </draw:polygon>
        <draw:polygon draw:style-name="gr27" draw:text-style-name="P27" draw:layer="layout" svg:width="0.022cm" svg:height="0.332cm" svg:x="38.934cm" svg:y="13.351cm" svg:viewBox="0 0 23 333" draw:points="0,0 23,0 23,333 0,333">
          <text:p/>
        </draw:polygon>
        <draw:polygon draw:style-name="gr27" draw:text-style-name="P27" draw:layer="layout" svg:width="0.022cm" svg:height="0.004cm" svg:x="38.11cm" svg:y="13.68cm" svg:viewBox="0 0 23 5" draw:points="0,0 23,0 23,5 0,5">
          <text:p/>
        </draw:polygon>
        <draw:polygon draw:style-name="gr27" draw:text-style-name="P27" draw:layer="layout" svg:width="0.022cm" svg:height="0.01cm" svg:x="38.141cm" svg:y="13.673cm" svg:viewBox="0 0 23 11" draw:points="0,0 23,0 23,11 0,11">
          <text:p/>
        </draw:polygon>
        <draw:polygon draw:style-name="gr27" draw:text-style-name="P27" draw:layer="layout" svg:width="0.022cm" svg:height="0.004cm" svg:x="38.173cm" svg:y="13.679cm" svg:viewBox="0 0 23 5" draw:points="0,0 23,0 23,5 0,5">
          <text:p/>
        </draw:polygon>
        <draw:polygon draw:style-name="gr27" draw:text-style-name="P27" draw:layer="layout" svg:width="0.022cm" svg:height="0.004cm" svg:x="38.205cm" svg:y="13.679cm" svg:viewBox="0 0 23 5" draw:points="0,0 23,0 23,5 0,5">
          <text:p/>
        </draw:polygon>
        <draw:polygon draw:style-name="gr27" draw:text-style-name="P27" draw:layer="layout" svg:width="0.023cm" svg:height="0.009cm" svg:x="38.236cm" svg:y="13.674cm" svg:viewBox="0 0 24 10" draw:points="0,0 24,0 24,10 0,10">
          <text:p/>
        </draw:polygon>
        <draw:polygon draw:style-name="gr27" draw:text-style-name="P27" draw:layer="layout" svg:width="0.022cm" svg:height="0.004cm" svg:x="38.268cm" svg:y="13.68cm" svg:viewBox="0 0 23 5" draw:points="0,0 23,0 23,5 0,5">
          <text:p/>
        </draw:polygon>
        <draw:polygon draw:style-name="gr27" draw:text-style-name="P27" draw:layer="layout" svg:width="0.022cm" svg:height="0.004cm" svg:x="38.3cm" svg:y="13.679cm" svg:viewBox="0 0 23 5" draw:points="0,0 23,0 23,5 0,5">
          <text:p/>
        </draw:polygon>
        <draw:polygon draw:style-name="gr27" draw:text-style-name="P27" draw:layer="layout" svg:width="0.022cm" svg:height="0.013cm" svg:x="38.332cm" svg:y="13.67cm" svg:viewBox="0 0 23 14" draw:points="0,0 23,0 23,14 0,14">
          <text:p/>
        </draw:polygon>
        <draw:polygon draw:style-name="gr27" draw:text-style-name="P27" draw:layer="layout" svg:width="0.022cm" svg:height="0.002cm" svg:x="38.363cm" svg:y="13.681cm" svg:viewBox="0 0 23 3" draw:points="0,0 23,0 23,3 0,3">
          <text:p/>
        </draw:polygon>
        <draw:polygon draw:style-name="gr27" draw:text-style-name="P27" draw:layer="layout" svg:width="0.022cm" svg:height="0.023cm" svg:x="38.395cm" svg:y="13.66cm" svg:viewBox="0 0 23 24" draw:points="0,0 23,0 23,24 0,24">
          <text:p/>
        </draw:polygon>
        <draw:polygon draw:style-name="gr27" draw:text-style-name="P27" draw:layer="layout" svg:width="0.022cm" svg:height="0.043cm" svg:x="38.427cm" svg:y="13.64cm" svg:viewBox="0 0 23 44" draw:points="0,0 23,0 23,44 0,44">
          <text:p/>
        </draw:polygon>
        <draw:polygon draw:style-name="gr27" draw:text-style-name="P27" draw:layer="layout" svg:width="0.023cm" svg:height="0.016cm" svg:x="38.458cm" svg:y="13.667cm" svg:viewBox="0 0 24 17" draw:points="0,0 24,0 24,17 0,17">
          <text:p/>
        </draw:polygon>
        <draw:polygon draw:style-name="gr27" draw:text-style-name="P27" draw:layer="layout" svg:width="0.022cm" svg:height="0.045cm" svg:x="38.49cm" svg:y="13.638cm" svg:viewBox="0 0 23 46" draw:points="0,0 23,0 23,46 0,46">
          <text:p/>
        </draw:polygon>
        <draw:polygon draw:style-name="gr27" draw:text-style-name="P27" draw:layer="layout" svg:width="0.022cm" svg:height="0.137cm" svg:x="38.522cm" svg:y="13.546cm" svg:viewBox="0 0 23 138" draw:points="0,0 23,0 23,138 0,138">
          <text:p/>
        </draw:polygon>
        <draw:polygon draw:style-name="gr27" draw:text-style-name="P27" draw:layer="layout" svg:width="0.023cm" svg:height="0.038cm" svg:x="38.553cm" svg:y="13.645cm" svg:viewBox="0 0 24 39" draw:points="0,0 24,0 24,39 0,39">
          <text:p/>
        </draw:polygon>
        <draw:polygon draw:style-name="gr27" draw:text-style-name="P27" draw:layer="layout" svg:width="0.022cm" svg:height="0.086cm" svg:x="38.585cm" svg:y="13.597cm" svg:viewBox="0 0 23 87" draw:points="0,0 23,0 23,87 0,87">
          <text:p/>
        </draw:polygon>
        <draw:polygon draw:style-name="gr27" draw:text-style-name="P27" draw:layer="layout" svg:width="0.022cm" svg:height="0.28cm" svg:x="38.617cm" svg:y="13.403cm" svg:viewBox="0 0 23 281" draw:points="0,0 23,0 23,281 0,281">
          <text:p/>
        </draw:polygon>
        <draw:polygon draw:style-name="gr27" draw:text-style-name="P27" draw:layer="layout" svg:width="0.022cm" svg:height="0.043cm" svg:x="38.649cm" svg:y="13.64cm" svg:viewBox="0 0 23 44" draw:points="0,0 23,0 23,44 0,44">
          <text:p/>
        </draw:polygon>
        <draw:polygon draw:style-name="gr27" draw:text-style-name="P27" draw:layer="layout" svg:width="0.023cm" svg:height="0.174cm" svg:x="38.68cm" svg:y="13.509cm" svg:viewBox="0 0 24 175" draw:points="0,0 24,0 24,175 0,175">
          <text:p/>
        </draw:polygon>
        <draw:polygon draw:style-name="gr27" draw:text-style-name="P27" draw:layer="layout" svg:width="0.022cm" svg:height="1.336cm" svg:x="38.712cm" svg:y="12.347cm" svg:viewBox="0 0 23 1337" draw:points="0,0 23,0 23,1337 0,1337">
          <text:p/>
        </draw:polygon>
        <draw:polygon draw:style-name="gr27" draw:text-style-name="P27" draw:layer="layout" svg:width="0.022cm" svg:height="0.236cm" svg:x="38.744cm" svg:y="13.447cm" svg:viewBox="0 0 23 237" draw:points="0,0 23,0 23,237 0,237">
          <text:p/>
        </draw:polygon>
        <draw:polygon draw:style-name="gr27" draw:text-style-name="P27" draw:layer="layout" svg:width="0.023cm" svg:height="0.299cm" svg:x="38.775cm" svg:y="13.384cm" svg:viewBox="0 0 24 300" draw:points="0,0 24,0 24,300 0,300">
          <text:p/>
        </draw:polygon>
        <draw:polygon draw:style-name="gr27" draw:text-style-name="P27" draw:layer="layout" svg:width="0.022cm" svg:height="1.497cm" svg:x="38.807cm" svg:y="12.186cm" svg:viewBox="0 0 23 1498" draw:points="0,0 23,0 23,1498 0,1498">
          <text:p/>
        </draw:polygon>
        <draw:polygon draw:style-name="gr27" draw:text-style-name="P27" draw:layer="layout" svg:width="0.022cm" svg:height="0.332cm" svg:x="38.839cm" svg:y="13.351cm" svg:viewBox="0 0 23 333" draw:points="0,0 23,0 23,333 0,333">
          <text:p/>
        </draw:polygon>
        <draw:polygon draw:style-name="gr26" draw:text-style-name="P26" draw:layer="layout" svg:width="0.022cm" svg:height="0.011cm" svg:x="36.302cm" svg:y="13.672cm" svg:viewBox="0 0 23 12" draw:points="0,0 23,0 23,12 0,12">
          <text:p/>
        </draw:polygon>
        <draw:polygon draw:style-name="gr26" draw:text-style-name="P26" draw:layer="layout" svg:width="0.022cm" svg:height="0.002cm" svg:x="36.334cm" svg:y="13.681cm" svg:viewBox="0 0 23 3" draw:points="0,0 23,0 23,3 0,3">
          <text:p/>
        </draw:polygon>
        <draw:polygon draw:style-name="gr26" draw:text-style-name="P26" draw:layer="layout" svg:width="0.022cm" svg:height="0.004cm" svg:x="36.366cm" svg:y="13.679cm" svg:viewBox="0 0 23 5" draw:points="0,0 23,0 23,5 0,5">
          <text:p/>
        </draw:polygon>
        <draw:polygon draw:style-name="gr26" draw:text-style-name="P26" draw:layer="layout" svg:width="0.023cm" svg:height="0.004cm" svg:x="35.541cm" svg:y="13.68cm" svg:viewBox="0 0 24 5" draw:points="0,0 24,0 24,5 0,5">
          <text:p/>
        </draw:polygon>
        <draw:polygon draw:style-name="gr26" draw:text-style-name="P26" draw:layer="layout" svg:width="0.022cm" svg:height="0.004cm" svg:x="35.573cm" svg:y="13.679cm" svg:viewBox="0 0 23 5" draw:points="0,0 23,0 23,5 0,5">
          <text:p/>
        </draw:polygon>
        <draw:polygon draw:style-name="gr26" draw:text-style-name="P26" draw:layer="layout" svg:width="0.022cm" svg:height="0.005cm" svg:x="35.605cm" svg:y="13.678cm" svg:viewBox="0 0 23 6" draw:points="0,0 23,0 23,6 0,6">
          <text:p/>
        </draw:polygon>
        <draw:polygon draw:style-name="gr26" draw:text-style-name="P26" draw:layer="layout" svg:width="0.022cm" svg:height="0.008cm" svg:x="35.637cm" svg:y="13.676cm" svg:viewBox="0 0 23 9" draw:points="0,0 23,0 23,9 0,9">
          <text:p/>
        </draw:polygon>
        <draw:polygon draw:style-name="gr26" draw:text-style-name="P26" draw:layer="layout" svg:width="0.022cm" svg:height="0.003cm" svg:x="35.668cm" svg:y="13.681cm" svg:viewBox="0 0 23 4" draw:points="0,0 23,0 23,4 0,4">
          <text:p/>
        </draw:polygon>
        <draw:polygon draw:style-name="gr26" draw:text-style-name="P26" draw:layer="layout" svg:width="0.022cm" svg:height="0.004cm" svg:x="35.7cm" svg:y="13.679cm" svg:viewBox="0 0 23 5" draw:points="0,0 23,0 23,5 0,5">
          <text:p/>
        </draw:polygon>
        <draw:polygon draw:style-name="gr26" draw:text-style-name="P26" draw:layer="layout" svg:width="0.022cm" svg:height="0.008cm" svg:x="35.732cm" svg:y="13.675cm" svg:viewBox="0 0 23 9" draw:points="0,0 23,0 23,9 0,9">
          <text:p/>
        </draw:polygon>
        <draw:polygon draw:style-name="gr26" draw:text-style-name="P26" draw:layer="layout" svg:width="0.022cm" svg:height="0.004cm" svg:x="35.763cm" svg:y="13.679cm" svg:viewBox="0 0 23 5" draw:points="0,0 23,0 23,5 0,5">
          <text:p/>
        </draw:polygon>
        <draw:polygon draw:style-name="gr26" draw:text-style-name="P26" draw:layer="layout" svg:width="0.022cm" svg:height="0.006cm" svg:x="35.795cm" svg:y="13.677cm" svg:viewBox="0 0 23 7" draw:points="0,0 23,0 23,7 0,7">
          <text:p/>
        </draw:polygon>
        <draw:polygon draw:style-name="gr26" draw:text-style-name="P26" draw:layer="layout" svg:width="0.022cm" svg:height="0.081cm" svg:x="35.827cm" svg:y="13.602cm" svg:viewBox="0 0 23 82" draw:points="0,0 23,0 23,82 0,82">
          <text:p/>
        </draw:polygon>
        <draw:polygon draw:style-name="gr26" draw:text-style-name="P26" draw:layer="layout" svg:width="0.023cm" svg:height="0.043cm" svg:x="35.858cm" svg:y="13.64cm" svg:viewBox="0 0 24 44" draw:points="0,0 24,0 24,44 0,44">
          <text:p/>
        </draw:polygon>
        <draw:polygon draw:style-name="gr26" draw:text-style-name="P26" draw:layer="layout" svg:width="0.022cm" svg:height="0.022cm" svg:x="35.89cm" svg:y="13.661cm" svg:viewBox="0 0 23 23" draw:points="0,0 23,0 23,23 0,23">
          <text:p/>
        </draw:polygon>
        <draw:polygon draw:style-name="gr26" draw:text-style-name="P26" draw:layer="layout" svg:width="0.022cm" svg:height="0.08cm" svg:x="35.922cm" svg:y="13.603cm" svg:viewBox="0 0 23 81" draw:points="0,0 23,0 23,81 0,81">
          <text:p/>
        </draw:polygon>
        <draw:polygon draw:style-name="gr26" draw:text-style-name="P26" draw:layer="layout" svg:width="0.022cm" svg:height="0.022cm" svg:x="35.954cm" svg:y="13.661cm" svg:viewBox="0 0 23 23" draw:points="0,0 23,0 23,23 0,23">
          <text:p/>
        </draw:polygon>
        <draw:polygon draw:style-name="gr26" draw:text-style-name="P26" draw:layer="layout" svg:width="0.022cm" svg:height="0.063cm" svg:x="35.985cm" svg:y="13.62cm" svg:viewBox="0 0 23 64" draw:points="0,0 23,0 23,64 0,64">
          <text:p/>
        </draw:polygon>
        <draw:polygon draw:style-name="gr26" draw:text-style-name="P26" draw:layer="layout" svg:width="0.022cm" svg:height="0.107cm" svg:x="36.017cm" svg:y="13.576cm" svg:viewBox="0 0 23 108" draw:points="0,0 23,0 23,108 0,108">
          <text:p/>
        </draw:polygon>
        <draw:polygon draw:style-name="gr26" draw:text-style-name="P26" draw:layer="layout" svg:width="0.022cm" svg:height="0.029cm" svg:x="36.049cm" svg:y="13.654cm" svg:viewBox="0 0 23 30" draw:points="0,0 23,0 23,30 0,30">
          <text:p/>
        </draw:polygon>
        <draw:polygon draw:style-name="gr26" draw:text-style-name="P26" draw:layer="layout" svg:width="0.023cm" svg:height="0.044cm" svg:x="36.08cm" svg:y="13.639cm" svg:viewBox="0 0 24 45" draw:points="0,0 24,0 24,45 0,45">
          <text:p/>
        </draw:polygon>
        <draw:polygon draw:style-name="gr26" draw:text-style-name="P26" draw:layer="layout" svg:width="0.022cm" svg:height="0.062cm" svg:x="36.112cm" svg:y="13.621cm" svg:viewBox="0 0 23 63" draw:points="0,0 23,0 23,63 0,63">
          <text:p/>
        </draw:polygon>
        <draw:polygon draw:style-name="gr26" draw:text-style-name="P26" draw:layer="layout" svg:width="0.022cm" svg:height="0.018cm" svg:x="36.144cm" svg:y="13.665cm" svg:viewBox="0 0 23 19" draw:points="0,0 23,0 23,19 0,19">
          <text:p/>
        </draw:polygon>
        <draw:polygon draw:style-name="gr26" draw:text-style-name="P26" draw:layer="layout" svg:width="0.022cm" svg:height="0.025cm" svg:x="36.176cm" svg:y="13.658cm" svg:viewBox="0 0 23 26" draw:points="0,0 23,0 23,26 0,26">
          <text:p/>
        </draw:polygon>
        <draw:polygon draw:style-name="gr26" draw:text-style-name="P26" draw:layer="layout" svg:width="0.022cm" svg:height="0.029cm" svg:x="36.207cm" svg:y="13.654cm" svg:viewBox="0 0 23 30" draw:points="0,0 23,0 23,30 0,30">
          <text:p/>
        </draw:polygon>
        <draw:polygon draw:style-name="gr26" draw:text-style-name="P26" draw:layer="layout" svg:width="0.022cm" svg:height="0.008cm" svg:x="36.239cm" svg:y="13.675cm" svg:viewBox="0 0 23 9" draw:points="0,0 23,0 23,9 0,9">
          <text:p/>
        </draw:polygon>
        <draw:polygon draw:style-name="gr26" draw:text-style-name="P26" draw:layer="layout" svg:width="0.022cm" svg:height="0.015cm" svg:x="36.271cm" svg:y="13.668cm" svg:viewBox="0 0 23 16" draw:points="0,0 23,0 23,16 0,16">
          <text:p/>
        </draw:polygon>
        <draw:polygon draw:style-name="gr27" draw:text-style-name="P27" draw:layer="layout" svg:width="0.022cm" svg:height="0.705cm" svg:x="39.727cm" svg:y="12.978cm" svg:viewBox="0 0 23 706" draw:points="0,0 23,0 23,706 0,706">
          <text:p/>
        </draw:polygon>
        <draw:polygon draw:style-name="gr27" draw:text-style-name="P27" draw:layer="layout" svg:width="0.022cm" svg:height="0.724cm" svg:x="39.758cm" svg:y="12.959cm" svg:viewBox="0 0 23 725" draw:points="0,0 23,0 23,725 0,725">
          <text:p/>
        </draw:polygon>
        <draw:polygon draw:style-name="gr27" draw:text-style-name="P27" draw:layer="layout" svg:width="0.022cm" svg:height="0.49cm" svg:x="39.79cm" svg:y="13.193cm" svg:viewBox="0 0 23 491" draw:points="0,0 23,0 23,491 0,491">
          <text:p/>
        </draw:polygon>
        <draw:polygon draw:style-name="gr27" draw:text-style-name="P27" draw:layer="layout" svg:width="0.022cm" svg:height="0.003cm" svg:x="38.966cm" svg:y="13.681cm" svg:viewBox="0 0 23 4" draw:points="0,0 23,0 23,4 0,4">
          <text:p/>
        </draw:polygon>
        <draw:polygon draw:style-name="gr27" draw:text-style-name="P27" draw:layer="layout" svg:width="0.023cm" svg:height="0.004cm" svg:x="38.997cm" svg:y="13.679cm" svg:viewBox="0 0 24 5" draw:points="0,0 24,0 24,5 0,5">
          <text:p/>
        </draw:polygon>
        <draw:polygon draw:style-name="gr27" draw:text-style-name="P27" draw:layer="layout" svg:width="0.022cm" svg:height="0.008cm" svg:x="39.029cm" svg:y="13.676cm" svg:viewBox="0 0 23 9" draw:points="0,0 23,0 23,9 0,9">
          <text:p/>
        </draw:polygon>
        <draw:polygon draw:style-name="gr27" draw:text-style-name="P27" draw:layer="layout" svg:width="0.022cm" svg:height="0.01cm" svg:x="39.061cm" svg:y="13.673cm" svg:viewBox="0 0 23 11" draw:points="0,0 23,0 23,11 0,11">
          <text:p/>
        </draw:polygon>
        <draw:polygon draw:style-name="gr27" draw:text-style-name="P27" draw:layer="layout" svg:width="0.023cm" svg:height="0.011cm" svg:x="39.092cm" svg:y="13.672cm" svg:viewBox="0 0 24 12" draw:points="0,0 24,0 24,12 0,12">
          <text:p/>
        </draw:polygon>
        <draw:polygon draw:style-name="gr27" draw:text-style-name="P27" draw:layer="layout" svg:width="0.022cm" svg:height="0.01cm" svg:x="39.124cm" svg:y="13.673cm" svg:viewBox="0 0 23 11" draw:points="0,0 23,0 23,11 0,11">
          <text:p/>
        </draw:polygon>
        <draw:polygon draw:style-name="gr27" draw:text-style-name="P27" draw:layer="layout" svg:width="0.022cm" svg:height="0.033cm" svg:x="39.156cm" svg:y="13.65cm" svg:viewBox="0 0 23 34" draw:points="0,0 23,0 23,34 0,34">
          <text:p/>
        </draw:polygon>
        <draw:polygon draw:style-name="gr27" draw:text-style-name="P27" draw:layer="layout" svg:width="0.022cm" svg:height="0.174cm" svg:x="39.188cm" svg:y="13.509cm" svg:viewBox="0 0 23 175" draw:points="0,0 23,0 23,175 0,175">
          <text:p/>
        </draw:polygon>
        <draw:polygon draw:style-name="gr27" draw:text-style-name="P27" draw:layer="layout" svg:width="0.022cm" svg:height="0.049cm" svg:x="39.219cm" svg:y="13.634cm" svg:viewBox="0 0 23 50" draw:points="0,0 23,0 23,50 0,50">
          <text:p/>
        </draw:polygon>
        <draw:polygon draw:style-name="gr27" draw:text-style-name="P27" draw:layer="layout" svg:width="0.022cm" svg:height="0.268cm" svg:x="39.251cm" svg:y="13.415cm" svg:viewBox="0 0 23 269" draw:points="0,0 23,0 23,269 0,269">
          <text:p/>
        </draw:polygon>
        <draw:polygon draw:style-name="gr27" draw:text-style-name="P27" draw:layer="layout" svg:width="0.022cm" svg:height="0.184cm" svg:x="39.283cm" svg:y="13.499cm" svg:viewBox="0 0 23 185" draw:points="0,0 23,0 23,185 0,185">
          <text:p/>
        </draw:polygon>
        <draw:polygon draw:style-name="gr27" draw:text-style-name="P27" draw:layer="layout" svg:width="0.023cm" svg:height="0.278cm" svg:x="39.314cm" svg:y="13.405cm" svg:viewBox="0 0 24 279" draw:points="0,0 24,0 24,279 0,279">
          <text:p/>
        </draw:polygon>
        <draw:polygon draw:style-name="gr27" draw:text-style-name="P27" draw:layer="layout" svg:width="0.022cm" svg:height="0.559cm" svg:x="39.346cm" svg:y="13.124cm" svg:viewBox="0 0 23 560" draw:points="0,0 23,0 23,560 0,560">
          <text:p/>
        </draw:polygon>
        <draw:polygon draw:style-name="gr27" draw:text-style-name="P27" draw:layer="layout" svg:width="0.022cm" svg:height="0.31cm" svg:x="39.378cm" svg:y="13.373cm" svg:viewBox="0 0 23 311" draw:points="0,0 23,0 23,311 0,311">
          <text:p/>
        </draw:polygon>
        <draw:polygon draw:style-name="gr27" draw:text-style-name="P27" draw:layer="layout" svg:width="0.022cm" svg:height="0.194cm" svg:x="39.41cm" svg:y="13.489cm" svg:viewBox="0 0 23 195" draw:points="0,0 23,0 23,195 0,195">
          <text:p/>
        </draw:polygon>
        <draw:polygon draw:style-name="gr27" draw:text-style-name="P27" draw:layer="layout" svg:width="0.022cm" svg:height="0.528cm" svg:x="39.441cm" svg:y="13.155cm" svg:viewBox="0 0 23 529" draw:points="0,0 23,0 23,529 0,529">
          <text:p/>
        </draw:polygon>
        <draw:polygon draw:style-name="gr27" draw:text-style-name="P27" draw:layer="layout" svg:width="0.022cm" svg:height="0.269cm" svg:x="39.473cm" svg:y="13.414cm" svg:viewBox="0 0 23 270" draw:points="0,0 23,0 23,270 0,270">
          <text:p/>
        </draw:polygon>
        <draw:polygon draw:style-name="gr27" draw:text-style-name="P27" draw:layer="layout" svg:width="0.022cm" svg:height="0.39cm" svg:x="39.505cm" svg:y="13.293cm" svg:viewBox="0 0 23 391" draw:points="0,0 23,0 23,391 0,391">
          <text:p/>
        </draw:polygon>
        <draw:polygon draw:style-name="gr27" draw:text-style-name="P27" draw:layer="layout" svg:width="0.023cm" svg:height="0.626cm" svg:x="39.536cm" svg:y="13.057cm" svg:viewBox="0 0 24 627" draw:points="0,0 24,0 24,627 0,627">
          <text:p/>
        </draw:polygon>
        <draw:polygon draw:style-name="gr27" draw:text-style-name="P27" draw:layer="layout" svg:width="0.022cm" svg:height="0.609cm" svg:x="39.568cm" svg:y="13.074cm" svg:viewBox="0 0 23 610" draw:points="0,0 23,0 23,610 0,610">
          <text:p/>
        </draw:polygon>
        <draw:polygon draw:style-name="gr27" draw:text-style-name="P27" draw:layer="layout" svg:width="0.022cm" svg:height="0.624cm" svg:x="39.6cm" svg:y="13.059cm" svg:viewBox="0 0 23 625" draw:points="0,0 23,0 23,625 0,625">
          <text:p/>
        </draw:polygon>
        <draw:polygon draw:style-name="gr27" draw:text-style-name="P27" draw:layer="layout" svg:width="0.022cm" svg:height="0.727cm" svg:x="39.632cm" svg:y="12.956cm" svg:viewBox="0 0 23 728" draw:points="0,0 23,0 23,728 0,728">
          <text:p/>
        </draw:polygon>
        <draw:polygon draw:style-name="gr27" draw:text-style-name="P27" draw:layer="layout" svg:width="0.022cm" svg:height="0.653cm" svg:x="39.663cm" svg:y="13.03cm" svg:viewBox="0 0 23 654" draw:points="0,0 23,0 23,654 0,654">
          <text:p/>
        </draw:polygon>
        <draw:polygon draw:style-name="gr27" draw:text-style-name="P27" draw:layer="layout" svg:width="0.022cm" svg:height="0.501cm" svg:x="39.695cm" svg:y="13.182cm" svg:viewBox="0 0 23 502" draw:points="0,0 23,0 23,502 0,502">
          <text:p/>
        </draw:polygon>
        <draw:polygon draw:style-name="gr26" draw:text-style-name="P26" draw:layer="layout" svg:width="0.022cm" svg:height="0cm" svg:x="37.158cm" svg:y="13.682cm" svg:viewBox="0 0 23 1" draw:points="0,0 23,0 23,1 0,1">
          <text:p/>
        </draw:polygon>
        <draw:polygon draw:style-name="gr26" draw:text-style-name="P26" draw:layer="layout" svg:width="0.021cm" svg:height="0cm" svg:x="37.19cm" svg:y="13.682cm" svg:viewBox="0 0 22 1" draw:points="0,0 22,0 22,1 0,1">
          <text:p/>
        </draw:polygon>
        <draw:polygon draw:style-name="gr26" draw:text-style-name="P26" draw:layer="layout" svg:width="0.021cm" svg:height="0cm" svg:x="37.222cm" svg:y="13.682cm" svg:viewBox="0 0 22 1" draw:points="0,0 22,0 22,1 0,1">
          <text:p/>
        </draw:polygon>
        <draw:polygon draw:style-name="gr26" draw:text-style-name="P26" draw:layer="layout" svg:width="0.023cm" svg:height="0.005cm" svg:x="36.397cm" svg:y="13.678cm" svg:viewBox="0 0 24 6" draw:points="0,0 24,0 24,6 0,6">
          <text:p/>
        </draw:polygon>
        <draw:polygon draw:style-name="gr26" draw:text-style-name="P26" draw:layer="layout" svg:width="0.022cm" svg:height="0.003cm" svg:x="36.429cm" svg:y="13.681cm" svg:viewBox="0 0 23 4" draw:points="0,0 23,0 23,4 0,4">
          <text:p/>
        </draw:polygon>
        <draw:polygon draw:style-name="gr26" draw:text-style-name="P26" draw:layer="layout" svg:width="0.022cm" svg:height="0.018cm" svg:x="36.461cm" svg:y="13.665cm" svg:viewBox="0 0 23 19" draw:points="0,0 23,0 23,19 0,19">
          <text:p/>
        </draw:polygon>
        <draw:polygon draw:style-name="gr26" draw:text-style-name="P26" draw:layer="layout" svg:width="0.022cm" svg:height="0.005cm" svg:x="36.493cm" svg:y="13.678cm" svg:viewBox="0 0 23 6" draw:points="0,0 23,0 23,6 0,6">
          <text:p/>
        </draw:polygon>
        <draw:polygon draw:style-name="gr26" draw:text-style-name="P26" draw:layer="layout" svg:width="0.022cm" svg:height="0.001cm" svg:x="36.524cm" svg:y="13.682cm" svg:viewBox="0 0 23 2" draw:points="0,0 23,0 23,2 0,2">
          <text:p/>
        </draw:polygon>
        <draw:polygon draw:style-name="gr26" draw:text-style-name="P26" draw:layer="layout" svg:width="0.022cm" svg:height="0.004cm" svg:x="36.556cm" svg:y="13.679cm" svg:viewBox="0 0 23 5" draw:points="0,0 23,0 23,5 0,5">
          <text:p/>
        </draw:polygon>
        <draw:polygon draw:style-name="gr26" draw:text-style-name="P26" draw:layer="layout" svg:width="0.022cm" svg:height="0.008cm" svg:x="36.588cm" svg:y="13.676cm" svg:viewBox="0 0 23 9" draw:points="0,0 23,0 23,9 0,9">
          <text:p/>
        </draw:polygon>
        <draw:polygon draw:style-name="gr26" draw:text-style-name="P26" draw:layer="layout" svg:width="0.022cm" svg:height="0cm" svg:x="36.619cm" svg:y="13.682cm" svg:viewBox="0 0 23 1" draw:points="0,0 23,0 23,1 0,1">
          <text:p/>
        </draw:polygon>
        <draw:polygon draw:style-name="gr26" draw:text-style-name="P26" draw:layer="layout" svg:width="0.022cm" svg:height="0.005cm" svg:x="36.651cm" svg:y="13.678cm" svg:viewBox="0 0 23 6" draw:points="0,0 23,0 23,6 0,6">
          <text:p/>
        </draw:polygon>
        <draw:polygon draw:style-name="gr26" draw:text-style-name="P26" draw:layer="layout" svg:width="0.022cm" svg:height="0.016cm" svg:x="36.683cm" svg:y="13.667cm" svg:viewBox="0 0 23 17" draw:points="0,0 23,0 23,17 0,17">
          <text:p/>
        </draw:polygon>
        <draw:polygon draw:style-name="gr26" draw:text-style-name="P26" draw:layer="layout" svg:width="0.023cm" svg:height="0.005cm" svg:x="36.714cm" svg:y="13.678cm" svg:viewBox="0 0 24 6" draw:points="0,0 24,0 24,6 0,6">
          <text:p/>
        </draw:polygon>
        <draw:polygon draw:style-name="gr26" draw:text-style-name="P26" draw:layer="layout" svg:width="0.022cm" svg:height="0.008cm" svg:x="36.746cm" svg:y="13.676cm" svg:viewBox="0 0 23 9" draw:points="0,0 23,0 23,9 0,9">
          <text:p/>
        </draw:polygon>
        <draw:polygon draw:style-name="gr26" draw:text-style-name="P26" draw:layer="layout" svg:width="0.022cm" svg:height="0.015cm" svg:x="36.778cm" svg:y="13.668cm" svg:viewBox="0 0 23 16" draw:points="0,0 23,0 23,16 0,16">
          <text:p/>
        </draw:polygon>
        <draw:polygon draw:style-name="gr26" draw:text-style-name="P26" draw:layer="layout" svg:width="0.022cm" svg:height="0.004cm" svg:x="36.81cm" svg:y="13.679cm" svg:viewBox="0 0 23 5" draw:points="0,0 23,0 23,5 0,5">
          <text:p/>
        </draw:polygon>
        <draw:polygon draw:style-name="gr26" draw:text-style-name="P26" draw:layer="layout" svg:width="0.022cm" svg:height="0.018cm" svg:x="36.841cm" svg:y="13.665cm" svg:viewBox="0 0 23 19" draw:points="0,0 23,0 23,19 0,19">
          <text:p/>
        </draw:polygon>
        <draw:polygon draw:style-name="gr26" draw:text-style-name="P26" draw:layer="layout" svg:width="0.022cm" svg:height="0.016cm" svg:x="36.873cm" svg:y="13.667cm" svg:viewBox="0 0 23 17" draw:points="0,0 23,0 23,17 0,17">
          <text:p/>
        </draw:polygon>
        <draw:polygon draw:style-name="gr26" draw:text-style-name="P26" draw:layer="layout" svg:width="0.022cm" svg:height="0.007cm" svg:x="36.905cm" svg:y="13.677cm" svg:viewBox="0 0 23 8" draw:points="0,0 23,0 23,8 0,8">
          <text:p/>
        </draw:polygon>
        <draw:polygon draw:style-name="gr26" draw:text-style-name="P26" draw:layer="layout" svg:width="0.023cm" svg:height="0.015cm" svg:x="36.936cm" svg:y="13.669cm" svg:viewBox="0 0 24 16" draw:points="0,0 24,0 24,16 0,16">
          <text:p/>
        </draw:polygon>
        <draw:polygon draw:style-name="gr26" draw:text-style-name="P26" draw:layer="layout" svg:width="0.022cm" svg:height="0.011cm" svg:x="36.968cm" svg:y="13.672cm" svg:viewBox="0 0 23 12" draw:points="0,0 23,0 23,12 0,12">
          <text:p/>
        </draw:polygon>
        <draw:polygon draw:style-name="gr26" draw:text-style-name="P26" draw:layer="layout" svg:width="0.022cm" svg:height="0.004cm" svg:x="37cm" svg:y="13.679cm" svg:viewBox="0 0 23 5" draw:points="0,0 23,0 23,5 0,5">
          <text:p/>
        </draw:polygon>
        <draw:polygon draw:style-name="gr26" draw:text-style-name="P26" draw:layer="layout" svg:width="0.022cm" svg:height="0.015cm" svg:x="37.032cm" svg:y="13.668cm" svg:viewBox="0 0 23 16" draw:points="0,0 23,0 23,16 0,16">
          <text:p/>
        </draw:polygon>
        <draw:polygon draw:style-name="gr26" draw:text-style-name="P26" draw:layer="layout" svg:width="0.022cm" svg:height="0.004cm" svg:x="37.063cm" svg:y="13.68cm" svg:viewBox="0 0 23 5" draw:points="0,0 23,0 23,5 0,5">
          <text:p/>
        </draw:polygon>
        <draw:polygon draw:style-name="gr26" draw:text-style-name="P26" draw:layer="layout" svg:width="0.022cm" svg:height="0.003cm" svg:x="37.095cm" svg:y="13.681cm" svg:viewBox="0 0 23 4" draw:points="0,0 23,0 23,4 0,4">
          <text:p/>
        </draw:polygon>
        <draw:polygon draw:style-name="gr26" draw:text-style-name="P26" draw:layer="layout" svg:width="0.022cm" svg:height="0.003cm" svg:x="37.127cm" svg:y="13.681cm" svg:viewBox="0 0 23 4" draw:points="0,0 23,0 23,4 0,4">
          <text:p/>
        </draw:polygon>
        <draw:polygon draw:style-name="gr46" draw:text-style-name="P26" draw:layer="layout" svg:width="2.568cm" svg:height="0.179cm" svg:x="34.681cm" svg:y="11.483cm" svg:viewBox="0 0 2569 180" draw:points="0,0 2569,0 2569,180 0,180">
          <text:p/>
        </draw:polygon>
        <draw:polygon draw:style-name="gr47" draw:text-style-name="P27" draw:layer="layout" svg:width="2.568cm" svg:height="0.179cm" svg:x="37.249cm" svg:y="11.483cm" svg:viewBox="0 0 2569 180" draw:points="0,0 2569,0 2569,180 0,180">
          <text:p/>
        </draw:polygon>
        <draw:line draw:style-name="gr48" draw:text-style-name="P2" draw:layer="layout" svg:x1="37.929cm" svg:y1="12.122cm" svg:x2="38.787cm" svg:y2="12.197cm">
          <text:p/>
        </draw:line>
        <draw:polygon draw:style-name="gr48" draw:text-style-name="P2" draw:layer="layout" svg:width="0.026cm" svg:height="0.035cm" svg:x="38.76cm" svg:y="12.176cm" svg:viewBox="0 0 27 36" draw:points="0,36 27,20 2,0">
          <text:p/>
        </draw:polygon>
        <draw:line draw:style-name="gr48" draw:text-style-name="P2" draw:layer="layout" svg:x1="39.213cm" svg:y1="12.129cm" svg:x2="38.94cm" svg:y2="12.282cm">
          <text:p/>
        </draw:line>
        <draw:polygon draw:style-name="gr48" draw:text-style-name="P2" draw:layer="layout" svg:width="0.023cm" svg:height="0.02cm" svg:x="38.929cm" svg:y="12.271cm" svg:viewBox="0 0 24 21" draw:points="10,0 0,21 24,18">
          <text:p/>
        </draw:polygon>
        <draw:line draw:style-name="gr48" draw:text-style-name="P2" draw:layer="layout" svg:x1="37.528cm" svg:y1="12.507cm" svg:x2="38.699cm" svg:y2="12.361cm">
          <text:p/>
        </draw:line>
        <draw:polygon draw:style-name="gr4" draw:text-style-name="P4" draw:layer="layout" svg:width="0.02cm" svg:height="0.022cm" svg:x="38.493cm" svg:y="12.313cm" svg:viewBox="0 0 21 23" draw:points="0,23 21,13 2,0">
          <text:p/>
        </draw:polygon>
        <draw:polygon draw:style-name="gr48" draw:text-style-name="P2" draw:layer="layout" svg:width="0.033cm" svg:height="0.029cm" svg:x="38.672cm" svg:y="12.352cm" svg:viewBox="0 0 34 30" draw:points="8,30 34,6 0,0">
          <text:p/>
        </draw:polygon>
        <draw:polygon draw:style-name="gr4" draw:text-style-name="P4" draw:layer="layout" svg:width="0.023cm" svg:height="0.021cm" svg:x="37.863cm" svg:y="12.615cm" svg:viewBox="0 0 24 22" draw:points="9,22 24,2 0,0">
          <text:p/>
        </draw:polygon>
        <draw:frame draw:style-name="gr58" draw:text-style-name="P38" draw:layer="layout" svg:width="2.983cm" svg:height="0.856cm" svg:x="35.984cm" svg:y="4.174cm">
          <draw:text-box>
            <text:p text:style-name="P6"><text:span text:style-name="T5">InsDel2c</text:span></text:p>
          </draw:text-box>
        </draw:frame>
        <draw:frame draw:style-name="gr59" draw:text-style-name="P39" draw:layer="layout" svg:width="2.013cm" svg:height="0.357cm" svg:x="35.922cm" svg:y="11.869cm">
          <draw:text-box>
            <text:p text:style-name="P6"><text:span text:style-name="T6">C[Del(T):R8]C</text:span></text:p>
          </draw:text-box>
        </draw:frame>
        <draw:frame draw:style-name="gr60" draw:text-style-name="P39" draw:layer="layout" svg:width="2.313cm" svg:height="0.357cm" svg:x="38.085cm" svg:y="11.723cm">
          <draw:text-box>
            <text:p text:style-name="P6"><text:span text:style-name="T6">C[Del(T):R(9,)]C</text:span></text:p>
          </draw:text-box>
        </draw:frame>
        <draw:line draw:style-name="gr45" draw:text-style-name="P2" draw:layer="layout" svg:x1="34.608cm" svg:y1="13.749cm" svg:x2="34.608cm" svg:y2="11.483cm">
          <text:p/>
        </draw:line>
        <draw:line draw:style-name="gr53" draw:text-style-name="P2" draw:layer="layout" svg:x1="37.249cm" svg:y1="13.314cm" svg:x2="37.249cm" svg:y2="13.749cm">
          <text:p/>
        </draw:line>
        <draw:line draw:style-name="gr53" draw:text-style-name="P2" draw:layer="layout" svg:x1="35.537cm" svg:y1="13.314cm" svg:x2="35.537cm" svg:y2="13.749cm">
          <text:p/>
        </draw:line>
        <draw:line draw:style-name="gr53" draw:text-style-name="P2" draw:layer="layout" svg:x1="38.961cm" svg:y1="13.314cm" svg:x2="38.961cm" svg:y2="13.749cm">
          <text:p/>
        </draw:line>
        <draw:line draw:style-name="gr53" draw:text-style-name="P2" draw:layer="layout" svg:x1="36.393cm" svg:y1="13.314cm" svg:x2="36.393cm" svg:y2="13.749cm">
          <text:p/>
        </draw:line>
        <draw:line draw:style-name="gr53" draw:text-style-name="P2" draw:layer="layout" svg:x1="39.817cm" svg:y1="13.314cm" svg:x2="39.817cm" svg:y2="13.749cm">
          <text:p/>
        </draw:line>
        <draw:line draw:style-name="gr53" draw:text-style-name="P2" draw:layer="layout" svg:x1="38.105cm" svg:y1="13.314cm" svg:x2="38.105cm" svg:y2="13.749cm">
          <text:p/>
        </draw:line>
        <draw:frame draw:style-name="gr59" draw:text-style-name="P39" draw:layer="layout" svg:width="2.013cm" svg:height="0.357cm" svg:x="35.388cm" svg:y="12.33cm">
          <draw:text-box>
            <text:p text:style-name="P6"><text:span text:style-name="T6">C[Del(T):R7]C</text:span></text:p>
          </draw:text-box>
        </draw:frame>
        <draw:line draw:style-name="gr34" draw:text-style-name="P2" draw:layer="layout" svg:x1="37.47cm" svg:y1="8.819cm" svg:x2="37.47cm" svg:y2="8.1cm">
          <text:p/>
        </draw:line>
        <draw:polygon draw:style-name="gr35" draw:text-style-name="P31" draw:layer="layout" svg:width="0.54cm" svg:height="0.27cm" svg:x="37.2cm" svg:y="7.866cm" svg:viewBox="0 0 541 271" draw:points="0,271 541,271 271,0">
          <text:p/>
        </draw:polygon>
        <draw:polygon draw:style-name="gr4" draw:text-style-name="P4" draw:layer="layout" svg:width="5.93cm" svg:height="2.284cm" svg:x="28.399cm" svg:y="5.146cm" svg:viewBox="0 0 5931 2285" draw:points="0,0 5931,0 5931,2285 0,2285">
          <text:p/>
        </draw:polygon>
        <draw:polygon draw:style-name="gr10" draw:text-style-name="P10" draw:layer="layout" svg:width="0.047cm" svg:height="0.043cm" svg:x="28.944cm" svg:y="7.387cm" svg:viewBox="0 0 48 44" draw:points="0,0 48,0 48,44 0,44">
          <text:p/>
        </draw:polygon>
        <draw:polygon draw:style-name="gr10" draw:text-style-name="P10" draw:layer="layout" svg:width="0.047cm" svg:height="0.19cm" svg:x="28.809cm" svg:y="7.24cm" svg:viewBox="0 0 48 191" draw:points="0,0 48,0 48,191 0,191">
          <text:p/>
        </draw:polygon>
        <draw:polygon draw:style-name="gr10" draw:text-style-name="P10" draw:layer="layout" svg:width="0.048cm" svg:height="0.171cm" svg:x="28.876cm" svg:y="7.259cm" svg:viewBox="0 0 49 172" draw:points="0,0 49,0 49,172 0,172">
          <text:p/>
        </draw:polygon>
        <draw:polygon draw:style-name="gr10" draw:text-style-name="P10" draw:layer="layout" svg:width="0.047cm" svg:height="0.008cm" svg:x="28.406cm" svg:y="7.422cm" svg:viewBox="0 0 48 9" draw:points="0,0 48,0 48,9 0,9">
          <text:p/>
        </draw:polygon>
        <draw:polygon draw:style-name="gr10" draw:text-style-name="P10" draw:layer="layout" svg:width="0.047cm" svg:height="0.005cm" svg:x="28.473cm" svg:y="7.426cm" svg:viewBox="0 0 48 6" draw:points="0,0 48,0 48,6 0,6">
          <text:p/>
        </draw:polygon>
        <draw:polygon draw:style-name="gr10" draw:text-style-name="P10" draw:layer="layout" svg:width="0.047cm" svg:height="0.007cm" svg:x="28.54cm" svg:y="7.423cm" svg:viewBox="0 0 48 8" draw:points="0,0 48,0 48,8 0,8">
          <text:p/>
        </draw:polygon>
        <draw:polygon draw:style-name="gr10" draw:text-style-name="P10" draw:layer="layout" svg:width="0.047cm" svg:height="0.005cm" svg:x="28.608cm" svg:y="7.426cm" svg:viewBox="0 0 48 6" draw:points="0,0 48,0 48,6 0,6">
          <text:p/>
        </draw:polygon>
        <draw:polygon draw:style-name="gr10" draw:text-style-name="P10" draw:layer="layout" svg:width="0.047cm" svg:height="0.01cm" svg:x="28.675cm" svg:y="7.42cm" svg:viewBox="0 0 48 11" draw:points="0,0 48,0 48,11 0,11">
          <text:p/>
        </draw:polygon>
        <draw:polygon draw:style-name="gr10" draw:text-style-name="P10" draw:layer="layout" svg:width="0.047cm" svg:height="0.009cm" svg:x="28.742cm" svg:y="7.421cm" svg:viewBox="0 0 48 10" draw:points="0,0 48,0 48,10 0,10">
          <text:p/>
        </draw:polygon>
        <draw:polygon draw:style-name="gr61" draw:text-style-name="P43" draw:layer="layout" svg:width="0.047cm" svg:height="0.075cm" svg:x="29.078cm" svg:y="7.355cm" svg:viewBox="0 0 48 76" draw:points="0,0 48,0 48,76 0,76">
          <text:p/>
        </draw:polygon>
        <draw:polygon draw:style-name="gr61" draw:text-style-name="P43" draw:layer="layout" svg:width="0.047cm" svg:height="0.074cm" svg:x="29.145cm" svg:y="7.356cm" svg:viewBox="0 0 48 75" draw:points="0,0 48,0 48,75 0,75">
          <text:p/>
        </draw:polygon>
        <draw:polygon draw:style-name="gr61" draw:text-style-name="P43" draw:layer="layout" svg:width="0.047cm" svg:height="0.07cm" svg:x="29.213cm" svg:y="7.36cm" svg:viewBox="0 0 48 71" draw:points="0,0 48,0 48,71 0,71">
          <text:p/>
        </draw:polygon>
        <draw:polygon draw:style-name="gr61" draw:text-style-name="P43" draw:layer="layout" svg:width="0.047cm" svg:height="1.903cm" svg:x="29.683cm" svg:y="5.527cm" svg:viewBox="0 0 48 1904" draw:points="0,0 48,0 48,1904 0,1904">
          <text:p/>
        </draw:polygon>
        <draw:polygon draw:style-name="gr61" draw:text-style-name="P43" draw:layer="layout" svg:width="0.047cm" svg:height="0.764cm" svg:x="29.751cm" svg:y="6.666cm" svg:viewBox="0 0 48 765" draw:points="0,0 48,0 48,765 0,765">
          <text:p/>
        </draw:polygon>
        <draw:polygon draw:style-name="gr61" draw:text-style-name="P43" draw:layer="layout" svg:width="0.047cm" svg:height="1.246cm" svg:x="29.818cm" svg:y="6.184cm" svg:viewBox="0 0 48 1247" draw:points="0,0 48,0 48,1247 0,1247">
          <text:p/>
        </draw:polygon>
        <draw:polygon draw:style-name="gr61" draw:text-style-name="P43" draw:layer="layout" svg:width="0.047cm" svg:height="0.29cm" svg:x="30.288cm" svg:y="7.14cm" svg:viewBox="0 0 48 291" draw:points="0,0 48,0 48,291 0,291">
          <text:p/>
        </draw:polygon>
        <draw:polygon draw:style-name="gr61" draw:text-style-name="P43" draw:layer="layout" svg:width="0.047cm" svg:height="0.068cm" svg:x="30.356cm" svg:y="7.362cm" svg:viewBox="0 0 48 69" draw:points="0,0 48,0 48,69 0,69">
          <text:p/>
        </draw:polygon>
        <draw:polygon draw:style-name="gr61" draw:text-style-name="P43" draw:layer="layout" svg:width="0.047cm" svg:height="0.135cm" svg:x="30.423cm" svg:y="7.295cm" svg:viewBox="0 0 48 136" draw:points="0,0 48,0 48,136 0,136">
          <text:p/>
        </draw:polygon>
        <draw:polygon draw:style-name="gr12" draw:text-style-name="P12" draw:layer="layout" svg:width="0.048cm" svg:height="0.002cm" svg:x="30.893cm" svg:y="7.428cm" svg:viewBox="0 0 49 3" draw:points="0,0 49,0 49,3 0,3">
          <text:p/>
        </draw:polygon>
        <draw:polygon draw:style-name="gr12" draw:text-style-name="P12" draw:layer="layout" svg:width="0.046cm" svg:height="0cm" svg:x="30.961cm" svg:y="7.429cm" svg:viewBox="0 0 47 1" draw:points="0,0 47,0 47,1 0,1">
          <text:p/>
        </draw:polygon>
        <draw:polygon draw:style-name="gr62" draw:text-style-name="P44" draw:layer="layout" svg:width="0.047cm" svg:height="0.031cm" svg:x="31.23cm" svg:y="7.399cm" svg:viewBox="0 0 48 32" draw:points="0,0 48,0 48,32 0,32">
          <text:p/>
        </draw:polygon>
        <draw:polygon draw:style-name="gr62" draw:text-style-name="P44" draw:layer="layout" svg:width="0.047cm" svg:height="0.029cm" svg:x="31.297cm" svg:y="7.401cm" svg:viewBox="0 0 48 30" draw:points="0,0 48,0 48,30 0,30">
          <text:p/>
        </draw:polygon>
        <draw:polygon draw:style-name="gr62" draw:text-style-name="P44" draw:layer="layout" svg:width="0.047cm" svg:height="0.058cm" svg:x="31.364cm" svg:y="7.372cm" svg:viewBox="0 0 48 59" draw:points="0,0 48,0 48,59 0,59">
          <text:p/>
        </draw:polygon>
        <draw:polygon draw:style-name="gr62" draw:text-style-name="P44" draw:layer="layout" svg:width="0.047cm" svg:height="0.442cm" svg:x="31.835cm" svg:y="6.988cm" svg:viewBox="0 0 48 443" draw:points="0,0 48,0 48,443 0,443">
          <text:p/>
        </draw:polygon>
        <draw:polygon draw:style-name="gr62" draw:text-style-name="P44" draw:layer="layout" svg:width="0.047cm" svg:height="0.309cm" svg:x="31.902cm" svg:y="7.121cm" svg:viewBox="0 0 48 310" draw:points="0,0 48,0 48,310 0,310">
          <text:p/>
        </draw:polygon>
        <draw:polygon draw:style-name="gr62" draw:text-style-name="P44" draw:layer="layout" svg:width="0.047cm" svg:height="0.422cm" svg:x="31.969cm" svg:y="7.008cm" svg:viewBox="0 0 48 423" draw:points="0,0 48,0 48,423 0,423">
          <text:p/>
        </draw:polygon>
        <draw:polygon draw:style-name="gr62" draw:text-style-name="P44" draw:layer="layout" svg:width="0.047cm" svg:height="0.036cm" svg:x="32.44cm" svg:y="7.395cm" svg:viewBox="0 0 48 37" draw:points="0,0 48,0 48,37 0,37">
          <text:p/>
        </draw:polygon>
        <draw:polygon draw:style-name="gr62" draw:text-style-name="P44" draw:layer="layout" svg:width="0.047cm" svg:height="0.034cm" svg:x="32.507cm" svg:y="7.396cm" svg:viewBox="0 0 48 35" draw:points="0,0 48,0 48,35 0,35">
          <text:p/>
        </draw:polygon>
        <draw:polygon draw:style-name="gr62" draw:text-style-name="P44" draw:layer="layout" svg:width="0.047cm" svg:height="0.016cm" svg:x="32.574cm" svg:y="7.414cm" svg:viewBox="0 0 48 17" draw:points="0,0 48,0 48,17 0,17">
          <text:p/>
        </draw:polygon>
        <draw:polygon draw:style-name="gr61" draw:text-style-name="P43" draw:layer="layout" svg:width="0.047cm" svg:height="0.08cm" svg:x="29.28cm" svg:y="7.35cm" svg:viewBox="0 0 48 81" draw:points="0,0 48,0 48,81 0,81">
          <text:p/>
        </draw:polygon>
        <draw:polygon draw:style-name="gr61" draw:text-style-name="P43" draw:layer="layout" svg:width="0.047cm" svg:height="0.107cm" svg:x="29.347cm" svg:y="7.323cm" svg:viewBox="0 0 48 108" draw:points="0,0 48,0 48,108 0,108">
          <text:p/>
        </draw:polygon>
        <draw:polygon draw:style-name="gr61" draw:text-style-name="P43" draw:layer="layout" svg:width="0.047cm" svg:height="0.083cm" svg:x="29.414cm" svg:y="7.347cm" svg:viewBox="0 0 48 84" draw:points="0,0 48,0 48,84 0,84">
          <text:p/>
        </draw:polygon>
        <draw:polygon draw:style-name="gr61" draw:text-style-name="P43" draw:layer="layout" svg:width="0.047cm" svg:height="1.052cm" svg:x="29.885cm" svg:y="6.378cm" svg:viewBox="0 0 48 1053" draw:points="0,0 48,0 48,1053 0,1053">
          <text:p/>
        </draw:polygon>
        <draw:polygon draw:style-name="gr61" draw:text-style-name="P43" draw:layer="layout" svg:width="0.047cm" svg:height="0.849cm" svg:x="29.952cm" svg:y="6.581cm" svg:viewBox="0 0 48 850" draw:points="0,0 48,0 48,850 0,850">
          <text:p/>
        </draw:polygon>
        <draw:polygon draw:style-name="gr61" draw:text-style-name="P43" draw:layer="layout" svg:width="0.047cm" svg:height="0.989cm" svg:x="30.019cm" svg:y="6.441cm" svg:viewBox="0 0 48 990" draw:points="0,0 48,0 48,990 0,990">
          <text:p/>
        </draw:polygon>
        <draw:polygon draw:style-name="gr61" draw:text-style-name="P43" draw:layer="layout" svg:width="0.047cm" svg:height="0.153cm" svg:x="30.49cm" svg:y="7.277cm" svg:viewBox="0 0 48 154" draw:points="0,0 48,0 48,154 0,154">
          <text:p/>
        </draw:polygon>
        <draw:polygon draw:style-name="gr61" draw:text-style-name="P43" draw:layer="layout" svg:width="0.047cm" svg:height="0.13cm" svg:x="30.557cm" svg:y="7.3cm" svg:viewBox="0 0 48 131" draw:points="0,0 48,0 48,131 0,131">
          <text:p/>
        </draw:polygon>
        <draw:polygon draw:style-name="gr61" draw:text-style-name="P43" draw:layer="layout" svg:width="0.047cm" svg:height="0.335cm" svg:x="30.625cm" svg:y="7.095cm" svg:viewBox="0 0 48 336" draw:points="0,0 48,0 48,336 0,336">
          <text:p/>
        </draw:polygon>
        <draw:polygon draw:style-name="gr62" draw:text-style-name="P44" draw:layer="layout" svg:width="0.047cm" svg:height="0.026cm" svg:x="31.431cm" svg:y="7.404cm" svg:viewBox="0 0 48 27" draw:points="0,0 48,0 48,27 0,27">
          <text:p/>
        </draw:polygon>
        <draw:polygon draw:style-name="gr62" draw:text-style-name="P44" draw:layer="layout" svg:width="0.047cm" svg:height="0.027cm" svg:x="31.499cm" svg:y="7.403cm" svg:viewBox="0 0 48 28" draw:points="0,0 48,0 48,28 0,28">
          <text:p/>
        </draw:polygon>
        <draw:polygon draw:style-name="gr62" draw:text-style-name="P44" draw:layer="layout" svg:width="0.047cm" svg:height="0.055cm" svg:x="31.566cm" svg:y="7.375cm" svg:viewBox="0 0 48 56" draw:points="0,0 48,0 48,56 0,56">
          <text:p/>
        </draw:polygon>
        <draw:polygon draw:style-name="gr62" draw:text-style-name="P44" draw:layer="layout" svg:width="0.047cm" svg:height="0.177cm" svg:x="32.036cm" svg:y="7.253cm" svg:viewBox="0 0 48 178" draw:points="0,0 48,0 48,178 0,178">
          <text:p/>
        </draw:polygon>
        <draw:polygon draw:style-name="gr62" draw:text-style-name="P44" draw:layer="layout" svg:width="0.047cm" svg:height="0.168cm" svg:x="32.104cm" svg:y="7.262cm" svg:viewBox="0 0 48 169" draw:points="0,0 48,0 48,169 0,169">
          <text:p/>
        </draw:polygon>
        <draw:polygon draw:style-name="gr62" draw:text-style-name="P44" draw:layer="layout" svg:width="0.047cm" svg:height="0.203cm" svg:x="32.171cm" svg:y="7.227cm" svg:viewBox="0 0 48 204" draw:points="0,0 48,0 48,204 0,204">
          <text:p/>
        </draw:polygon>
        <draw:polygon draw:style-name="gr62" draw:text-style-name="P44" draw:layer="layout" svg:width="0.047cm" svg:height="0.006cm" svg:x="32.642cm" svg:y="7.424cm" svg:viewBox="0 0 48 7" draw:points="0,0 48,0 48,7 0,7">
          <text:p/>
        </draw:polygon>
        <draw:polygon draw:style-name="gr62" draw:text-style-name="P44" draw:layer="layout" svg:width="0.047cm" svg:height="0.015cm" svg:x="32.709cm" svg:y="7.415cm" svg:viewBox="0 0 48 16" draw:points="0,0 48,0 48,16 0,16">
          <text:p/>
        </draw:polygon>
        <draw:polygon draw:style-name="gr62" draw:text-style-name="P44" draw:layer="layout" svg:width="0.047cm" svg:height="0.018cm" svg:x="32.776cm" svg:y="7.412cm" svg:viewBox="0 0 48 19" draw:points="0,0 48,0 48,19 0,19">
          <text:p/>
        </draw:polygon>
        <draw:polygon draw:style-name="gr37" draw:text-style-name="P33" draw:layer="layout" svg:width="0.047cm" svg:height="0.037cm" svg:x="33.247cm" svg:y="7.393cm" svg:viewBox="0 0 48 38" draw:points="0,0 48,0 48,38 0,38">
          <text:p/>
        </draw:polygon>
        <draw:polygon draw:style-name="gr37" draw:text-style-name="P33" draw:layer="layout" svg:width="0.047cm" svg:height="0.011cm" svg:x="33.045cm" svg:y="7.42cm" svg:viewBox="0 0 48 12" draw:points="0,0 48,0 48,12 0,12">
          <text:p/>
        </draw:polygon>
        <draw:polygon draw:style-name="gr25" draw:text-style-name="P25" draw:layer="layout" svg:width="0.047cm" svg:height="0.03cm" svg:x="33.852cm" svg:y="7.4cm" svg:viewBox="0 0 48 31" draw:points="0,0 48,0 48,31 0,31">
          <text:p/>
        </draw:polygon>
        <draw:polygon draw:style-name="gr37" draw:text-style-name="P33" draw:layer="layout" svg:width="0.047cm" svg:height="0.144cm" svg:x="33.179cm" svg:y="7.286cm" svg:viewBox="0 0 48 145" draw:points="0,0 48,0 48,145 0,145">
          <text:p/>
        </draw:polygon>
        <draw:polygon draw:style-name="gr37" draw:text-style-name="P33" draw:layer="layout" svg:width="0.047cm" svg:height="0.015cm" svg:x="33.381cm" svg:y="7.416cm" svg:viewBox="0 0 48 16" draw:points="0,0 48,0 48,16 0,16">
          <text:p/>
        </draw:polygon>
        <draw:polygon draw:style-name="gr37" draw:text-style-name="P33" draw:layer="layout" svg:width="0.047cm" svg:height="0.068cm" svg:x="33.314cm" svg:y="7.362cm" svg:viewBox="0 0 48 69" draw:points="0,0 48,0 48,69 0,69">
          <text:p/>
        </draw:polygon>
        <draw:polygon draw:style-name="gr25" draw:text-style-name="P25" draw:layer="layout" svg:width="0.047cm" svg:height="0.029cm" svg:x="33.919cm" svg:y="7.401cm" svg:viewBox="0 0 48 30" draw:points="0,0 48,0 48,30 0,30">
          <text:p/>
        </draw:polygon>
        <draw:polygon draw:style-name="gr25" draw:text-style-name="P25" draw:layer="layout" svg:width="0.047cm" svg:height="0.009cm" svg:x="33.986cm" svg:y="7.421cm" svg:viewBox="0 0 48 10" draw:points="0,0 48,0 48,10 0,10">
          <text:p/>
        </draw:polygon>
        <draw:polygon draw:style-name="gr37" draw:text-style-name="P33" draw:layer="layout" svg:width="0.047cm" svg:height="0.005cm" svg:x="33.112cm" svg:y="7.425cm" svg:viewBox="0 0 48 6" draw:points="0,0 48,0 48,6 0,6">
          <text:p/>
        </draw:polygon>
        <draw:polygon draw:style-name="gr25" draw:text-style-name="P25" draw:layer="layout" svg:width="0.047cm" svg:height="0.003cm" svg:x="34.255cm" svg:y="7.427cm" svg:viewBox="0 0 48 4" draw:points="0,0 48,0 48,4 0,4">
          <text:p/>
        </draw:polygon>
        <draw:polygon draw:style-name="gr25" draw:text-style-name="P25" draw:layer="layout" svg:width="0.047cm" svg:height="0.003cm" svg:x="34.053cm" svg:y="7.428cm" svg:viewBox="0 0 48 4" draw:points="0,0 48,0 48,4 0,4">
          <text:p/>
        </draw:polygon>
        <draw:polygon draw:style-name="gr25" draw:text-style-name="P25" draw:layer="layout" svg:width="0.047cm" svg:height="0.003cm" svg:x="34.121cm" svg:y="7.428cm" svg:viewBox="0 0 48 4" draw:points="0,0 48,0 48,4 0,4">
          <text:p/>
        </draw:polygon>
        <draw:polygon draw:style-name="gr25" draw:text-style-name="P25" draw:layer="layout" svg:width="0.047cm" svg:height="0.003cm" svg:x="34.188cm" svg:y="7.428cm" svg:viewBox="0 0 48 4" draw:points="0,0 48,0 48,4 0,4">
          <text:p/>
        </draw:polygon>
        <draw:polygon draw:style-name="gr10" draw:text-style-name="P10" draw:layer="layout" svg:width="0.047cm" svg:height="0.373cm" svg:x="29.011cm" svg:y="7.057cm" svg:viewBox="0 0 48 374" draw:points="0,0 48,0 48,374 0,374">
          <text:p/>
        </draw:polygon>
        <draw:polygon draw:style-name="gr61" draw:text-style-name="P43" draw:layer="layout" svg:width="0.047cm" svg:height="0.077cm" svg:x="29.482cm" svg:y="7.353cm" svg:viewBox="0 0 48 78" draw:points="0,0 48,0 48,78 0,78">
          <text:p/>
        </draw:polygon>
        <draw:polygon draw:style-name="gr61" draw:text-style-name="P43" draw:layer="layout" svg:width="0.047cm" svg:height="0.071cm" svg:x="29.549cm" svg:y="7.359cm" svg:viewBox="0 0 48 72" draw:points="0,0 48,0 48,72 0,72">
          <text:p/>
        </draw:polygon>
        <draw:polygon draw:style-name="gr61" draw:text-style-name="P43" draw:layer="layout" svg:width="0.047cm" svg:height="0.063cm" svg:x="29.616cm" svg:y="7.367cm" svg:viewBox="0 0 48 64" draw:points="0,0 48,0 48,64 0,64">
          <text:p/>
        </draw:polygon>
        <draw:polygon draw:style-name="gr61" draw:text-style-name="P43" draw:layer="layout" svg:width="0.047cm" svg:height="0.777cm" svg:x="30.087cm" svg:y="6.653cm" svg:viewBox="0 0 48 778" draw:points="0,0 48,0 48,778 0,778">
          <text:p/>
        </draw:polygon>
        <draw:polygon draw:style-name="gr61" draw:text-style-name="P43" draw:layer="layout" svg:width="0.047cm" svg:height="0.515cm" svg:x="30.154cm" svg:y="6.915cm" svg:viewBox="0 0 48 516" draw:points="0,0 48,0 48,516 0,516">
          <text:p/>
        </draw:polygon>
        <draw:polygon draw:style-name="gr61" draw:text-style-name="P43" draw:layer="layout" svg:width="0.047cm" svg:height="0.576cm" svg:x="30.221cm" svg:y="6.854cm" svg:viewBox="0 0 48 577" draw:points="0,0 48,0 48,577 0,577">
          <text:p/>
        </draw:polygon>
        <draw:polygon draw:style-name="gr61" draw:text-style-name="P43" draw:layer="layout" svg:width="0.047cm" svg:height="0.067cm" svg:x="30.692cm" svg:y="7.363cm" svg:viewBox="0 0 48 68" draw:points="0,0 48,0 48,68 0,68">
          <text:p/>
        </draw:polygon>
        <draw:polygon draw:style-name="gr61" draw:text-style-name="P43" draw:layer="layout" svg:width="0.047cm" svg:height="0.053cm" svg:x="30.759cm" svg:y="7.377cm" svg:viewBox="0 0 48 54" draw:points="0,0 48,0 48,54 0,54">
          <text:p/>
        </draw:polygon>
        <draw:polygon draw:style-name="gr61" draw:text-style-name="P43" draw:layer="layout" svg:width="0.047cm" svg:height="0.015cm" svg:x="30.826cm" svg:y="7.415cm" svg:viewBox="0 0 48 16" draw:points="0,0 48,0 48,16 0,16">
          <text:p/>
        </draw:polygon>
        <draw:polygon draw:style-name="gr62" draw:text-style-name="P44" draw:layer="layout" svg:width="0.047cm" svg:height="0.011cm" svg:x="31.633cm" svg:y="7.42cm" svg:viewBox="0 0 48 12" draw:points="0,0 48,0 48,12 0,12">
          <text:p/>
        </draw:polygon>
        <draw:polygon draw:style-name="gr62" draw:text-style-name="P44" draw:layer="layout" svg:width="0.047cm" svg:height="0.007cm" svg:x="31.7cm" svg:y="7.423cm" svg:viewBox="0 0 48 8" draw:points="0,0 48,0 48,8 0,8">
          <text:p/>
        </draw:polygon>
        <draw:polygon draw:style-name="gr62" draw:text-style-name="P44" draw:layer="layout" svg:width="0.048cm" svg:height="0.033cm" svg:x="31.767cm" svg:y="7.397cm" svg:viewBox="0 0 49 34" draw:points="0,0 49,0 49,34 0,34">
          <text:p/>
        </draw:polygon>
        <draw:polygon draw:style-name="gr62" draw:text-style-name="P44" draw:layer="layout" svg:width="0.047cm" svg:height="0.235cm" svg:x="32.238cm" svg:y="7.195cm" svg:viewBox="0 0 48 236" draw:points="0,0 48,0 48,236 0,236">
          <text:p/>
        </draw:polygon>
        <draw:polygon draw:style-name="gr62" draw:text-style-name="P44" draw:layer="layout" svg:width="0.047cm" svg:height="0.217cm" svg:x="32.305cm" svg:y="7.213cm" svg:viewBox="0 0 48 218" draw:points="0,0 48,0 48,218 0,218">
          <text:p/>
        </draw:polygon>
        <draw:polygon draw:style-name="gr62" draw:text-style-name="P44" draw:layer="layout" svg:width="0.047cm" svg:height="0.376cm" svg:x="32.373cm" svg:y="7.054cm" svg:viewBox="0 0 48 377" draw:points="0,0 48,0 48,377 0,377">
          <text:p/>
        </draw:polygon>
        <draw:polygon draw:style-name="gr62" draw:text-style-name="P44" draw:layer="layout" svg:width="0.047cm" svg:height="0.012cm" svg:x="32.843cm" svg:y="7.418cm" svg:viewBox="0 0 48 13" draw:points="0,0 48,0 48,13 0,13">
          <text:p/>
        </draw:polygon>
        <draw:polygon draw:style-name="gr62" draw:text-style-name="P44" draw:layer="layout" svg:width="0.047cm" svg:height="0.009cm" svg:x="32.91cm" svg:y="7.421cm" svg:viewBox="0 0 48 10" draw:points="0,0 48,0 48,10 0,10">
          <text:p/>
        </draw:polygon>
        <draw:polygon draw:style-name="gr62" draw:text-style-name="P44" draw:layer="layout" svg:width="0.047cm" svg:height="0.011cm" svg:x="32.978cm" svg:y="7.419cm" svg:viewBox="0 0 48 12" draw:points="0,0 48,0 48,12 0,12">
          <text:p/>
        </draw:polygon>
        <draw:polygon draw:style-name="gr20" draw:text-style-name="P20" draw:layer="layout" svg:width="0.047cm" svg:height="0.039cm" svg:x="33.717cm" svg:y="7.391cm" svg:viewBox="0 0 48 40" draw:points="0,0 48,0 48,40 0,40">
          <text:p/>
        </draw:polygon>
        <draw:polygon draw:style-name="gr20" draw:text-style-name="P20" draw:layer="layout" svg:width="0.047cm" svg:height="0.125cm" svg:x="33.784cm" svg:y="7.305cm" svg:viewBox="0 0 48 126" draw:points="0,0 48,0 48,126 0,126">
          <text:p/>
        </draw:polygon>
        <draw:polygon draw:style-name="gr20" draw:text-style-name="P20" draw:layer="layout" svg:width="0.047cm" svg:height="0.003cm" svg:x="33.448cm" svg:y="7.427cm" svg:viewBox="0 0 48 4" draw:points="0,0 48,0 48,4 0,4">
          <text:p/>
        </draw:polygon>
        <draw:polygon draw:style-name="gr20" draw:text-style-name="P20" draw:layer="layout" svg:width="0.047cm" svg:height="0.002cm" svg:x="33.583cm" svg:y="7.428cm" svg:viewBox="0 0 48 3" draw:points="0,0 48,0 48,3 0,3">
          <text:p/>
        </draw:polygon>
        <draw:polygon draw:style-name="gr20" draw:text-style-name="P20" draw:layer="layout" svg:width="0.046cm" svg:height="0cm" svg:x="33.516cm" svg:y="7.429cm" svg:viewBox="0 0 47 1" draw:points="0,0 47,0 47,1 0,1">
          <text:p/>
        </draw:polygon>
        <draw:polygon draw:style-name="gr20" draw:text-style-name="P20" draw:layer="layout" svg:width="0.047cm" svg:height="0.003cm" svg:x="33.65cm" svg:y="7.428cm" svg:viewBox="0 0 48 4" draw:points="0,0 48,0 48,4 0,4">
          <text:p/>
        </draw:polygon>
        <draw:polygon draw:style-name="gr12" draw:text-style-name="P12" draw:layer="layout" svg:width="0.047cm" svg:height="0.02cm" svg:x="31.028cm" svg:y="7.41cm" svg:viewBox="0 0 48 21" draw:points="0,0 48,0 48,21 0,21">
          <text:p/>
        </draw:polygon>
        <draw:polygon draw:style-name="gr12" draw:text-style-name="P12" draw:layer="layout" svg:width="0.047cm" svg:height="0.303cm" svg:x="31.095cm" svg:y="7.127cm" svg:viewBox="0 0 48 304" draw:points="0,0 48,0 48,304 0,304">
          <text:p/>
        </draw:polygon>
        <draw:polygon draw:style-name="gr12" draw:text-style-name="P12" draw:layer="layout" svg:width="0.047cm" svg:height="0.084cm" svg:x="31.162cm" svg:y="7.346cm" svg:viewBox="0 0 48 85" draw:points="0,0 48,0 48,85 0,85">
          <text:p/>
        </draw:polygon>
        <draw:polygon draw:style-name="gr10" draw:text-style-name="P10" draw:layer="layout" svg:width="0.672cm" svg:height="0.229cm" svg:x="28.396cm" svg:y="5.146cm" svg:viewBox="0 0 673 230" draw:points="0,0 673,0 673,230 0,230">
          <text:p/>
        </draw:polygon>
        <draw:polygon draw:style-name="gr63" draw:text-style-name="P2" draw:layer="layout" svg:width="0.672cm" svg:height="0.229cm" svg:x="28.396cm" svg:y="5.146cm" svg:viewBox="0 0 673 230" draw:points="0,0 673,0 673,230 0,230">
          <text:p/>
        </draw:polygon>
        <draw:polygon draw:style-name="gr39" draw:text-style-name="P34" draw:layer="layout" svg:width="0.605cm" svg:height="0.229cm" svg:x="29.068cm" svg:y="5.146cm" svg:viewBox="0 0 606 230" draw:points="0,0 606,0 606,230 0,230">
          <text:p/>
        </draw:polygon>
        <draw:polygon draw:style-name="gr63" draw:text-style-name="P2" draw:layer="layout" svg:width="0.605cm" svg:height="0.229cm" svg:x="29.068cm" svg:y="5.146cm" svg:viewBox="0 0 606 230" draw:points="0,0 606,0 606,230 0,230">
          <text:p/>
        </draw:polygon>
        <draw:polygon draw:style-name="gr61" draw:text-style-name="P43" draw:layer="layout" svg:width="0.605cm" svg:height="0.229cm" svg:x="29.673cm" svg:y="5.146cm" svg:viewBox="0 0 606 230" draw:points="0,0 606,0 606,230 0,230">
          <text:p/>
        </draw:polygon>
        <draw:polygon draw:style-name="gr63" draw:text-style-name="P2" draw:layer="layout" svg:width="0.605cm" svg:height="0.229cm" svg:x="29.673cm" svg:y="5.146cm" svg:viewBox="0 0 606 230" draw:points="0,0 606,0 606,230 0,230">
          <text:p/>
        </draw:polygon>
        <draw:polygon draw:style-name="gr64" draw:text-style-name="P35" draw:layer="layout" svg:width="0.605cm" svg:height="0.229cm" svg:x="30.278cm" svg:y="5.146cm" svg:viewBox="0 0 606 230" draw:points="0,0 606,0 606,230 0,230">
          <text:p/>
        </draw:polygon>
        <draw:polygon draw:style-name="gr63" draw:text-style-name="P2" draw:layer="layout" svg:width="0.605cm" svg:height="0.229cm" svg:x="30.278cm" svg:y="5.146cm" svg:viewBox="0 0 606 230" draw:points="0,0 606,0 606,230 0,230">
          <text:p/>
        </draw:polygon>
        <draw:polygon draw:style-name="gr12" draw:text-style-name="P12" draw:layer="layout" svg:width="0.336cm" svg:height="0.229cm" svg:x="30.883cm" svg:y="5.146cm" svg:viewBox="0 0 337 230" draw:points="0,0 337,0 337,230 0,230">
          <text:p/>
        </draw:polygon>
        <draw:polygon draw:style-name="gr63" draw:text-style-name="P2" draw:layer="layout" svg:width="0.337cm" svg:height="0.229cm" svg:x="30.883cm" svg:y="5.146cm" svg:viewBox="0 0 338 230" draw:points="0,0 338,0 338,230 0,230">
          <text:p/>
        </draw:polygon>
        <draw:polygon draw:style-name="gr42" draw:text-style-name="P36" draw:layer="layout" svg:width="0.606cm" svg:height="0.229cm" svg:x="31.219cm" svg:y="5.146cm" svg:viewBox="0 0 607 230" draw:points="0,0 607,0 607,230 0,230">
          <text:p/>
        </draw:polygon>
        <draw:polygon draw:style-name="gr63" draw:text-style-name="P2" draw:layer="layout" svg:width="0.605cm" svg:height="0.229cm" svg:x="31.22cm" svg:y="5.146cm" svg:viewBox="0 0 606 230" draw:points="0,0 606,0 606,230 0,230">
          <text:p/>
        </draw:polygon>
        <draw:polygon draw:style-name="gr62" draw:text-style-name="P44" draw:layer="layout" svg:width="0.605cm" svg:height="0.229cm" svg:x="31.825cm" svg:y="5.146cm" svg:viewBox="0 0 606 230" draw:points="0,0 606,0 606,230 0,230">
          <text:p/>
        </draw:polygon>
        <draw:polygon draw:style-name="gr63" draw:text-style-name="P2" draw:layer="layout" svg:width="0.605cm" svg:height="0.229cm" svg:x="31.825cm" svg:y="5.146cm" svg:viewBox="0 0 606 230" draw:points="0,0 606,0 606,230 0,230">
          <text:p/>
        </draw:polygon>
        <draw:polygon draw:style-name="gr65" draw:text-style-name="P37" draw:layer="layout" svg:width="0.605cm" svg:height="0.229cm" svg:x="32.43cm" svg:y="5.146cm" svg:viewBox="0 0 606 230" draw:points="0,0 606,0 606,230 0,230">
          <text:p/>
        </draw:polygon>
        <draw:polygon draw:style-name="gr63" draw:text-style-name="P2" draw:layer="layout" svg:width="0.605cm" svg:height="0.229cm" svg:x="32.43cm" svg:y="5.146cm" svg:viewBox="0 0 606 230" draw:points="0,0 606,0 606,230 0,230">
          <text:p/>
        </draw:polygon>
        <draw:polygon draw:style-name="gr37" draw:text-style-name="P33" draw:layer="layout" svg:width="0.403cm" svg:height="0.229cm" svg:x="33.035cm" svg:y="5.146cm" svg:viewBox="0 0 404 230" draw:points="0,0 404,0 404,230 0,230">
          <text:p/>
        </draw:polygon>
        <draw:polygon draw:style-name="gr63" draw:text-style-name="P2" draw:layer="layout" svg:width="0.403cm" svg:height="0.229cm" svg:x="33.035cm" svg:y="5.146cm" svg:viewBox="0 0 404 230" draw:points="0,0 404,0 404,230 0,230">
          <text:p/>
        </draw:polygon>
        <draw:polygon draw:style-name="gr20" draw:text-style-name="P20" draw:layer="layout" svg:width="0.404cm" svg:height="0.229cm" svg:x="33.438cm" svg:y="5.146cm" svg:viewBox="0 0 405 230" draw:points="0,0 405,0 405,230 0,230">
          <text:p/>
        </draw:polygon>
        <draw:polygon draw:style-name="gr63" draw:text-style-name="P2" draw:layer="layout" svg:width="0.404cm" svg:height="0.229cm" svg:x="33.438cm" svg:y="5.146cm" svg:viewBox="0 0 405 230" draw:points="0,0 405,0 405,230 0,230">
          <text:p/>
        </draw:polygon>
        <draw:polygon draw:style-name="gr25" draw:text-style-name="P25" draw:layer="layout" svg:width="0.47cm" svg:height="0.229cm" svg:x="33.842cm" svg:y="5.146cm" svg:viewBox="0 0 471 230" draw:points="0,0 471,0 471,230 0,230">
          <text:p/>
        </draw:polygon>
        <draw:polygon draw:style-name="gr63" draw:text-style-name="P2" draw:layer="layout" svg:width="0.47cm" svg:height="0.229cm" svg:x="33.842cm" svg:y="5.146cm" svg:viewBox="0 0 471 230" draw:points="0,0 471,0 471,230 0,230">
          <text:p/>
        </draw:polygon>
        <draw:line draw:style-name="gr45" draw:text-style-name="P2" draw:layer="layout" svg:x1="28.389cm" svg:y1="7.43cm" svg:x2="28.389cm" svg:y2="5.146cm">
          <text:p/>
        </draw:line>
        <draw:line draw:style-name="gr45" draw:text-style-name="P2" draw:layer="layout" svg:x1="28.389cm" svg:y1="7.43cm" svg:x2="34.319cm" svg:y2="7.43cm">
          <text:p/>
        </draw:line>
        <draw:frame draw:style-name="gr58" draw:text-style-name="P38" draw:layer="layout" svg:width="2.983cm" svg:height="0.856cm" svg:x="35.986cm" svg:y="10.395cm">
          <draw:text-box>
            <text:p text:style-name="P6"><text:span text:style-name="T5">InsDel2c</text:span></text:p>
          </draw:text-box>
        </draw:frame>
        <draw:frame draw:style-name="gr50" draw:text-style-name="P38" draw:layer="layout" svg:width="3.026cm" svg:height="0.856cm" svg:x="29.852cm" svg:y="4.182cm">
          <draw:text-box>
            <text:p text:style-name="P6"><text:span text:style-name="T5">InsDel2b</text:span></text:p>
          </draw:text-box>
        </draw:frame>
        <draw:line draw:style-name="gr34" draw:text-style-name="P2" draw:layer="layout" svg:x1="31.437cm" svg:y1="8.819cm" svg:x2="31.437cm" svg:y2="8.1cm">
          <text:p/>
        </draw:line>
        <draw:polygon draw:style-name="gr35" draw:text-style-name="P31" draw:layer="layout" svg:width="0.54cm" svg:height="0.27cm" svg:x="31.167cm" svg:y="7.866cm" svg:viewBox="0 0 541 271" draw:points="0,271 541,271 270,0">
          <text:p/>
        </draw:polygon>
        <draw:polygon draw:style-name="gr4" draw:text-style-name="P4" draw:layer="layout" svg:width="5.904cm" svg:height="2.284cm" svg:x="28.407cm" svg:y="11.432cm" svg:viewBox="0 0 5905 2285" draw:points="0,0 5905,0 5905,2285 0,2285">
          <text:p/>
        </draw:polygon>
        <draw:polygon draw:style-name="gr26" draw:text-style-name="P26" draw:layer="layout" svg:width="0.021cm" svg:height="0.004cm" svg:x="29.214cm" svg:y="13.608cm" svg:viewBox="0 0 22 5" draw:points="0,0 22,0 22,5 0,5">
          <text:p/>
        </draw:polygon>
        <draw:polygon draw:style-name="gr26" draw:text-style-name="P26" draw:layer="layout" svg:width="0.021cm" svg:height="0cm" svg:x="29.275cm" svg:y="13.611cm" svg:viewBox="0 0 22 0" draw:points="0,0 22,0">
          <text:p/>
        </draw:polygon>
        <draw:polygon draw:style-name="gr26" draw:text-style-name="P26" draw:layer="layout" svg:width="0.022cm" svg:height="0.038cm" svg:x="28.474cm" svg:y="13.573cm" svg:viewBox="0 0 23 39" draw:points="0,0 23,0 23,39 0,39">
          <text:p/>
        </draw:polygon>
        <draw:polygon draw:style-name="gr26" draw:text-style-name="P26" draw:layer="layout" svg:width="0.021cm" svg:height="0.011cm" svg:x="28.505cm" svg:y="13.6cm" svg:viewBox="0 0 22 12" draw:points="0,0 22,0 22,12 0,12">
          <text:p/>
        </draw:polygon>
        <draw:polygon draw:style-name="gr26" draw:text-style-name="P26" draw:layer="layout" svg:width="0.021cm" svg:height="0.004cm" svg:x="28.536cm" svg:y="13.607cm" svg:viewBox="0 0 22 5" draw:points="0,0 22,0 22,5 0,5">
          <text:p/>
        </draw:polygon>
        <draw:polygon draw:style-name="gr26" draw:text-style-name="P26" draw:layer="layout" svg:width="0.022cm" svg:height="0.01cm" svg:x="28.566cm" svg:y="13.601cm" svg:viewBox="0 0 23 11" draw:points="0,0 23,0 23,11 0,11">
          <text:p/>
        </draw:polygon>
        <draw:polygon draw:style-name="gr26" draw:text-style-name="P26" draw:layer="layout" svg:width="0.022cm" svg:height="0.002cm" svg:x="28.597cm" svg:y="13.609cm" svg:viewBox="0 0 23 3" draw:points="0,0 23,0 23,3 0,3">
          <text:p/>
        </draw:polygon>
        <draw:polygon draw:style-name="gr26" draw:text-style-name="P26" draw:layer="layout" svg:width="0.022cm" svg:height="0.003cm" svg:x="28.628cm" svg:y="13.608cm" svg:viewBox="0 0 23 4" draw:points="0,0 23,0 23,4 0,4">
          <text:p/>
        </draw:polygon>
        <draw:polygon draw:style-name="gr26" draw:text-style-name="P26" draw:layer="layout" svg:width="0.021cm" svg:height="0.028cm" svg:x="28.659cm" svg:y="13.583cm" svg:viewBox="0 0 22 29" draw:points="0,0 22,0 22,29 0,29">
          <text:p/>
        </draw:polygon>
        <draw:polygon draw:style-name="gr26" draw:text-style-name="P26" draw:layer="layout" svg:width="0.021cm" svg:height="0.002cm" svg:x="28.69cm" svg:y="13.609cm" svg:viewBox="0 0 22 3" draw:points="0,0 22,0 22,3 0,3">
          <text:p/>
        </draw:polygon>
        <draw:polygon draw:style-name="gr26" draw:text-style-name="P26" draw:layer="layout" svg:width="0.021cm" svg:height="0.006cm" svg:x="28.721cm" svg:y="13.605cm" svg:viewBox="0 0 22 7" draw:points="0,0 22,0 22,7 0,7">
          <text:p/>
        </draw:polygon>
        <draw:polygon draw:style-name="gr26" draw:text-style-name="P26" draw:layer="layout" svg:width="0.022cm" svg:height="0.039cm" svg:x="28.751cm" svg:y="13.572cm" svg:viewBox="0 0 23 40" draw:points="0,0 23,0 23,40 0,40">
          <text:p/>
        </draw:polygon>
        <draw:polygon draw:style-name="gr26" draw:text-style-name="P26" draw:layer="layout" svg:width="0.022cm" svg:height="0.012cm" svg:x="28.782cm" svg:y="13.599cm" svg:viewBox="0 0 23 13" draw:points="0,0 23,0 23,13 0,13">
          <text:p/>
        </draw:polygon>
        <draw:polygon draw:style-name="gr26" draw:text-style-name="P26" draw:layer="layout" svg:width="0.022cm" svg:height="0.025cm" svg:x="28.813cm" svg:y="13.586cm" svg:viewBox="0 0 23 26" draw:points="0,0 23,0 23,26 0,26">
          <text:p/>
        </draw:polygon>
        <draw:polygon draw:style-name="gr26" draw:text-style-name="P26" draw:layer="layout" svg:width="0.021cm" svg:height="0.125cm" svg:x="28.844cm" svg:y="13.486cm" svg:viewBox="0 0 22 126" draw:points="0,0 22,0 22,126 0,126">
          <text:p/>
        </draw:polygon>
        <draw:polygon draw:style-name="gr26" draw:text-style-name="P26" draw:layer="layout" svg:width="0.021cm" svg:height="0.023cm" svg:x="28.875cm" svg:y="13.588cm" svg:viewBox="0 0 22 24" draw:points="0,0 22,0 22,24 0,24">
          <text:p/>
        </draw:polygon>
        <draw:polygon draw:style-name="gr26" draw:text-style-name="P26" draw:layer="layout" svg:width="0.021cm" svg:height="0.081cm" svg:x="28.906cm" svg:y="13.53cm" svg:viewBox="0 0 22 82" draw:points="0,0 22,0 22,82 0,82">
          <text:p/>
        </draw:polygon>
        <draw:polygon draw:style-name="gr26" draw:text-style-name="P26" draw:layer="layout" svg:width="0.022cm" svg:height="0.125cm" svg:x="28.936cm" svg:y="13.486cm" svg:viewBox="0 0 23 126" draw:points="0,0 23,0 23,126 0,126">
          <text:p/>
        </draw:polygon>
        <draw:polygon draw:style-name="gr26" draw:text-style-name="P26" draw:layer="layout" svg:width="0.022cm" svg:height="0.036cm" svg:x="28.967cm" svg:y="13.575cm" svg:viewBox="0 0 23 37" draw:points="0,0 23,0 23,37 0,37">
          <text:p/>
        </draw:polygon>
        <draw:polygon draw:style-name="gr26" draw:text-style-name="P26" draw:layer="layout" svg:width="0.021cm" svg:height="0.071cm" svg:x="28.998cm" svg:y="13.54cm" svg:viewBox="0 0 22 72" draw:points="0,0 22,0 22,72 0,72">
          <text:p/>
        </draw:polygon>
        <draw:polygon draw:style-name="gr26" draw:text-style-name="P26" draw:layer="layout" svg:width="0.021cm" svg:height="0.095cm" svg:x="29.029cm" svg:y="13.516cm" svg:viewBox="0 0 22 96" draw:points="0,0 22,0 22,96 0,96">
          <text:p/>
        </draw:polygon>
        <draw:polygon draw:style-name="gr26" draw:text-style-name="P26" draw:layer="layout" svg:width="0.021cm" svg:height="0.021cm" svg:x="29.06cm" svg:y="13.59cm" svg:viewBox="0 0 22 22" draw:points="0,0 22,0 22,22 0,22">
          <text:p/>
        </draw:polygon>
        <draw:polygon draw:style-name="gr26" draw:text-style-name="P26" draw:layer="layout" svg:width="0.022cm" svg:height="0.017cm" svg:x="29.09cm" svg:y="13.594cm" svg:viewBox="0 0 23 18" draw:points="0,0 23,0 23,18 0,18">
          <text:p/>
        </draw:polygon>
        <draw:polygon draw:style-name="gr26" draw:text-style-name="P26" draw:layer="layout" svg:width="0.022cm" svg:height="0.028cm" svg:x="29.121cm" svg:y="13.583cm" svg:viewBox="0 0 23 29" draw:points="0,0 23,0 23,29 0,29">
          <text:p/>
        </draw:polygon>
        <draw:polygon draw:style-name="gr26" draw:text-style-name="P26" draw:layer="layout" svg:width="0.022cm" svg:height="0.003cm" svg:x="29.152cm" svg:y="13.609cm" svg:viewBox="0 0 23 4" draw:points="0,0 23,0 23,4 0,4">
          <text:p/>
        </draw:polygon>
        <draw:polygon draw:style-name="gr26" draw:text-style-name="P26" draw:layer="layout" svg:width="0.021cm" svg:height="0.008cm" svg:x="29.183cm" svg:y="13.603cm" svg:viewBox="0 0 22 9" draw:points="0,0 22,0 22,9 0,9">
          <text:p/>
        </draw:polygon>
        <draw:polygon draw:style-name="gr27" draw:text-style-name="P27" draw:layer="layout" svg:width="0.022cm" svg:height="0.271cm" svg:x="31.71cm" svg:y="13.34cm" svg:viewBox="0 0 23 272" draw:points="0,0 23,0 23,272 0,272">
          <text:p/>
        </draw:polygon>
        <draw:polygon draw:style-name="gr27" draw:text-style-name="P27" draw:layer="layout" svg:width="0.021cm" svg:height="0.028cm" svg:x="31.741cm" svg:y="13.584cm" svg:viewBox="0 0 22 29" draw:points="0,0 22,0 22,29 0,29">
          <text:p/>
        </draw:polygon>
        <draw:polygon draw:style-name="gr27" draw:text-style-name="P27" draw:layer="layout" svg:width="0.021cm" svg:height="0.053cm" svg:x="31.772cm" svg:y="13.558cm" svg:viewBox="0 0 22 54" draw:points="0,0 22,0 22,54 0,54">
          <text:p/>
        </draw:polygon>
        <draw:polygon draw:style-name="gr27" draw:text-style-name="P27" draw:layer="layout" svg:width="0.022cm" svg:height="0.015cm" svg:x="30.97cm" svg:y="13.596cm" svg:viewBox="0 0 23 16" draw:points="0,0 23,0 23,16 0,16">
          <text:p/>
        </draw:polygon>
        <draw:polygon draw:style-name="gr27" draw:text-style-name="P27" draw:layer="layout" svg:width="0.022cm" svg:height="0.007cm" svg:x="31.001cm" svg:y="13.604cm" svg:viewBox="0 0 23 8" draw:points="0,0 23,0 23,8 0,8">
          <text:p/>
        </draw:polygon>
        <draw:polygon draw:style-name="gr27" draw:text-style-name="P27" draw:layer="layout" svg:width="0.022cm" svg:height="0.006cm" svg:x="31.032cm" svg:y="13.605cm" svg:viewBox="0 0 23 7" draw:points="0,0 23,0 23,7 0,7">
          <text:p/>
        </draw:polygon>
        <draw:polygon draw:style-name="gr27" draw:text-style-name="P27" draw:layer="layout" svg:width="0.021cm" svg:height="0.011cm" svg:x="31.063cm" svg:y="13.6cm" svg:viewBox="0 0 22 12" draw:points="0,0 22,0 22,12 0,12">
          <text:p/>
        </draw:polygon>
        <draw:polygon draw:style-name="gr27" draw:text-style-name="P27" draw:layer="layout" svg:width="0.021cm" svg:height="0.011cm" svg:x="31.094cm" svg:y="13.6cm" svg:viewBox="0 0 22 12" draw:points="0,0 22,0 22,12 0,12">
          <text:p/>
        </draw:polygon>
        <draw:polygon draw:style-name="gr27" draw:text-style-name="P27" draw:layer="layout" svg:width="0.022cm" svg:height="0.005cm" svg:x="31.124cm" svg:y="13.606cm" svg:viewBox="0 0 23 6" draw:points="0,0 23,0 23,6 0,6">
          <text:p/>
        </draw:polygon>
        <draw:polygon draw:style-name="gr27" draw:text-style-name="P27" draw:layer="layout" svg:width="0.022cm" svg:height="0.011cm" svg:x="31.155cm" svg:y="13.6cm" svg:viewBox="0 0 23 12" draw:points="0,0 23,0 23,12 0,12">
          <text:p/>
        </draw:polygon>
        <draw:polygon draw:style-name="gr27" draw:text-style-name="P27" draw:layer="layout" svg:width="0.022cm" svg:height="0.013cm" svg:x="31.186cm" svg:y="13.598cm" svg:viewBox="0 0 23 14" draw:points="0,0 23,0 23,14 0,14">
          <text:p/>
        </draw:polygon>
        <draw:polygon draw:style-name="gr27" draw:text-style-name="P27" draw:layer="layout" svg:width="0.021cm" svg:height="0.021cm" svg:x="31.217cm" svg:y="13.59cm" svg:viewBox="0 0 22 22" draw:points="0,0 22,0 22,22 0,22">
          <text:p/>
        </draw:polygon>
        <draw:polygon draw:style-name="gr27" draw:text-style-name="P27" draw:layer="layout" svg:width="0.021cm" svg:height="0.157cm" svg:x="31.248cm" svg:y="13.454cm" svg:viewBox="0 0 22 158" draw:points="0,0 22,0 22,158 0,158">
          <text:p/>
        </draw:polygon>
        <draw:polygon draw:style-name="gr27" draw:text-style-name="P27" draw:layer="layout" svg:width="0.021cm" svg:height="0.111cm" svg:x="31.279cm" svg:y="13.5cm" svg:viewBox="0 0 22 112" draw:points="0,0 22,0 22,112 0,112">
          <text:p/>
        </draw:polygon>
        <draw:polygon draw:style-name="gr27" draw:text-style-name="P27" draw:layer="layout" svg:width="0.022cm" svg:height="0.103cm" svg:x="31.309cm" svg:y="13.508cm" svg:viewBox="0 0 23 104" draw:points="0,0 23,0 23,104 0,104">
          <text:p/>
        </draw:polygon>
        <draw:polygon draw:style-name="gr27" draw:text-style-name="P27" draw:layer="layout" svg:width="0.022cm" svg:height="0.749cm" svg:x="31.34cm" svg:y="12.862cm" svg:viewBox="0 0 23 750" draw:points="0,0 23,0 23,750 0,750">
          <text:p/>
        </draw:polygon>
        <draw:polygon draw:style-name="gr27" draw:text-style-name="P27" draw:layer="layout" svg:width="0.022cm" svg:height="0.327cm" svg:x="31.371cm" svg:y="13.284cm" svg:viewBox="0 0 23 328" draw:points="0,0 23,0 23,328 0,328">
          <text:p/>
        </draw:polygon>
        <draw:polygon draw:style-name="gr27" draw:text-style-name="P27" draw:layer="layout" svg:width="0.021cm" svg:height="0.413cm" svg:x="31.402cm" svg:y="13.198cm" svg:viewBox="0 0 22 414" draw:points="0,0 22,0 22,414 0,414">
          <text:p/>
        </draw:polygon>
        <draw:polygon draw:style-name="gr27" draw:text-style-name="P27" draw:layer="layout" svg:width="0.021cm" svg:height="1.455cm" svg:x="31.433cm" svg:y="12.156cm" svg:viewBox="0 0 22 1456" draw:points="0,0 22,0 22,1456 0,1456">
          <text:p/>
        </draw:polygon>
        <draw:polygon draw:style-name="gr27" draw:text-style-name="P27" draw:layer="layout" svg:width="0.021cm" svg:height="0.343cm" svg:x="31.464cm" svg:y="13.268cm" svg:viewBox="0 0 22 344" draw:points="0,0 22,0 22,344 0,344">
          <text:p/>
        </draw:polygon>
        <draw:polygon draw:style-name="gr27" draw:text-style-name="P27" draw:layer="layout" svg:width="0.022cm" svg:height="0.675cm" svg:x="31.494cm" svg:y="12.936cm" svg:viewBox="0 0 23 676" draw:points="0,0 23,0 23,676 0,676">
          <text:p/>
        </draw:polygon>
        <draw:polygon draw:style-name="gr27" draw:text-style-name="P27" draw:layer="layout" svg:width="0.022cm" svg:height="1.332cm" svg:x="31.525cm" svg:y="12.279cm" svg:viewBox="0 0 23 1333" draw:points="0,0 23,0 23,1333 0,1333">
          <text:p/>
        </draw:polygon>
        <draw:polygon draw:style-name="gr27" draw:text-style-name="P27" draw:layer="layout" svg:width="0.021cm" svg:height="0.69cm" svg:x="31.556cm" svg:y="12.921cm" svg:viewBox="0 0 22 691" draw:points="0,0 22,0 22,691 0,691">
          <text:p/>
        </draw:polygon>
        <draw:polygon draw:style-name="gr27" draw:text-style-name="P27" draw:layer="layout" svg:width="0.021cm" svg:height="0.919cm" svg:x="31.587cm" svg:y="12.692cm" svg:viewBox="0 0 22 920" draw:points="0,0 22,0 22,920 0,920">
          <text:p/>
        </draw:polygon>
        <draw:polygon draw:style-name="gr27" draw:text-style-name="P27" draw:layer="layout" svg:width="0.021cm" svg:height="0.207cm" svg:x="31.618cm" svg:y="13.404cm" svg:viewBox="0 0 22 208" draw:points="0,0 22,0 22,208 0,208">
          <text:p/>
        </draw:polygon>
        <draw:polygon draw:style-name="gr27" draw:text-style-name="P27" draw:layer="layout" svg:width="0.022cm" svg:height="0.042cm" svg:x="31.648cm" svg:y="13.569cm" svg:viewBox="0 0 23 43" draw:points="0,0 23,0 23,43 0,43">
          <text:p/>
        </draw:polygon>
        <draw:polygon draw:style-name="gr27" draw:text-style-name="P27" draw:layer="layout" svg:width="0.022cm" svg:height="0.099cm" svg:x="31.679cm" svg:y="13.512cm" svg:viewBox="0 0 23 100" draw:points="0,0 23,0 23,100 0,100">
          <text:p/>
        </draw:polygon>
        <draw:polygon draw:style-name="gr12" draw:text-style-name="P12" draw:layer="layout" svg:width="0.021cm" svg:height="0.005cm" svg:x="33.467cm" svg:y="13.606cm" svg:viewBox="0 0 22 6" draw:points="0,0 22,0 22,6 0,6">
          <text:p/>
        </draw:polygon>
        <draw:polygon draw:style-name="gr27" draw:text-style-name="P27" draw:layer="layout" svg:width="0.022cm" svg:height="0.174cm" svg:x="32.542cm" svg:y="13.437cm" svg:viewBox="0 0 23 175" draw:points="0,0 23,0 23,175 0,175">
          <text:p/>
        </draw:polygon>
        <draw:polygon draw:style-name="gr27" draw:text-style-name="P27" draw:layer="layout" svg:width="0.022cm" svg:height="0.072cm" svg:x="32.573cm" svg:y="13.539cm" svg:viewBox="0 0 23 73" draw:points="0,0 23,0 23,73 0,73">
          <text:p/>
        </draw:polygon>
        <draw:polygon draw:style-name="gr27" draw:text-style-name="P27" draw:layer="layout" svg:width="0.021cm" svg:height="0.275cm" svg:x="32.604cm" svg:y="13.336cm" svg:viewBox="0 0 22 276" draw:points="0,0 22,0 22,276 0,276">
          <text:p/>
        </draw:polygon>
        <draw:polygon draw:style-name="gr27" draw:text-style-name="P27" draw:layer="layout" svg:width="0.021cm" svg:height="0.008cm" svg:x="31.803cm" svg:y="13.603cm" svg:viewBox="0 0 22 9" draw:points="0,0 22,0 22,9 0,9">
          <text:p/>
        </draw:polygon>
        <draw:polygon draw:style-name="gr27" draw:text-style-name="P27" draw:layer="layout" svg:width="0.022cm" svg:height="0.006cm" svg:x="31.833cm" svg:y="13.605cm" svg:viewBox="0 0 23 7" draw:points="0,0 23,0 23,7 0,7">
          <text:p/>
        </draw:polygon>
        <draw:polygon draw:style-name="gr27" draw:text-style-name="P27" draw:layer="layout" svg:width="0.022cm" svg:height="0.007cm" svg:x="31.864cm" svg:y="13.604cm" svg:viewBox="0 0 23 8" draw:points="0,0 23,0 23,8 0,8">
          <text:p/>
        </draw:polygon>
        <draw:polygon draw:style-name="gr27" draw:text-style-name="P27" draw:layer="layout" svg:width="0.022cm" svg:height="0.008cm" svg:x="31.895cm" svg:y="13.603cm" svg:viewBox="0 0 23 9" draw:points="0,0 23,0 23,9 0,9">
          <text:p/>
        </draw:polygon>
        <draw:polygon draw:style-name="gr27" draw:text-style-name="P27" draw:layer="layout" svg:width="0.021cm" svg:height="0.017cm" svg:x="31.926cm" svg:y="13.594cm" svg:viewBox="0 0 22 18" draw:points="0,0 22,0 22,18 0,18">
          <text:p/>
        </draw:polygon>
        <draw:polygon draw:style-name="gr27" draw:text-style-name="P27" draw:layer="layout" svg:width="0.021cm" svg:height="0.016cm" svg:x="31.957cm" svg:y="13.595cm" svg:viewBox="0 0 22 17" draw:points="0,0 22,0 22,17 0,17">
          <text:p/>
        </draw:polygon>
        <draw:polygon draw:style-name="gr27" draw:text-style-name="P27" draw:layer="layout" svg:width="0.022cm" svg:height="0.004cm" svg:x="31.987cm" svg:y="13.607cm" svg:viewBox="0 0 23 5" draw:points="0,0 23,0 23,5 0,5">
          <text:p/>
        </draw:polygon>
        <draw:polygon draw:style-name="gr27" draw:text-style-name="P27" draw:layer="layout" svg:width="0.022cm" svg:height="0.014cm" svg:x="32.018cm" svg:y="13.597cm" svg:viewBox="0 0 23 15" draw:points="0,0 23,0 23,15 0,15">
          <text:p/>
        </draw:polygon>
        <draw:polygon draw:style-name="gr27" draw:text-style-name="P27" draw:layer="layout" svg:width="0.022cm" svg:height="0.016cm" svg:x="32.049cm" svg:y="13.595cm" svg:viewBox="0 0 23 17" draw:points="0,0 23,0 23,17 0,17">
          <text:p/>
        </draw:polygon>
        <draw:polygon draw:style-name="gr27" draw:text-style-name="P27" draw:layer="layout" svg:width="0.021cm" svg:height="0.149cm" svg:x="32.08cm" svg:y="13.462cm" svg:viewBox="0 0 22 150" draw:points="0,0 22,0 22,150 0,150">
          <text:p/>
        </draw:polygon>
        <draw:polygon draw:style-name="gr27" draw:text-style-name="P27" draw:layer="layout" svg:width="0.021cm" svg:height="0.164cm" svg:x="32.111cm" svg:y="13.447cm" svg:viewBox="0 0 22 165" draw:points="0,0 22,0 22,165 0,165">
          <text:p/>
        </draw:polygon>
        <draw:polygon draw:style-name="gr27" draw:text-style-name="P27" draw:layer="layout" svg:width="0.021cm" svg:height="0.147cm" svg:x="32.142cm" svg:y="13.464cm" svg:viewBox="0 0 22 148" draw:points="0,0 22,0 22,148 0,148">
          <text:p/>
        </draw:polygon>
        <draw:polygon draw:style-name="gr27" draw:text-style-name="P27" draw:layer="layout" svg:width="0.022cm" svg:height="0.432cm" svg:x="32.172cm" svg:y="13.179cm" svg:viewBox="0 0 23 433" draw:points="0,0 23,0 23,433 0,433">
          <text:p/>
        </draw:polygon>
        <draw:polygon draw:style-name="gr27" draw:text-style-name="P27" draw:layer="layout" svg:width="0.023cm" svg:height="0.424cm" svg:x="32.203cm" svg:y="13.187cm" svg:viewBox="0 0 24 425" draw:points="0,0 24,0 24,425 0,425">
          <text:p/>
        </draw:polygon>
        <draw:polygon draw:style-name="gr27" draw:text-style-name="P27" draw:layer="layout" svg:width="0.021cm" svg:height="0.275cm" svg:x="32.234cm" svg:y="13.336cm" svg:viewBox="0 0 22 276" draw:points="0,0 22,0 22,276 0,276">
          <text:p/>
        </draw:polygon>
        <draw:polygon draw:style-name="gr27" draw:text-style-name="P27" draw:layer="layout" svg:width="0.021cm" svg:height="0.704cm" svg:x="32.265cm" svg:y="12.907cm" svg:viewBox="0 0 22 705" draw:points="0,0 22,0 22,705 0,705">
          <text:p/>
        </draw:polygon>
        <draw:polygon draw:style-name="gr27" draw:text-style-name="P27" draw:layer="layout" svg:width="0.021cm" svg:height="0.254cm" svg:x="32.296cm" svg:y="13.357cm" svg:viewBox="0 0 22 255" draw:points="0,0 22,0 22,255 0,255">
          <text:p/>
        </draw:polygon>
        <draw:polygon draw:style-name="gr27" draw:text-style-name="P27" draw:layer="layout" svg:width="0.022cm" svg:height="0.318cm" svg:x="32.326cm" svg:y="13.293cm" svg:viewBox="0 0 23 319" draw:points="0,0 23,0 23,319 0,319">
          <text:p/>
        </draw:polygon>
        <draw:polygon draw:style-name="gr27" draw:text-style-name="P27" draw:layer="layout" svg:width="0.022cm" svg:height="0.944cm" svg:x="32.357cm" svg:y="12.667cm" svg:viewBox="0 0 23 945" draw:points="0,0 23,0 23,945 0,945">
          <text:p/>
        </draw:polygon>
        <draw:polygon draw:style-name="gr27" draw:text-style-name="P27" draw:layer="layout" svg:width="0.022cm" svg:height="0.799cm" svg:x="32.388cm" svg:y="12.812cm" svg:viewBox="0 0 23 800" draw:points="0,0 23,0 23,800 0,800">
          <text:p/>
        </draw:polygon>
        <draw:polygon draw:style-name="gr27" draw:text-style-name="P27" draw:layer="layout" svg:width="0.021cm" svg:height="1.072cm" svg:x="32.419cm" svg:y="12.539cm" svg:viewBox="0 0 22 1073" draw:points="0,0 22,0 22,1073 0,1073">
          <text:p/>
        </draw:polygon>
        <draw:polygon draw:style-name="gr27" draw:text-style-name="P27" draw:layer="layout" svg:width="0.021cm" svg:height="0.126cm" svg:x="32.45cm" svg:y="13.485cm" svg:viewBox="0 0 22 127" draw:points="0,0 22,0 22,127 0,127">
          <text:p/>
        </draw:polygon>
        <draw:polygon draw:style-name="gr27" draw:text-style-name="P27" draw:layer="layout" svg:width="0.021cm" svg:height="0.072cm" svg:x="32.481cm" svg:y="13.539cm" svg:viewBox="0 0 22 73" draw:points="0,0 22,0 22,73 0,73">
          <text:p/>
        </draw:polygon>
        <draw:polygon draw:style-name="gr27" draw:text-style-name="P27" draw:layer="layout" svg:width="0.022cm" svg:height="0.34cm" svg:x="32.511cm" svg:y="13.271cm" svg:viewBox="0 0 23 341" draw:points="0,0 23,0 23,341 0,341">
          <text:p/>
        </draw:polygon>
        <draw:polygon draw:style-name="gr26" draw:text-style-name="P26" draw:layer="layout" svg:width="0.021cm" svg:height="0.002cm" svg:x="30.046cm" svg:y="13.609cm" svg:viewBox="0 0 22 3" draw:points="0,0 22,0 22,3 0,3">
          <text:p/>
        </draw:polygon>
        <draw:polygon draw:style-name="gr26" draw:text-style-name="P26" draw:layer="layout" svg:width="0.02cm" svg:height="0cm" svg:x="30.077cm" svg:y="13.61cm" svg:viewBox="0 0 21 1" draw:points="0,0 21,0 21,1 0,1">
          <text:p/>
        </draw:polygon>
        <draw:polygon draw:style-name="gr26" draw:text-style-name="P26" draw:layer="layout" svg:width="0.022cm" svg:height="0.001cm" svg:x="30.107cm" svg:y="13.61cm" svg:viewBox="0 0 23 2" draw:points="0,0 23,0 23,2 0,2">
          <text:p/>
        </draw:polygon>
        <draw:polygon draw:style-name="gr26" draw:text-style-name="P26" draw:layer="layout" svg:width="0.022cm" svg:height="0.001cm" svg:x="29.306cm" svg:y="13.61cm" svg:viewBox="0 0 23 2" draw:points="0,0 23,0 23,2 0,2">
          <text:p/>
        </draw:polygon>
        <draw:polygon draw:style-name="gr26" draw:text-style-name="P26" draw:layer="layout" svg:width="0.021cm" svg:height="0.002cm" svg:x="29.337cm" svg:y="13.609cm" svg:viewBox="0 0 22 3" draw:points="0,0 22,0 22,3 0,3">
          <text:p/>
        </draw:polygon>
        <draw:polygon draw:style-name="gr26" draw:text-style-name="P26" draw:layer="layout" svg:width="0.021cm" svg:height="0.004cm" svg:x="29.368cm" svg:y="13.608cm" svg:viewBox="0 0 22 5" draw:points="0,0 22,0 22,5 0,5">
          <text:p/>
        </draw:polygon>
        <draw:polygon draw:style-name="gr26" draw:text-style-name="P26" draw:layer="layout" svg:width="0.021cm" svg:height="0.009cm" svg:x="29.399cm" svg:y="13.602cm" svg:viewBox="0 0 22 10" draw:points="0,0 22,0 22,10 0,10">
          <text:p/>
        </draw:polygon>
        <draw:polygon draw:style-name="gr26" draw:text-style-name="P26" draw:layer="layout" svg:width="0.021cm" svg:height="0cm" svg:x="29.429cm" svg:y="13.611cm" svg:viewBox="0 0 22 0" draw:points="0,0 22,0">
          <text:p/>
        </draw:polygon>
        <draw:polygon draw:style-name="gr26" draw:text-style-name="P26" draw:layer="layout" svg:width="0.022cm" svg:height="0.004cm" svg:x="29.46cm" svg:y="13.607cm" svg:viewBox="0 0 23 5" draw:points="0,0 23,0 23,5 0,5">
          <text:p/>
        </draw:polygon>
        <draw:polygon draw:style-name="gr26" draw:text-style-name="P26" draw:layer="layout" svg:width="0.022cm" svg:height="0.011cm" svg:x="29.491cm" svg:y="13.6cm" svg:viewBox="0 0 23 12" draw:points="0,0 23,0 23,12 0,12">
          <text:p/>
        </draw:polygon>
        <draw:polygon draw:style-name="gr26" draw:text-style-name="P26" draw:layer="layout" svg:width="0.021cm" svg:height="0.002cm" svg:x="29.522cm" svg:y="13.609cm" svg:viewBox="0 0 22 3" draw:points="0,0 22,0 22,3 0,3">
          <text:p/>
        </draw:polygon>
        <draw:polygon draw:style-name="gr26" draw:text-style-name="P26" draw:layer="layout" svg:width="0.021cm" svg:height="0.007cm" svg:x="29.553cm" svg:y="13.604cm" svg:viewBox="0 0 22 8" draw:points="0,0 22,0 22,8 0,8">
          <text:p/>
        </draw:polygon>
        <draw:polygon draw:style-name="gr26" draw:text-style-name="P26" draw:layer="layout" svg:width="0.021cm" svg:height="0.045cm" svg:x="29.584cm" svg:y="13.566cm" svg:viewBox="0 0 22 46" draw:points="0,0 22,0 22,46 0,46">
          <text:p/>
        </draw:polygon>
        <draw:polygon draw:style-name="gr26" draw:text-style-name="P26" draw:layer="layout" svg:width="0.022cm" svg:height="0.007cm" svg:x="29.614cm" svg:y="13.604cm" svg:viewBox="0 0 23 8" draw:points="0,0 23,0 23,8 0,8">
          <text:p/>
        </draw:polygon>
        <draw:polygon draw:style-name="gr26" draw:text-style-name="P26" draw:layer="layout" svg:width="0.022cm" svg:height="0.033cm" svg:x="29.645cm" svg:y="13.578cm" svg:viewBox="0 0 23 34" draw:points="0,0 23,0 23,34 0,34">
          <text:p/>
        </draw:polygon>
        <draw:polygon draw:style-name="gr26" draw:text-style-name="P26" draw:layer="layout" svg:width="0.021cm" svg:height="0.084cm" svg:x="29.676cm" svg:y="13.527cm" svg:viewBox="0 0 22 85" draw:points="0,0 22,0 22,85 0,85">
          <text:p/>
        </draw:polygon>
        <draw:polygon draw:style-name="gr26" draw:text-style-name="P26" draw:layer="layout" svg:width="0.021cm" svg:height="0.019cm" svg:x="29.707cm" svg:y="13.592cm" svg:viewBox="0 0 22 20" draw:points="0,0 22,0 22,20 0,20">
          <text:p/>
        </draw:polygon>
        <draw:polygon draw:style-name="gr26" draw:text-style-name="P26" draw:layer="layout" svg:width="0.021cm" svg:height="0.071cm" svg:x="29.738cm" svg:y="13.54cm" svg:viewBox="0 0 22 72" draw:points="0,0 22,0 22,72 0,72">
          <text:p/>
        </draw:polygon>
        <draw:polygon draw:style-name="gr26" draw:text-style-name="P26" draw:layer="layout" svg:width="0.022cm" svg:height="0.089cm" svg:x="29.768cm" svg:y="13.522cm" svg:viewBox="0 0 23 90" draw:points="0,0 23,0 23,90 0,90">
          <text:p/>
        </draw:polygon>
        <draw:polygon draw:style-name="gr26" draw:text-style-name="P26" draw:layer="layout" svg:width="0.022cm" svg:height="0.019cm" svg:x="29.799cm" svg:y="13.592cm" svg:viewBox="0 0 23 20" draw:points="0,0 23,0 23,20 0,20">
          <text:p/>
        </draw:polygon>
        <draw:polygon draw:style-name="gr26" draw:text-style-name="P26" draw:layer="layout" svg:width="0.023cm" svg:height="0.036cm" svg:x="29.83cm" svg:y="13.575cm" svg:viewBox="0 0 24 37" draw:points="0,0 24,0 24,37 0,37">
          <text:p/>
        </draw:polygon>
        <draw:polygon draw:style-name="gr26" draw:text-style-name="P26" draw:layer="layout" svg:width="0.021cm" svg:height="0.033cm" svg:x="29.861cm" svg:y="13.578cm" svg:viewBox="0 0 22 34" draw:points="0,0 22,0 22,34 0,34">
          <text:p/>
        </draw:polygon>
        <draw:polygon draw:style-name="gr26" draw:text-style-name="P26" draw:layer="layout" svg:width="0.021cm" svg:height="0.007cm" svg:x="29.892cm" svg:y="13.604cm" svg:viewBox="0 0 22 8" draw:points="0,0 22,0 22,8 0,8">
          <text:p/>
        </draw:polygon>
        <draw:polygon draw:style-name="gr26" draw:text-style-name="P26" draw:layer="layout" svg:width="0.021cm" svg:height="0.007cm" svg:x="29.923cm" svg:y="13.604cm" svg:viewBox="0 0 22 8" draw:points="0,0 22,0 22,8 0,8">
          <text:p/>
        </draw:polygon>
        <draw:polygon draw:style-name="gr26" draw:text-style-name="P26" draw:layer="layout" svg:width="0.022cm" svg:height="0.006cm" svg:x="29.953cm" svg:y="13.605cm" svg:viewBox="0 0 23 7" draw:points="0,0 23,0 23,7 0,7">
          <text:p/>
        </draw:polygon>
        <draw:polygon draw:style-name="gr26" draw:text-style-name="P26" draw:layer="layout" svg:width="0.022cm" svg:height="0.001cm" svg:x="29.984cm" svg:y="13.61cm" svg:viewBox="0 0 23 2" draw:points="0,0 23,0 23,2 0,2">
          <text:p/>
        </draw:polygon>
        <draw:polygon draw:style-name="gr26" draw:text-style-name="P26" draw:layer="layout" svg:width="0.022cm" svg:height="0.005cm" svg:x="30.015cm" svg:y="13.606cm" svg:viewBox="0 0 23 6" draw:points="0,0 23,0 23,6 0,6">
          <text:p/>
        </draw:polygon>
        <draw:polygon draw:style-name="gr27" draw:text-style-name="P27" draw:layer="layout" svg:width="0.022cm" svg:height="0.156cm" svg:x="33.374cm" svg:y="13.455cm" svg:viewBox="0 0 23 157" draw:points="0,0 23,0 23,157 0,157">
          <text:p/>
        </draw:polygon>
        <draw:polygon draw:style-name="gr27" draw:text-style-name="P27" draw:layer="layout" svg:width="0.022cm" svg:height="0.045cm" svg:x="33.405cm" svg:y="13.566cm" svg:viewBox="0 0 23 46" draw:points="0,0 23,0 23,46 0,46">
          <text:p/>
        </draw:polygon>
        <draw:polygon draw:style-name="gr27" draw:text-style-name="P27" draw:layer="layout" svg:width="0.021cm" svg:height="0.03cm" svg:x="33.436cm" svg:y="13.581cm" svg:viewBox="0 0 22 31" draw:points="0,0 22,0 22,31 0,31">
          <text:p/>
        </draw:polygon>
        <draw:polygon draw:style-name="gr27" draw:text-style-name="P27" draw:layer="layout" svg:width="0.021cm" svg:height="0.002cm" svg:x="32.635cm" svg:y="13.609cm" svg:viewBox="0 0 22 3" draw:points="0,0 22,0 22,3 0,3">
          <text:p/>
        </draw:polygon>
        <draw:polygon draw:style-name="gr27" draw:text-style-name="P27" draw:layer="layout" svg:width="0.023cm" svg:height="0.002cm" svg:x="32.665cm" svg:y="13.609cm" svg:viewBox="0 0 24 3" draw:points="0,0 24,0 24,3 0,3">
          <text:p/>
        </draw:polygon>
        <draw:polygon draw:style-name="gr27" draw:text-style-name="P27" draw:layer="layout" svg:width="0.022cm" svg:height="0.007cm" svg:x="32.696cm" svg:y="13.604cm" svg:viewBox="0 0 23 8" draw:points="0,0 23,0 23,8 0,8">
          <text:p/>
        </draw:polygon>
        <draw:polygon draw:style-name="gr27" draw:text-style-name="P27" draw:layer="layout" svg:width="0.022cm" svg:height="0.002cm" svg:x="32.727cm" svg:y="13.609cm" svg:viewBox="0 0 23 3" draw:points="0,0 23,0 23,3 0,3">
          <text:p/>
        </draw:polygon>
        <draw:polygon draw:style-name="gr27" draw:text-style-name="P27" draw:layer="layout" svg:width="0.021cm" svg:height="0.004cm" svg:x="32.758cm" svg:y="13.608cm" svg:viewBox="0 0 22 5" draw:points="0,0 22,0 22,5 0,5">
          <text:p/>
        </draw:polygon>
        <draw:polygon draw:style-name="gr27" draw:text-style-name="P27" draw:layer="layout" svg:width="0.021cm" svg:height="0.005cm" svg:x="32.789cm" svg:y="13.606cm" svg:viewBox="0 0 22 6" draw:points="0,0 22,0 22,6 0,6">
          <text:p/>
        </draw:polygon>
        <draw:polygon draw:style-name="gr27" draw:text-style-name="P27" draw:layer="layout" svg:width="0.021cm" svg:height="0.024cm" svg:x="32.82cm" svg:y="13.587cm" svg:viewBox="0 0 22 25" draw:points="0,0 22,0 22,25 0,25">
          <text:p/>
        </draw:polygon>
        <draw:polygon draw:style-name="gr27" draw:text-style-name="P27" draw:layer="layout" svg:width="0.022cm" svg:height="0.022cm" svg:x="32.85cm" svg:y="13.589cm" svg:viewBox="0 0 23 23" draw:points="0,0 23,0 23,23 0,23">
          <text:p/>
        </draw:polygon>
        <draw:polygon draw:style-name="gr27" draw:text-style-name="P27" draw:layer="layout" svg:width="0.022cm" svg:height="0.027cm" svg:x="32.881cm" svg:y="13.584cm" svg:viewBox="0 0 23 28" draw:points="0,0 23,0 23,28 0,28">
          <text:p/>
        </draw:polygon>
        <draw:polygon draw:style-name="gr27" draw:text-style-name="P27" draw:layer="layout" svg:width="0.022cm" svg:height="0.137cm" svg:x="32.912cm" svg:y="13.474cm" svg:viewBox="0 0 23 138" draw:points="0,0 23,0 23,138 0,138">
          <text:p/>
        </draw:polygon>
        <draw:polygon draw:style-name="gr27" draw:text-style-name="P27" draw:layer="layout" svg:width="0.021cm" svg:height="0.127cm" svg:x="32.943cm" svg:y="13.484cm" svg:viewBox="0 0 22 128" draw:points="0,0 22,0 22,128 0,128">
          <text:p/>
        </draw:polygon>
        <draw:polygon draw:style-name="gr27" draw:text-style-name="P27" draw:layer="layout" svg:width="0.021cm" svg:height="0.115cm" svg:x="32.974cm" svg:y="13.496cm" svg:viewBox="0 0 22 116" draw:points="0,0 22,0 22,116 0,116">
          <text:p/>
        </draw:polygon>
        <draw:polygon draw:style-name="gr27" draw:text-style-name="P27" draw:layer="layout" svg:width="0.022cm" svg:height="0.405cm" svg:x="33.004cm" svg:y="13.206cm" svg:viewBox="0 0 23 406" draw:points="0,0 23,0 23,406 0,406">
          <text:p/>
        </draw:polygon>
        <draw:polygon draw:style-name="gr27" draw:text-style-name="P27" draw:layer="layout" svg:width="0.022cm" svg:height="0.249cm" svg:x="33.035cm" svg:y="13.362cm" svg:viewBox="0 0 23 250" draw:points="0,0 23,0 23,250 0,250">
          <text:p/>
        </draw:polygon>
        <draw:polygon draw:style-name="gr27" draw:text-style-name="P27" draw:layer="layout" svg:width="0.022cm" svg:height="0.233cm" svg:x="33.066cm" svg:y="13.378cm" svg:viewBox="0 0 23 234" draw:points="0,0 23,0 23,234 0,234">
          <text:p/>
        </draw:polygon>
        <draw:polygon draw:style-name="gr27" draw:text-style-name="P27" draw:layer="layout" svg:width="0.021cm" svg:height="0.534cm" svg:x="33.097cm" svg:y="13.077cm" svg:viewBox="0 0 22 535" draw:points="0,0 22,0 22,535 0,535">
          <text:p/>
        </draw:polygon>
        <draw:polygon draw:style-name="gr27" draw:text-style-name="P27" draw:layer="layout" svg:width="0.021cm" svg:height="0.22cm" svg:x="33.128cm" svg:y="13.391cm" svg:viewBox="0 0 22 221" draw:points="0,0 22,0 22,221 0,221">
          <text:p/>
        </draw:polygon>
        <draw:polygon draw:style-name="gr27" draw:text-style-name="P27" draw:layer="layout" svg:width="0.021cm" svg:height="0.234cm" svg:x="33.159cm" svg:y="13.377cm" svg:viewBox="0 0 22 235" draw:points="0,0 22,0 22,235 0,235">
          <text:p/>
        </draw:polygon>
        <draw:polygon draw:style-name="gr27" draw:text-style-name="P27" draw:layer="layout" svg:width="0.022cm" svg:height="0.516cm" svg:x="33.189cm" svg:y="13.095cm" svg:viewBox="0 0 23 517" draw:points="0,0 23,0 23,517 0,517">
          <text:p/>
        </draw:polygon>
        <draw:polygon draw:style-name="gr27" draw:text-style-name="P27" draw:layer="layout" svg:width="0.022cm" svg:height="0.391cm" svg:x="33.22cm" svg:y="13.22cm" svg:viewBox="0 0 23 392" draw:points="0,0 23,0 23,392 0,392">
          <text:p/>
        </draw:polygon>
        <draw:polygon draw:style-name="gr27" draw:text-style-name="P27" draw:layer="layout" svg:width="0.022cm" svg:height="0.457cm" svg:x="33.251cm" svg:y="13.154cm" svg:viewBox="0 0 23 458" draw:points="0,0 23,0 23,458 0,458">
          <text:p/>
        </draw:polygon>
        <draw:polygon draw:style-name="gr27" draw:text-style-name="P27" draw:layer="layout" svg:width="0.021cm" svg:height="0.126cm" svg:x="33.282cm" svg:y="13.485cm" svg:viewBox="0 0 22 127" draw:points="0,0 22,0 22,127 0,127">
          <text:p/>
        </draw:polygon>
        <draw:polygon draw:style-name="gr27" draw:text-style-name="P27" draw:layer="layout" svg:width="0.021cm" svg:height="0.082cm" svg:x="33.313cm" svg:y="13.529cm" svg:viewBox="0 0 22 83" draw:points="0,0 22,0 22,83 0,83">
          <text:p/>
        </draw:polygon>
        <draw:polygon draw:style-name="gr27" draw:text-style-name="P27" draw:layer="layout" svg:width="0.022cm" svg:height="0.055cm" svg:x="33.343cm" svg:y="13.556cm" svg:viewBox="0 0 23 56" draw:points="0,0 23,0 23,56 0,56">
          <text:p/>
        </draw:polygon>
        <draw:polygon draw:style-name="gr26" draw:text-style-name="P26" draw:layer="layout" svg:width="0.021cm" svg:height="0.004cm" svg:x="30.878cm" svg:y="13.607cm" svg:viewBox="0 0 22 5" draw:points="0,0 22,0 22,5 0,5">
          <text:p/>
        </draw:polygon>
        <draw:polygon draw:style-name="gr26" draw:text-style-name="P26" draw:layer="layout" svg:width="0.02cm" svg:height="0cm" svg:x="30.909cm" svg:y="13.611cm" svg:viewBox="0 0 21 0" draw:points="0,0 21,0">
          <text:p/>
        </draw:polygon>
        <draw:polygon draw:style-name="gr26" draw:text-style-name="P26" draw:layer="layout" svg:width="0.02cm" svg:height="0cm" svg:x="30.94cm" svg:y="13.611cm" svg:viewBox="0 0 21 0" draw:points="0,0 21,0">
          <text:p/>
        </draw:polygon>
        <draw:polygon draw:style-name="gr26" draw:text-style-name="P26" draw:layer="layout" svg:width="0.022cm" svg:height="0.005cm" svg:x="30.138cm" svg:y="13.606cm" svg:viewBox="0 0 23 6" draw:points="0,0 23,0 23,6 0,6">
          <text:p/>
        </draw:polygon>
        <draw:polygon draw:style-name="gr26" draw:text-style-name="P26" draw:layer="layout" svg:width="0.022cm" svg:height="0.001cm" svg:x="30.169cm" svg:y="13.61cm" svg:viewBox="0 0 23 2" draw:points="0,0 23,0 23,2 0,2">
          <text:p/>
        </draw:polygon>
        <draw:polygon draw:style-name="gr26" draw:text-style-name="P26" draw:layer="layout" svg:width="0.021cm" svg:height="0.007cm" svg:x="30.2cm" svg:y="13.604cm" svg:viewBox="0 0 22 8" draw:points="0,0 22,0 22,8 0,8">
          <text:p/>
        </draw:polygon>
        <draw:polygon draw:style-name="gr26" draw:text-style-name="P26" draw:layer="layout" svg:width="0.021cm" svg:height="0.003cm" svg:x="30.231cm" svg:y="13.608cm" svg:viewBox="0 0 22 4" draw:points="0,0 22,0 22,4 0,4">
          <text:p/>
        </draw:polygon>
        <draw:polygon draw:style-name="gr26" draw:text-style-name="P26" draw:layer="layout" svg:width="0.021cm" svg:height="0.001cm" svg:x="30.262cm" svg:y="13.61cm" svg:viewBox="0 0 22 2" draw:points="0,0 22,0 22,2 0,2">
          <text:p/>
        </draw:polygon>
        <draw:polygon draw:style-name="gr26" draw:text-style-name="P26" draw:layer="layout" svg:width="0.023cm" svg:height="0.005cm" svg:x="30.292cm" svg:y="13.606cm" svg:viewBox="0 0 24 6" draw:points="0,0 24,0 24,6 0,6">
          <text:p/>
        </draw:polygon>
        <draw:polygon draw:style-name="gr26" draw:text-style-name="P26" draw:layer="layout" svg:width="0.022cm" svg:height="0.014cm" svg:x="30.323cm" svg:y="13.597cm" svg:viewBox="0 0 23 15" draw:points="0,0 23,0 23,15 0,15">
          <text:p/>
        </draw:polygon>
        <draw:polygon draw:style-name="gr26" draw:text-style-name="P26" draw:layer="layout" svg:width="0.021cm" svg:height="0cm" svg:x="30.354cm" svg:y="13.611cm" svg:viewBox="0 0 22 0" draw:points="0,0 22,0">
          <text:p/>
        </draw:polygon>
        <draw:polygon draw:style-name="gr26" draw:text-style-name="P26" draw:layer="layout" svg:width="0.021cm" svg:height="0.016cm" svg:x="30.385cm" svg:y="13.595cm" svg:viewBox="0 0 22 17" draw:points="0,0 22,0 22,17 0,17">
          <text:p/>
        </draw:polygon>
        <draw:polygon draw:style-name="gr26" draw:text-style-name="P26" draw:layer="layout" svg:width="0.021cm" svg:height="0.05cm" svg:x="30.416cm" svg:y="13.561cm" svg:viewBox="0 0 22 51" draw:points="0,0 22,0 22,51 0,51">
          <text:p/>
        </draw:polygon>
        <draw:polygon draw:style-name="gr26" draw:text-style-name="P26" draw:layer="layout" svg:width="0.022cm" svg:height="0.013cm" svg:x="30.446cm" svg:y="13.598cm" svg:viewBox="0 0 23 14" draw:points="0,0 23,0 23,14 0,14">
          <text:p/>
        </draw:polygon>
        <draw:polygon draw:style-name="gr26" draw:text-style-name="P26" draw:layer="layout" svg:width="0.022cm" svg:height="0.039cm" svg:x="30.477cm" svg:y="13.572cm" svg:viewBox="0 0 23 40" draw:points="0,0 23,0 23,40 0,40">
          <text:p/>
        </draw:polygon>
        <draw:polygon draw:style-name="gr26" draw:text-style-name="P26" draw:layer="layout" svg:width="0.022cm" svg:height="0.127cm" svg:x="30.508cm" svg:y="13.484cm" svg:viewBox="0 0 23 128" draw:points="0,0 23,0 23,128 0,128">
          <text:p/>
        </draw:polygon>
        <draw:polygon draw:style-name="gr26" draw:text-style-name="P26" draw:layer="layout" svg:width="0.021cm" svg:height="0.017cm" svg:x="30.539cm" svg:y="13.594cm" svg:viewBox="0 0 22 18" draw:points="0,0 22,0 22,18 0,18">
          <text:p/>
        </draw:polygon>
        <draw:polygon draw:style-name="gr26" draw:text-style-name="P26" draw:layer="layout" svg:width="0.021cm" svg:height="0.129cm" svg:x="30.57cm" svg:y="13.482cm" svg:viewBox="0 0 22 130" draw:points="0,0 22,0 22,130 0,130">
          <text:p/>
        </draw:polygon>
        <draw:polygon draw:style-name="gr26" draw:text-style-name="P26" draw:layer="layout" svg:width="0.021cm" svg:height="0.161cm" svg:x="30.601cm" svg:y="13.45cm" svg:viewBox="0 0 22 162" draw:points="0,0 22,0 22,162 0,162">
          <text:p/>
        </draw:polygon>
        <draw:polygon draw:style-name="gr26" draw:text-style-name="P26" draw:layer="layout" svg:width="0.022cm" svg:height="0.046cm" svg:x="30.631cm" svg:y="13.565cm" svg:viewBox="0 0 23 47" draw:points="0,0 23,0 23,47 0,47">
          <text:p/>
        </draw:polygon>
        <draw:polygon draw:style-name="gr26" draw:text-style-name="P26" draw:layer="layout" svg:width="0.022cm" svg:height="0.056cm" svg:x="30.662cm" svg:y="13.555cm" svg:viewBox="0 0 23 57" draw:points="0,0 23,0 23,57 0,57">
          <text:p/>
        </draw:polygon>
        <draw:polygon draw:style-name="gr26" draw:text-style-name="P26" draw:layer="layout" svg:width="0.022cm" svg:height="0.144cm" svg:x="30.693cm" svg:y="13.467cm" svg:viewBox="0 0 23 145" draw:points="0,0 23,0 23,145 0,145">
          <text:p/>
        </draw:polygon>
        <draw:polygon draw:style-name="gr26" draw:text-style-name="P26" draw:layer="layout" svg:width="0.021cm" svg:height="0.017cm" svg:x="30.724cm" svg:y="13.594cm" svg:viewBox="0 0 22 18" draw:points="0,0 22,0 22,18 0,18">
          <text:p/>
        </draw:polygon>
        <draw:polygon draw:style-name="gr26" draw:text-style-name="P26" draw:layer="layout" svg:width="0.021cm" svg:height="0.013cm" svg:x="30.755cm" svg:y="13.598cm" svg:viewBox="0 0 22 14" draw:points="0,0 22,0 22,14 0,14">
          <text:p/>
        </draw:polygon>
        <draw:polygon draw:style-name="gr26" draw:text-style-name="P26" draw:layer="layout" svg:width="0.022cm" svg:height="0.027cm" svg:x="30.785cm" svg:y="13.584cm" svg:viewBox="0 0 23 28" draw:points="0,0 23,0 23,28 0,28">
          <text:p/>
        </draw:polygon>
        <draw:polygon draw:style-name="gr26" draw:text-style-name="P26" draw:layer="layout" svg:width="0.022cm" svg:height="0.003cm" svg:x="30.816cm" svg:y="13.608cm" svg:viewBox="0 0 23 4" draw:points="0,0 23,0 23,4 0,4">
          <text:p/>
        </draw:polygon>
        <draw:polygon draw:style-name="gr26" draw:text-style-name="P26" draw:layer="layout" svg:width="0.022cm" svg:height="0.011cm" svg:x="30.847cm" svg:y="13.6cm" svg:viewBox="0 0 23 12" draw:points="0,0 23,0 23,12 0,12">
          <text:p/>
        </draw:polygon>
        <draw:polygon draw:style-name="gr46" draw:text-style-name="P26" draw:layer="layout" svg:width="2.497cm" svg:height="0.174cm" svg:x="28.469cm" svg:y="11.473cm" svg:viewBox="0 0 2498 175" draw:points="0,0 2498,0 2498,175 0,175">
          <text:p/>
        </draw:polygon>
        <draw:polygon draw:style-name="gr47" draw:text-style-name="P27" draw:layer="layout" svg:width="2.496cm" svg:height="0.174cm" svg:x="30.966cm" svg:y="11.473cm" svg:viewBox="0 0 2497 175" draw:points="0,0 2497,0 2497,175 0,175">
          <text:p/>
        </draw:polygon>
        <draw:line draw:style-name="gr48" draw:text-style-name="P2" draw:layer="layout" svg:x1="30.868cm" svg:y1="12.139cm" svg:x2="31.411cm" svg:y2="12.184cm">
          <text:p/>
        </draw:line>
        <draw:polygon draw:style-name="gr4" draw:text-style-name="P4" draw:layer="layout" svg:width="0.02cm" svg:height="0.022cm" svg:x="31.206cm" svg:y="12.126cm" svg:viewBox="0 0 21 23" draw:points="0,23 21,14 3,0">
          <text:p/>
        </draw:polygon>
        <draw:polygon draw:style-name="gr48" draw:text-style-name="P2" draw:layer="layout" svg:width="0.02cm" svg:height="0.022cm" svg:x="31.39cm" svg:y="12.17cm" svg:viewBox="0 0 21 23" draw:points="0,23 21,13 2,0">
          <text:p/>
        </draw:polygon>
        <draw:line draw:style-name="gr48" draw:text-style-name="P2" draw:layer="layout" svg:x1="32.164cm" svg:y1="11.954cm" svg:x2="31.577cm" svg:y2="12.298cm">
          <text:p/>
        </draw:line>
        <draw:polygon draw:style-name="gr48" draw:text-style-name="P2" draw:layer="layout" svg:width="0.02cm" svg:height="0.021cm" svg:x="31.557cm" svg:y="12.287cm" svg:viewBox="0 0 21 22" draw:points="17,0 0,15 21,22">
          <text:p/>
        </draw:polygon>
        <draw:line draw:style-name="gr48" draw:text-style-name="P2" draw:layer="layout" svg:x1="32.698cm" svg:y1="12.463cm" svg:x2="32.455cm" svg:y2="12.542cm">
          <text:p/>
        </draw:line>
        <draw:polygon draw:style-name="gr4" draw:text-style-name="P4" draw:layer="layout" svg:width="0.02cm" svg:height="0.024cm" svg:x="32.639cm" svg:y="12.506cm" svg:viewBox="0 0 21 25" draw:points="19,0 0,14 21,25">
          <text:p/>
        </draw:polygon>
        <draw:polygon draw:style-name="gr48" draw:text-style-name="P2" draw:layer="layout" svg:width="0.02cm" svg:height="0.022cm" svg:x="32.455cm" svg:y="12.528cm" svg:viewBox="0 0 21 23" draw:points="19,0 0,14 21,23">
          <text:p/>
        </draw:polygon>
        <draw:frame draw:style-name="gr50" draw:text-style-name="P38" draw:layer="layout" svg:width="3.026cm" svg:height="0.856cm" svg:x="29.854cm" svg:y="10.483cm">
          <draw:text-box>
            <text:p text:style-name="P6"><text:span text:style-name="T5">InsDel2b</text:span></text:p>
          </draw:text-box>
        </draw:frame>
        <draw:frame draw:style-name="gr54" draw:text-style-name="P39" draw:layer="layout" svg:width="1.978cm" svg:height="0.357cm" svg:x="29.194cm" svg:y="11.792cm">
          <draw:text-box>
            <text:p text:style-name="P6"><text:span text:style-name="T6">A[Del(T):R6]A</text:span></text:p>
          </draw:text-box>
        </draw:frame>
        <draw:line draw:style-name="gr45" draw:text-style-name="P2" draw:layer="layout" svg:x1="28.421cm" svg:y1="13.675cm" svg:x2="28.421cm" svg:y2="11.473cm">
          <text:p/>
        </draw:line>
        <draw:line draw:style-name="gr53" draw:text-style-name="P2" draw:layer="layout" svg:x1="30.966cm" svg:y1="13.253cm" svg:x2="30.966cm" svg:y2="13.675cm">
          <text:p/>
        </draw:line>
        <draw:line draw:style-name="gr53" draw:text-style-name="P2" draw:layer="layout" svg:x1="29.302cm" svg:y1="13.253cm" svg:x2="29.302cm" svg:y2="13.675cm">
          <text:p/>
        </draw:line>
        <draw:line draw:style-name="gr53" draw:text-style-name="P2" draw:layer="layout" svg:x1="32.63cm" svg:y1="13.253cm" svg:x2="32.63cm" svg:y2="13.675cm">
          <text:p/>
        </draw:line>
        <draw:line draw:style-name="gr53" draw:text-style-name="P2" draw:layer="layout" svg:x1="30.134cm" svg:y1="13.253cm" svg:x2="30.134cm" svg:y2="13.675cm">
          <text:p/>
        </draw:line>
        <draw:line draw:style-name="gr53" draw:text-style-name="P2" draw:layer="layout" svg:x1="33.462cm" svg:y1="13.253cm" svg:x2="33.462cm" svg:y2="13.675cm">
          <text:p/>
        </draw:line>
        <draw:line draw:style-name="gr53" draw:text-style-name="P2" draw:layer="layout" svg:x1="31.798cm" svg:y1="13.253cm" svg:x2="31.798cm" svg:y2="13.675cm">
          <text:p/>
        </draw:line>
        <draw:frame draw:style-name="gr66" draw:text-style-name="P39" draw:layer="layout" svg:width="2.031cm" svg:height="0.357cm" svg:x="32.215cm" svg:y="12.129cm">
          <draw:text-box>
            <text:p text:style-name="P6"><text:span text:style-name="T6">C[Del(T):R7]G</text:span></text:p>
          </draw:text-box>
        </draw:frame>
        <draw:path draw:style-name="gr6" draw:text-style-name="P5" draw:layer="layout" svg:width="18.44cm" svg:height="1.237cm" svg:x="22.102cm" svg:y="2.773cm" svg:viewBox="0 0 18441 1238" svg:d="M139 1238c-77 0-139-62-139-139v-960c0-77 62-139 139-139h18163c77 0 139 62 139 139v960c0 77-62 139-139 139z">
          <text:p/>
        </draw:path>
        <draw:frame draw:style-name="gr54" draw:text-style-name="P39" draw:layer="layout" svg:width="1.978cm" svg:height="0.357cm" svg:x="31.464cm" svg:y="11.6cm">
          <draw:text-box>
            <text:p text:style-name="P6"><text:span text:style-name="T6">A[Del(T):R7]A</text:span></text:p>
          </draw:text-box>
        </draw:frame>
        <draw:line draw:style-name="gr34" draw:text-style-name="P2" draw:layer="layout" svg:x1="20.708cm" svg:y1="5.572cm" svg:x2="21.7cm" svg:y2="5.572cm">
          <text:p/>
        </draw:line>
        <draw:polygon draw:style-name="gr35" draw:text-style-name="P31" draw:layer="layout" svg:width="0.332cm" svg:height="0.359cm" svg:x="21.489cm" svg:y="5.392cm" svg:viewBox="0 0 333 360" draw:points="0,360 180,181 0,0 152,0 333,181 152,360">
          <text:p/>
        </draw:polygon>
        <draw:line draw:style-name="gr34" draw:text-style-name="P2" draw:layer="layout" svg:x1="20.753cm" svg:y1="5.543cm" svg:x2="20.753cm" svg:y2="17.85cm">
          <text:p/>
        </draw:line>
        <draw:line draw:style-name="gr34" draw:text-style-name="P2" draw:layer="layout" svg:x1="20.762cm" svg:y1="11.662cm" svg:x2="19.16cm" svg:y2="11.662cm">
          <text:p/>
        </draw:line>
        <draw:frame draw:style-name="gr67" draw:text-style-name="P8" draw:layer="layout" svg:width="16.652cm" svg:height="0.924cm" svg:x="23.027cm" svg:y="2.902cm">
          <draw:text-box>
            <text:p text:style-name="P6"><text:span text:style-name="T2">89-Type: Higher resolution in Poly-T tracts</text:span></text:p>
          </draw:text-box>
        </draw:frame>
        <draw:frame draw:style-name="gr68" draw:text-style-name="P7" draw:layer="layout" svg:width="11.402cm" svg:height="1.102cm" svg:x="25.649cm" svg:y="0.367cm">
          <draw:text-box>
            <text:p text:style-name="P6"><text:span text:style-name="T7">De Novo </text:span><text:span text:style-name="T8">Extraction and </text:span></text:p>
          </draw:text-box>
        </draw:frame>
        <draw:frame draw:style-name="gr69" draw:text-style-name="P7" draw:layer="layout" svg:width="15.513cm" svg:height="1.102cm" svg:x="23.949cm" svg:y="1.552cm">
          <draw:text-box>
            <text:p text:style-name="P6"><text:span text:style-name="T8">Mapping between Classifications</text:span></text:p>
          </draw:text-box>
        </draw:frame>
        <draw:frame draw:style-name="gr2" draw:text-style-name="P2" draw:layer="layout" svg:width="10.476cm" svg:height="11.856cm" svg:x="3.14cm" svg:y="22.895cm">
          <draw:image xlink:href="Pictures/100000000000098E00000AD0C9C96992.png" xlink:type="simple" xlink:show="embed" xlink:actuate="onLoad" draw:mime-type="image/png">
            <text:p/>
          </draw:image>
        </draw:frame>
        <draw:frame draw:style-name="gr2" draw:text-style-name="P2" draw:layer="layout" svg:width="10.688cm" svg:height="12.511cm" svg:x="6.526cm" svg:y="28.363cm">
          <draw:image xlink:href="Pictures/100000000000099900000B3C72C4199F.png" xlink:type="simple" xlink:show="embed" xlink:actuate="onLoad" draw:mime-type="image/png">
            <text:p/>
          </draw:image>
        </draw:frame>
        <draw:polygon draw:style-name="gr4" draw:text-style-name="P4" draw:layer="layout" svg:width="34.467cm" svg:height="0.045cm" svg:x="3.527cm" svg:y="20.002cm" svg:viewBox="0 0 34468 46" draw:points="33929,46 539,46 0,0 34468,0">
          <text:p/>
        </draw:polygon>
        <draw:polygon draw:style-name="gr70" draw:text-style-name="P45" draw:layer="layout" svg:width="33.389cm" svg:height="0.023cm" svg:x="4.066cm" svg:y="20.047cm" svg:viewBox="0 0 33390 24" draw:points="33121,24 269,24 0,0 33390,0">
          <text:p/>
        </draw:polygon>
        <draw:polygon draw:style-name="gr71" draw:text-style-name="P46" draw:layer="layout" svg:width="32.851cm" svg:height="0.022cm" svg:x="4.335cm" svg:y="20.07cm" svg:viewBox="0 0 32852 23" draw:points="32583,23 269,23 0,0 32852,0">
          <text:p/>
        </draw:polygon>
        <draw:polygon draw:style-name="gr72" draw:text-style-name="P47" draw:layer="layout" svg:width="32.313cm" svg:height="0.023cm" svg:x="4.604cm" svg:y="20.092cm" svg:viewBox="0 0 32314 24" draw:points="32044,24 270,24 0,0 32314,0">
          <text:p/>
        </draw:polygon>
        <draw:polygon draw:style-name="gr73" draw:text-style-name="P48" draw:layer="layout" svg:width="31.773cm" svg:height="0.023cm" svg:x="4.874cm" svg:y="20.115cm" svg:viewBox="0 0 31774 24" draw:points="31505,24 269,24 0,0 31774,0">
          <text:p/>
        </draw:polygon>
        <draw:polygon draw:style-name="gr74" draw:text-style-name="P49" draw:layer="layout" svg:width="31.235cm" svg:height="0.022cm" svg:x="5.143cm" svg:y="20.138cm" svg:viewBox="0 0 31236 23" draw:points="30967,23 269,23 0,0 31236,0">
          <text:p/>
        </draw:polygon>
        <draw:polygon draw:style-name="gr75" draw:text-style-name="P50" draw:layer="layout" svg:width="30.697cm" svg:height="0.023cm" svg:x="5.412cm" svg:y="20.16cm" svg:viewBox="0 0 30698 24" draw:points="30429,24 269,24 0,0 30698,0">
          <text:p/>
        </draw:polygon>
        <draw:polygon draw:style-name="gr76" draw:text-style-name="P51" draw:layer="layout" svg:width="30.159cm" svg:height="0.022cm" svg:x="5.681cm" svg:y="20.183cm" svg:viewBox="0 0 30160 23" draw:points="29890,23 270,23 0,0 30160,0">
          <text:p/>
        </draw:polygon>
        <draw:polygon draw:style-name="gr77" draw:text-style-name="P52" draw:layer="layout" svg:width="29.619cm" svg:height="0.023cm" svg:x="5.951cm" svg:y="20.205cm" svg:viewBox="0 0 29620 24" draw:points="29351,24 269,24 0,0 29620,0">
          <text:p/>
        </draw:polygon>
        <draw:polygon draw:style-name="gr78" draw:text-style-name="P53" draw:layer="layout" svg:width="29.081cm" svg:height="0.024cm" svg:x="6.22cm" svg:y="20.228cm" svg:viewBox="0 0 29082 25" draw:points="28813,25 269,25 0,0 29082,0">
          <text:p/>
        </draw:polygon>
        <draw:polygon draw:style-name="gr79" draw:text-style-name="P54" draw:layer="layout" svg:width="28.543cm" svg:height="0.022cm" svg:x="6.489cm" svg:y="20.251cm" svg:viewBox="0 0 28544 23" draw:points="28274,23 270,23 0,0 28544,0">
          <text:p/>
        </draw:polygon>
        <draw:polygon draw:style-name="gr80" draw:text-style-name="P55" draw:layer="layout" svg:width="28.003cm" svg:height="0.023cm" svg:x="6.759cm" svg:y="20.273cm" svg:viewBox="0 0 28004 24" draw:points="27735,24 269,24 0,0 28004,0">
          <text:p/>
        </draw:polygon>
        <draw:polygon draw:style-name="gr81" draw:text-style-name="P56" draw:layer="layout" svg:width="27.465cm" svg:height="0.022cm" svg:x="7.028cm" svg:y="20.296cm" svg:viewBox="0 0 27466 23" draw:points="27197,23 269,23 0,0 27466,0">
          <text:p/>
        </draw:polygon>
        <draw:polygon draw:style-name="gr82" draw:text-style-name="P57" draw:layer="layout" svg:width="26.927cm" svg:height="0.023cm" svg:x="7.297cm" svg:y="20.318cm" svg:viewBox="0 0 26928 24" draw:points="26659,24 269,24 0,0 26928,0">
          <text:p/>
        </draw:polygon>
        <draw:polygon draw:style-name="gr83" draw:text-style-name="P58" draw:layer="layout" svg:width="26.389cm" svg:height="0.023cm" svg:x="7.566cm" svg:y="20.341cm" svg:viewBox="0 0 26390 24" draw:points="26120,24 270,24 0,0 26390,0">
          <text:p/>
        </draw:polygon>
        <draw:polygon draw:style-name="gr84" draw:text-style-name="P59" draw:layer="layout" svg:width="25.849cm" svg:height="0.022cm" svg:x="7.836cm" svg:y="20.364cm" svg:viewBox="0 0 25850 23" draw:points="25581,23 269,23 0,0 25850,0">
          <text:p/>
        </draw:polygon>
        <draw:polygon draw:style-name="gr85" draw:text-style-name="P60" draw:layer="layout" svg:width="25.311cm" svg:height="0.023cm" svg:x="8.105cm" svg:y="20.386cm" svg:viewBox="0 0 25312 24" draw:points="25043,24 269,24 0,0 25312,0">
          <text:p/>
        </draw:polygon>
        <draw:polygon draw:style-name="gr86" draw:text-style-name="P61" draw:layer="layout" svg:width="24.773cm" svg:height="0.022cm" svg:x="8.374cm" svg:y="20.409cm" svg:viewBox="0 0 24774 23" draw:points="24505,23 269,23 0,0 24774,0">
          <text:p/>
        </draw:polygon>
        <draw:polygon draw:style-name="gr87" draw:text-style-name="P62" draw:layer="layout" svg:width="24.235cm" svg:height="0.023cm" svg:x="8.643cm" svg:y="20.431cm" svg:viewBox="0 0 24236 24" draw:points="23966,24 270,24 0,0 24236,0">
          <text:p/>
        </draw:polygon>
        <draw:polygon draw:style-name="gr88" draw:text-style-name="P63" draw:layer="layout" svg:width="23.695cm" svg:height="0.011cm" svg:x="8.913cm" svg:y="20.454cm" svg:viewBox="0 0 23696 12" draw:points="23562,12 134,12 0,0 23696,0">
          <text:p/>
        </draw:polygon>
        <draw:polygon draw:style-name="gr89" draw:text-style-name="P64" draw:layer="layout" svg:width="23.427cm" svg:height="0.013cm" svg:x="9.047cm" svg:y="20.465cm" svg:viewBox="0 0 23428 14" draw:points="23293,14 135,14 0,0 23428,0">
          <text:p/>
        </draw:polygon>
        <draw:polygon draw:style-name="gr90" draw:text-style-name="P65" draw:layer="layout" svg:width="23.157cm" svg:height="0.011cm" svg:x="9.182cm" svg:y="20.477cm" svg:viewBox="0 0 23158 12" draw:points="23023,12 135,12 0,0 23158,0">
          <text:p/>
        </draw:polygon>
        <draw:polygon draw:style-name="gr91" draw:text-style-name="P66" draw:layer="layout" svg:width="22.887cm" svg:height="0.011cm" svg:x="9.317cm" svg:y="20.488cm" svg:viewBox="0 0 22888 12" draw:points="22754,12 134,12 0,0 22888,0">
          <text:p/>
        </draw:polygon>
        <draw:polygon draw:style-name="gr92" draw:text-style-name="P67" draw:layer="layout" svg:width="22.619cm" svg:height="0.011cm" svg:x="9.451cm" svg:y="20.499cm" svg:viewBox="0 0 22620 12" draw:points="22485,12 135,12 0,0 22620,0">
          <text:p/>
        </draw:polygon>
        <draw:polygon draw:style-name="gr93" draw:text-style-name="P68" draw:layer="layout" svg:width="22.349cm" svg:height="0.012cm" svg:x="9.586cm" svg:y="20.51cm" svg:viewBox="0 0 22350 13" draw:points="22215,13 134,13 0,0 22350,0">
          <text:p/>
        </draw:polygon>
        <draw:polygon draw:style-name="gr94" draw:text-style-name="P69" draw:layer="layout" svg:width="22.08cm" svg:height="0.011cm" svg:x="9.72cm" svg:y="20.522cm" svg:viewBox="0 0 22081 12" draw:points="21947,12 135,12 0,0 22081,0">
          <text:p/>
        </draw:polygon>
        <draw:polygon draw:style-name="gr95" draw:text-style-name="P70" draw:layer="layout" svg:width="21.811cm" svg:height="0.011cm" svg:x="9.855cm" svg:y="20.533cm" svg:viewBox="0 0 21812 12" draw:points="21677,12 135,12 0,0 21812,0">
          <text:p/>
        </draw:polygon>
        <draw:polygon draw:style-name="gr96" draw:text-style-name="P71" draw:layer="layout" svg:width="21.541cm" svg:height="0.012cm" svg:x="9.99cm" svg:y="20.544cm" svg:viewBox="0 0 21542 13" draw:points="21408,13 134,13 0,0 21542,0">
          <text:p/>
        </draw:polygon>
        <draw:polygon draw:style-name="gr97" draw:text-style-name="P72" draw:layer="layout" svg:width="21.273cm" svg:height="0.011cm" svg:x="10.124cm" svg:y="20.556cm" svg:viewBox="0 0 21274 12" draw:points="21139,12 135,12 0,0 21274,0">
          <text:p/>
        </draw:polygon>
        <draw:polygon draw:style-name="gr98" draw:text-style-name="P73" draw:layer="layout" svg:width="21.003cm" svg:height="0.011cm" svg:x="10.259cm" svg:y="20.567cm" svg:viewBox="0 0 21004 12" draw:points="20869,12 135,12 0,0 21004,0">
          <text:p/>
        </draw:polygon>
        <draw:polygon draw:style-name="gr99" draw:text-style-name="P74" draw:layer="layout" svg:width="20.733cm" svg:height="0.012cm" svg:x="10.394cm" svg:y="20.578cm" svg:viewBox="0 0 20734 13" draw:points="20599,13 134,13 0,0 20734,0">
          <text:p/>
        </draw:polygon>
        <draw:polygon draw:style-name="gr100" draw:text-style-name="P75" draw:layer="layout" svg:width="20.465cm" svg:height="0.011cm" svg:x="10.528cm" svg:y="20.59cm" svg:viewBox="0 0 20466 12" draw:points="20331,12 135,12 0,0 20466,0">
          <text:p/>
        </draw:polygon>
        <draw:polygon draw:style-name="gr101" draw:text-style-name="P76" draw:layer="layout" svg:width="20.195cm" svg:height="0.011cm" svg:x="10.663cm" svg:y="20.601cm" svg:viewBox="0 0 20196 12" draw:points="20061,12 135,12 0,0 20196,0">
          <text:p/>
        </draw:polygon>
        <draw:polygon draw:style-name="gr101" draw:text-style-name="P76" draw:layer="layout" svg:width="19.925cm" svg:height="0.011cm" svg:x="10.798cm" svg:y="20.612cm" svg:viewBox="0 0 19926 12" draw:points="19792,12 134,12 0,0 19926,0">
          <text:p/>
        </draw:polygon>
        <draw:polygon draw:style-name="gr102" draw:text-style-name="P77" draw:layer="layout" svg:width="19.657cm" svg:height="0.012cm" svg:x="10.932cm" svg:y="20.623cm" svg:viewBox="0 0 19658 13" draw:points="19523,13 135,13 0,0 19658,0">
          <text:p/>
        </draw:polygon>
        <draw:polygon draw:style-name="gr102" draw:text-style-name="P77" draw:layer="layout" svg:width="19.387cm" svg:height="0.011cm" svg:x="11.067cm" svg:y="20.635cm" svg:viewBox="0 0 19388 12" draw:points="19254,12 134,12 0,0 19388,0">
          <text:p/>
        </draw:polygon>
        <draw:polygon draw:style-name="gr103" draw:text-style-name="P78" draw:layer="layout" svg:width="19.119cm" svg:height="0.011cm" svg:x="11.201cm" svg:y="20.646cm" svg:viewBox="0 0 19120 12" draw:points="18985,12 135,12 0,0 19120,0">
          <text:p/>
        </draw:polygon>
        <draw:polygon draw:style-name="gr103" draw:text-style-name="P78" draw:layer="layout" svg:width="18.849cm" svg:height="0.012cm" svg:x="11.336cm" svg:y="20.657cm" svg:viewBox="0 0 18850 13" draw:points="18715,13 135,13 0,0 18850,0">
          <text:p/>
        </draw:polygon>
        <draw:polygon draw:style-name="gr104" draw:text-style-name="P79" draw:layer="layout" svg:width="18.579cm" svg:height="0.011cm" svg:x="11.471cm" svg:y="20.669cm" svg:viewBox="0 0 18580 12" draw:points="18446,12 134,12 0,0 18580,0">
          <text:p/>
        </draw:polygon>
        <draw:polygon draw:style-name="gr104" draw:text-style-name="P79" draw:layer="layout" svg:width="18.311cm" svg:height="0.011cm" svg:x="11.605cm" svg:y="20.68cm" svg:viewBox="0 0 18312 12" draw:points="18177,12 135,12 0,0 18312,0">
          <text:p/>
        </draw:polygon>
        <draw:polygon draw:style-name="gr105" draw:text-style-name="P80" draw:layer="layout" svg:width="18.041cm" svg:height="0.012cm" svg:x="11.74cm" svg:y="20.691cm" svg:viewBox="0 0 18042 13" draw:points="17907,13 135,13 0,0 18042,0">
          <text:p/>
        </draw:polygon>
        <draw:polygon draw:style-name="gr106" draw:text-style-name="P81" draw:layer="layout" svg:width="17.771cm" svg:height="0.011cm" svg:x="11.875cm" svg:y="20.703cm" svg:viewBox="0 0 17772 12" draw:points="17638,12 134,12 0,0 17772,0">
          <text:p/>
        </draw:polygon>
        <draw:polygon draw:style-name="gr107" draw:text-style-name="P82" draw:layer="layout" svg:width="17.503cm" svg:height="0.011cm" svg:x="12.009cm" svg:y="20.714cm" svg:viewBox="0 0 17504 12" draw:points="17369,12 135,12 0,0 17504,0">
          <text:p/>
        </draw:polygon>
        <draw:polygon draw:style-name="gr108" draw:text-style-name="P83" draw:layer="layout" svg:width="17.233cm" svg:height="0.011cm" svg:x="12.144cm" svg:y="20.725cm" svg:viewBox="0 0 17234 12" draw:points="17099,12 135,12 0,0 17234,0">
          <text:p/>
        </draw:polygon>
        <draw:polygon draw:style-name="gr109" draw:text-style-name="P84" draw:layer="layout" svg:width="16.963cm" svg:height="0.012cm" svg:x="12.279cm" svg:y="20.736cm" svg:viewBox="0 0 16964 13" draw:points="16830,13 134,13 0,0 16964,0">
          <text:p/>
        </draw:polygon>
        <draw:polygon draw:style-name="gr110" draw:text-style-name="P85" draw:layer="layout" svg:width="16.695cm" svg:height="0.011cm" svg:x="12.413cm" svg:y="20.748cm" svg:viewBox="0 0 16696 12" draw:points="16561,12 135,12 0,0 16696,0">
          <text:p/>
        </draw:polygon>
        <draw:polygon draw:style-name="gr110" draw:text-style-name="P85" draw:layer="layout" svg:width="16.425cm" svg:height="0.011cm" svg:x="12.548cm" svg:y="20.759cm" svg:viewBox="0 0 16426 12" draw:points="16292,12 134,12 0,0 16426,0">
          <text:p/>
        </draw:polygon>
        <draw:polygon draw:style-name="gr111" draw:text-style-name="P86" draw:layer="layout" svg:width="16.157cm" svg:height="0.012cm" svg:x="12.682cm" svg:y="20.77cm" svg:viewBox="0 0 16158 13" draw:points="16023,13 135,13 0,0 16158,0">
          <text:p/>
        </draw:polygon>
        <draw:polygon draw:style-name="gr112" draw:text-style-name="P87" draw:layer="layout" svg:width="15.887cm" svg:height="0.011cm" svg:x="12.817cm" svg:y="20.782cm" svg:viewBox="0 0 15888 12" draw:points="15753,12 135,12 0,0 15888,0">
          <text:p/>
        </draw:polygon>
        <draw:polygon draw:style-name="gr113" draw:text-style-name="P88" draw:layer="layout" svg:width="15.617cm" svg:height="0.011cm" svg:x="12.952cm" svg:y="20.793cm" svg:viewBox="0 0 15618 12" draw:points="15484,12 134,12 0,0 15618,0">
          <text:p/>
        </draw:polygon>
        <draw:polygon draw:style-name="gr114" draw:text-style-name="P89" draw:layer="layout" svg:width="15.349cm" svg:height="0.012cm" svg:x="13.086cm" svg:y="20.804cm" svg:viewBox="0 0 15350 13" draw:points="15215,13 135,13 0,0 15350,0">
          <text:p/>
        </draw:polygon>
        <draw:polygon draw:style-name="gr115" draw:text-style-name="P90" draw:layer="layout" svg:width="15.079cm" svg:height="0.011cm" svg:x="13.221cm" svg:y="20.816cm" svg:viewBox="0 0 15080 12" draw:points="14945,12 135,12 0,0 15080,0">
          <text:p/>
        </draw:polygon>
        <draw:polygon draw:style-name="gr116" draw:text-style-name="P91" draw:layer="layout" svg:width="14.809cm" svg:height="0.011cm" svg:x="13.356cm" svg:y="20.827cm" svg:viewBox="0 0 14810 12" draw:points="14676,12 134,12 0,0 14810,0">
          <text:p/>
        </draw:polygon>
        <draw:polygon draw:style-name="gr117" draw:text-style-name="P92" draw:layer="layout" svg:width="14.541cm" svg:height="0.011cm" svg:x="13.49cm" svg:y="20.838cm" svg:viewBox="0 0 14542 12" draw:points="14407,12 135,12 0,0 14542,0">
          <text:p/>
        </draw:polygon>
        <draw:polygon draw:style-name="gr118" draw:text-style-name="P93" draw:layer="layout" svg:width="14.271cm" svg:height="0.012cm" svg:x="13.625cm" svg:y="20.849cm" svg:viewBox="0 0 14272 13" draw:points="14137,13 134,13 0,0 14272,0">
          <text:p/>
        </draw:polygon>
        <draw:polygon draw:style-name="gr119" draw:text-style-name="P94" draw:layer="layout" svg:width="14.002cm" svg:height="0.011cm" svg:x="13.759cm" svg:y="20.861cm" svg:viewBox="0 0 14003 12" draw:points="13869,12 135,12 0,0 14003,0">
          <text:p/>
        </draw:polygon>
        <draw:polygon draw:style-name="gr120" draw:text-style-name="P95" draw:layer="layout" svg:width="13.733cm" svg:height="0.011cm" svg:x="13.894cm" svg:y="20.872cm" svg:viewBox="0 0 13734 12" draw:points="13599,12 135,12 0,0 13734,0">
          <text:p/>
        </draw:polygon>
        <draw:polygon draw:style-name="gr121" draw:text-style-name="P96" draw:layer="layout" svg:width="13.463cm" svg:height="0.013cm" svg:x="14.029cm" svg:y="20.883cm" svg:viewBox="0 0 13464 14" draw:points="13330,14 134,14 0,0 13464,0">
          <text:p/>
        </draw:polygon>
        <draw:polygon draw:style-name="gr122" draw:text-style-name="P97" draw:layer="layout" svg:width="13.195cm" svg:height="0.011cm" svg:x="14.163cm" svg:y="20.895cm" svg:viewBox="0 0 13196 12" draw:points="13061,12 135,12 0,0 13196,0">
          <text:p/>
        </draw:polygon>
        <draw:polygon draw:style-name="gr123" draw:text-style-name="P98" draw:layer="layout" svg:width="12.925cm" svg:height="0.011cm" svg:x="14.298cm" svg:y="20.906cm" svg:viewBox="0 0 12926 12" draw:points="12791,12 135,12 0,0 12926,0">
          <text:p/>
        </draw:polygon>
        <draw:polygon draw:style-name="gr124" draw:text-style-name="P99" draw:layer="layout" svg:width="12.655cm" svg:height="0.012cm" svg:x="14.433cm" svg:y="20.917cm" svg:viewBox="0 0 12656 13" draw:points="12522,13 134,13 0,0 12656,0">
          <text:p/>
        </draw:polygon>
        <draw:polygon draw:style-name="gr125" draw:text-style-name="P100" draw:layer="layout" svg:width="12.387cm" svg:height="0.011cm" svg:x="14.567cm" svg:y="20.929cm" svg:viewBox="0 0 12388 12" draw:points="12253,12 135,12 0,0 12388,0">
          <text:p/>
        </draw:polygon>
        <draw:polygon draw:style-name="gr126" draw:text-style-name="P101" draw:layer="layout" svg:width="12.117cm" svg:height="0.011cm" svg:x="14.702cm" svg:y="20.94cm" svg:viewBox="0 0 12118 12" draw:points="11983,12 135,12 0,0 12118,0">
          <text:p/>
        </draw:polygon>
        <draw:polygon draw:style-name="gr127" draw:text-style-name="P102" draw:layer="layout" svg:width="11.847cm" svg:height="0.011cm" svg:x="14.837cm" svg:y="20.951cm" svg:viewBox="0 0 11848 12" draw:points="11714,12 134,12 0,0 11848,0">
          <text:p/>
        </draw:polygon>
        <draw:polygon draw:style-name="gr128" draw:text-style-name="P103" draw:layer="layout" svg:width="11.579cm" svg:height="0.012cm" svg:x="14.971cm" svg:y="20.962cm" svg:viewBox="0 0 11580 13" draw:points="11445,13 135,13 0,0 11580,0">
          <text:p/>
        </draw:polygon>
        <draw:polygon draw:style-name="gr129" draw:text-style-name="P104" draw:layer="layout" svg:width="11.309cm" svg:height="0.011cm" svg:x="15.106cm" svg:y="20.974cm" svg:viewBox="0 0 11310 12" draw:points="11175,12 134,12 0,0 11310,0">
          <text:p/>
        </draw:polygon>
        <draw:polygon draw:style-name="gr130" draw:text-style-name="P105" draw:layer="layout" svg:width="11.04cm" svg:height="0.011cm" svg:x="15.24cm" svg:y="20.985cm" svg:viewBox="0 0 11041 12" draw:points="10907,12 135,12 0,0 11041,0">
          <text:p/>
        </draw:polygon>
        <draw:polygon draw:style-name="gr130" draw:text-style-name="P105" draw:layer="layout" svg:width="10.771cm" svg:height="0.012cm" svg:x="15.375cm" svg:y="20.996cm" svg:viewBox="0 0 10772 13" draw:points="10637,13 135,13 0,0 10772,0">
          <text:p/>
        </draw:polygon>
        <draw:polygon draw:style-name="gr131" draw:text-style-name="P106" draw:layer="layout" svg:width="10.501cm" svg:height="0.011cm" svg:x="15.51cm" svg:y="21.008cm" svg:viewBox="0 0 10502 12" draw:points="10368,12 134,12 0,0 10502,0">
          <text:p/>
        </draw:polygon>
        <draw:polygon draw:style-name="gr131" draw:text-style-name="P106" draw:layer="layout" svg:width="10.233cm" svg:height="0.011cm" svg:x="15.644cm" svg:y="21.019cm" svg:viewBox="0 0 10234 12" draw:points="10099,12 135,12 0,0 10234,0">
          <text:p/>
        </draw:polygon>
        <draw:polygon draw:style-name="gr132" draw:text-style-name="P107" draw:layer="layout" svg:width="9.963cm" svg:height="0.012cm" svg:x="15.779cm" svg:y="21.03cm" svg:viewBox="0 0 9964 13" draw:points="9829,13 135,13 0,0 9964,0">
          <text:p/>
        </draw:polygon>
        <draw:polygon draw:style-name="gr133" draw:text-style-name="P108" draw:layer="layout" svg:width="9.693cm" svg:height="0.011cm" svg:x="15.914cm" svg:y="21.042cm" svg:viewBox="0 0 9694 12" draw:points="9560,12 134,12 0,0 9694,0">
          <text:p/>
        </draw:polygon>
        <draw:polygon draw:style-name="gr134" draw:text-style-name="P109" draw:layer="layout" svg:width="9.425cm" svg:height="0.011cm" svg:x="16.048cm" svg:y="21.053cm" svg:viewBox="0 0 9426 12" draw:points="9291,12 135,12 0,0 9426,0">
          <text:p/>
        </draw:polygon>
        <draw:polygon draw:style-name="gr135" draw:text-style-name="P110" draw:layer="layout" svg:width="9.155cm" svg:height="0.011cm" svg:x="16.183cm" svg:y="21.064cm" svg:viewBox="0 0 9156 12" draw:points="9021,12 135,12 0,0 9156,0">
          <text:p/>
        </draw:polygon>
        <draw:polygon draw:style-name="gr136" draw:text-style-name="P111" draw:layer="layout" svg:width="8.885cm" svg:height="0.012cm" svg:x="16.318cm" svg:y="21.075cm" svg:viewBox="0 0 8886 13" draw:points="8752,13 134,13 0,0 8886,0">
          <text:p/>
        </draw:polygon>
        <draw:polygon draw:style-name="gr136" draw:text-style-name="P111" draw:layer="layout" svg:width="8.617cm" svg:height="0.011cm" svg:x="16.452cm" svg:y="21.087cm" svg:viewBox="0 0 8618 12" draw:points="8483,12 135,12 0,0 8618,0">
          <text:p/>
        </draw:polygon>
        <draw:polygon draw:style-name="gr137" draw:text-style-name="P112" draw:layer="layout" svg:width="8.347cm" svg:height="0.011cm" svg:x="16.587cm" svg:y="21.098cm" svg:viewBox="0 0 8348 12" draw:points="8214,12 134,12 0,0 8348,0">
          <text:p/>
        </draw:polygon>
        <draw:polygon draw:style-name="gr138" draw:text-style-name="P113" draw:layer="layout" svg:width="8.079cm" svg:height="0.012cm" svg:x="16.721cm" svg:y="21.109cm" svg:viewBox="0 0 8080 13" draw:points="7945,13 135,13 0,0 8080,0">
          <text:p/>
        </draw:polygon>
        <draw:polygon draw:style-name="gr139" draw:text-style-name="P114" draw:layer="layout" svg:width="7.809cm" svg:height="0.011cm" svg:x="16.856cm" svg:y="21.121cm" svg:viewBox="0 0 7810 12" draw:points="7675,12 135,12 0,0 7810,0">
          <text:p/>
        </draw:polygon>
        <draw:polygon draw:style-name="gr140" draw:text-style-name="P115" draw:layer="layout" svg:width="7.539cm" svg:height="0.011cm" svg:x="16.991cm" svg:y="21.132cm" svg:viewBox="0 0 7540 12" draw:points="7406,12 134,12 0,0 7540,0">
          <text:p/>
        </draw:polygon>
        <draw:polygon draw:style-name="gr141" draw:text-style-name="P116" draw:layer="layout" svg:width="7.271cm" svg:height="0.012cm" svg:x="17.125cm" svg:y="21.143cm" svg:viewBox="0 0 7272 13" draw:points="7137,13 135,13 0,0 7272,0">
          <text:p/>
        </draw:polygon>
        <draw:polygon draw:style-name="gr142" draw:text-style-name="P117" draw:layer="layout" svg:width="7.001cm" svg:height="0.011cm" svg:x="17.26cm" svg:y="21.155cm" svg:viewBox="0 0 7002 12" draw:points="6867,12 135,12 0,0 7002,0">
          <text:p/>
        </draw:polygon>
        <draw:polygon draw:style-name="gr143" draw:text-style-name="P118" draw:layer="layout" svg:width="6.731cm" svg:height="0.011cm" svg:x="17.395cm" svg:y="21.166cm" svg:viewBox="0 0 6732 12" draw:points="6598,12 134,12 0,0 6732,0">
          <text:p/>
        </draw:polygon>
        <draw:polygon draw:style-name="gr144" draw:text-style-name="P119" draw:layer="layout" svg:width="6.463cm" svg:height="0.011cm" svg:x="17.529cm" svg:y="21.177cm" svg:viewBox="0 0 6464 12" draw:points="6329,12 135,12 0,0 6464,0">
          <text:p/>
        </draw:polygon>
        <draw:polygon draw:style-name="gr145" draw:text-style-name="P120" draw:layer="layout" svg:width="6.193cm" svg:height="0.012cm" svg:x="17.664cm" svg:y="21.188cm" svg:viewBox="0 0 6194 13" draw:points="6059,13 135,13 0,0 6194,0">
          <text:p/>
        </draw:polygon>
        <draw:polygon draw:style-name="gr146" draw:text-style-name="P121" draw:layer="layout" svg:width="5.923cm" svg:height="0.011cm" svg:x="17.799cm" svg:y="21.2cm" svg:viewBox="0 0 5924 12" draw:points="5790,12 134,12 0,0 5924,0">
          <text:p/>
        </draw:polygon>
        <draw:polygon draw:style-name="gr147" draw:text-style-name="P122" draw:layer="layout" svg:width="5.655cm" svg:height="0.011cm" svg:x="17.933cm" svg:y="21.211cm" svg:viewBox="0 0 5656 12" draw:points="5521,12 135,12 0,0 5656,0">
          <text:p/>
        </draw:polygon>
        <draw:polygon draw:style-name="gr148" draw:text-style-name="P123" draw:layer="layout" svg:width="5.385cm" svg:height="0.012cm" svg:x="18.068cm" svg:y="21.222cm" svg:viewBox="0 0 5386 13" draw:points="5252,13 134,13 0,0 5386,0">
          <text:p/>
        </draw:polygon>
        <draw:polygon draw:style-name="gr149" draw:text-style-name="P124" draw:layer="layout" svg:width="5.117cm" svg:height="0.011cm" svg:x="18.202cm" svg:y="21.234cm" svg:viewBox="0 0 5118 12" draw:points="4983,12 135,12 0,0 5118,0">
          <text:p/>
        </draw:polygon>
        <draw:polygon draw:style-name="gr150" draw:text-style-name="P125" draw:layer="layout" svg:width="4.847cm" svg:height="0.011cm" svg:x="18.337cm" svg:y="21.245cm" svg:viewBox="0 0 4848 12" draw:points="4713,12 135,12 0,0 4848,0">
          <text:p/>
        </draw:polygon>
        <draw:polygon draw:style-name="gr151" draw:text-style-name="P126" draw:layer="layout" svg:width="4.577cm" svg:height="0.012cm" svg:x="18.472cm" svg:y="21.256cm" svg:viewBox="0 0 4578 13" draw:points="4444,13 134,13 0,0 4578,0">
          <text:p/>
        </draw:polygon>
        <draw:polygon draw:style-name="gr152" draw:text-style-name="P127" draw:layer="layout" svg:width="4.309cm" svg:height="0.011cm" svg:x="18.606cm" svg:y="21.268cm" svg:viewBox="0 0 4310 12" draw:points="4175,12 135,12 0,0 4310,0">
          <text:p/>
        </draw:polygon>
        <draw:polygon draw:style-name="gr153" draw:text-style-name="P128" draw:layer="layout" svg:width="4.039cm" svg:height="0.011cm" svg:x="18.741cm" svg:y="21.279cm" svg:viewBox="0 0 4040 12" draw:points="3905,12 135,12 0,0 4040,0">
          <text:p/>
        </draw:polygon>
        <draw:polygon draw:style-name="gr154" draw:text-style-name="P129" draw:layer="layout" svg:width="3.769cm" svg:height="0.011cm" svg:x="18.876cm" svg:y="21.29cm" svg:viewBox="0 0 3770 12" draw:points="3636,12 134,12 0,0 3770,0">
          <text:p/>
        </draw:polygon>
        <draw:polygon draw:style-name="gr155" draw:text-style-name="P130" draw:layer="layout" svg:width="3.501cm" svg:height="0.013cm" svg:x="19.01cm" svg:y="21.301cm" svg:viewBox="0 0 3502 14" draw:points="3367,14 135,14 0,0 3502,0">
          <text:p/>
        </draw:polygon>
        <draw:polygon draw:style-name="gr156" draw:text-style-name="P131" draw:layer="layout" svg:width="3.231cm" svg:height="0.011cm" svg:x="19.145cm" svg:y="21.313cm" svg:viewBox="0 0 3232 12" draw:points="3097,12 135,12 0,0 3232,0">
          <text:p/>
        </draw:polygon>
        <draw:polygon draw:style-name="gr156" draw:text-style-name="P131" draw:layer="layout" svg:width="2.961cm" svg:height="0.011cm" svg:x="19.28cm" svg:y="21.324cm" svg:viewBox="0 0 2962 12" draw:points="2827,12 134,12 0,0 2962,0">
          <text:p/>
        </draw:polygon>
        <draw:polygon draw:style-name="gr157" draw:text-style-name="P132" draw:layer="layout" svg:width="2.693cm" svg:height="0.012cm" svg:x="19.414cm" svg:y="21.335cm" svg:viewBox="0 0 2694 13" draw:points="2559,13 135,13 0,0 2694,0">
          <text:p/>
        </draw:polygon>
        <draw:polygon draw:style-name="gr158" draw:text-style-name="P133" draw:layer="layout" svg:width="2.423cm" svg:height="0.011cm" svg:x="19.549cm" svg:y="21.347cm" svg:viewBox="0 0 2424 12" draw:points="2290,12 134,12 0,0 2424,0">
          <text:p/>
        </draw:polygon>
        <draw:polygon draw:style-name="gr158" draw:text-style-name="P133" draw:layer="layout" svg:width="2.155cm" svg:height="0.011cm" svg:x="19.683cm" svg:y="21.358cm" svg:viewBox="0 0 2156 12" draw:points="2021,12 135,12 0,0 2156,0">
          <text:p/>
        </draw:polygon>
        <draw:polygon draw:style-name="gr159" draw:text-style-name="P134" draw:layer="layout" svg:width="1.885cm" svg:height="0.012cm" svg:x="19.818cm" svg:y="21.369cm" svg:viewBox="0 0 1886 13" draw:points="1750,13 135,13 0,0 1886,0">
          <text:p/>
        </draw:polygon>
        <draw:polygon draw:style-name="gr160" draw:text-style-name="P135" draw:layer="layout" svg:width="1.615cm" svg:height="0.011cm" svg:x="19.953cm" svg:y="21.381cm" svg:viewBox="0 0 1616 12" draw:points="1482,12 134,12 0,0 1616,0">
          <text:p/>
        </draw:polygon>
        <draw:polygon draw:style-name="gr161" draw:text-style-name="P136" draw:layer="layout" svg:width="1.347cm" svg:height="0.011cm" svg:x="20.087cm" svg:y="21.392cm" svg:viewBox="0 0 1348 12" draw:points="1213,12 135,12 0,0 1348,0">
          <text:p/>
        </draw:polygon>
        <draw:polygon draw:style-name="gr162" draw:text-style-name="P137" draw:layer="layout" svg:width="1.077cm" svg:height="0.011cm" svg:x="20.222cm" svg:y="21.403cm" svg:viewBox="0 0 1078 12" draw:points="943,12 135,12 0,0 1078,0">
          <text:p/>
        </draw:polygon>
        <draw:polygon draw:style-name="gr163" draw:text-style-name="P138" draw:layer="layout" svg:width="0.807cm" svg:height="0.012cm" svg:x="20.357cm" svg:y="21.414cm" svg:viewBox="0 0 808 13" draw:points="674,13 134,13 0,0 808,0">
          <text:p/>
        </draw:polygon>
        <draw:polygon draw:style-name="gr163" draw:text-style-name="P138" draw:layer="layout" svg:width="0.539cm" svg:height="0.022cm" svg:x="20.491cm" svg:y="21.426cm" svg:viewBox="0 0 540 23" draw:points="270,23 0,0 540,0">
          <text:p/>
        </draw:polygon>
        <draw:polygon draw:style-name="gr164" draw:text-style-name="P139" draw:layer="layout" svg:width="0.594cm" svg:height="1.428cm" svg:x="33.048cm" svg:y="38.678cm" svg:viewBox="0 0 595 1429" draw:points="0,0 595,0 595,1429 0,1429">
          <text:p/>
        </draw:polygon>
        <draw:polygon draw:style-name="gr164" draw:text-style-name="P139" draw:layer="layout" svg:width="0.594cm" svg:height="1.8cm" svg:x="33.642cm" svg:y="38.306cm" svg:viewBox="0 0 595 1801" draw:points="0,0 595,0 595,1801 0,1801">
          <text:p/>
        </draw:polygon>
        <draw:polygon draw:style-name="gr164" draw:text-style-name="P139" draw:layer="layout" svg:width="0.594cm" svg:height="2.122cm" svg:x="34.236cm" svg:y="37.984cm" svg:viewBox="0 0 595 2123" draw:points="0,0 595,0 595,2123 0,2123">
          <text:p/>
        </draw:polygon>
        <draw:polygon draw:style-name="gr164" draw:text-style-name="P139" draw:layer="layout" svg:width="0.595cm" svg:height="2.41cm" svg:x="34.83cm" svg:y="37.696cm" svg:viewBox="0 0 596 2411" draw:points="0,0 596,0 596,2411 0,2411">
          <text:p/>
        </draw:polygon>
        <draw:polygon draw:style-name="gr164" draw:text-style-name="P139" draw:layer="layout" svg:width="0.594cm" svg:height="2.811cm" svg:x="35.425cm" svg:y="37.295cm" svg:viewBox="0 0 595 2812" draw:points="0,0 595,0 595,2812 0,2812">
          <text:p/>
        </draw:polygon>
        <draw:polygon draw:style-name="gr164" draw:text-style-name="P139" draw:layer="layout" svg:width="0.594cm" svg:height="2.959cm" svg:x="36.019cm" svg:y="37.147cm" svg:viewBox="0 0 595 2960" draw:points="0,0 595,0 595,2960 0,2960">
          <text:p/>
        </draw:polygon>
        <draw:polygon draw:style-name="gr164" draw:text-style-name="P139" draw:layer="layout" svg:width="0.594cm" svg:height="3.442cm" svg:x="36.613cm" svg:y="36.664cm" svg:viewBox="0 0 595 3443" draw:points="0,0 595,0 595,3443 0,3443">
          <text:p/>
        </draw:polygon>
        <draw:polygon draw:style-name="gr164" draw:text-style-name="P139" draw:layer="layout" svg:width="0.595cm" svg:height="4.108cm" svg:x="37.207cm" svg:y="35.998cm" svg:viewBox="0 0 596 4109" draw:points="0,0 596,0 596,4109 0,4109">
          <text:p/>
        </draw:polygon>
        <draw:polygon draw:style-name="gr164" draw:text-style-name="P139" draw:layer="layout" svg:width="0.594cm" svg:height="4.911cm" svg:x="37.802cm" svg:y="35.195cm" svg:viewBox="0 0 595 4912" draw:points="0,0 595,0 595,4912 0,4912">
          <text:p/>
        </draw:polygon>
        <draw:polygon draw:style-name="gr164" draw:text-style-name="P139" draw:layer="layout" svg:width="0.594cm" svg:height="5.825cm" svg:x="38.396cm" svg:y="34.281cm" svg:viewBox="0 0 595 5826" draw:points="0,0 595,0 595,5826 0,5826">
          <text:p/>
        </draw:polygon>
        <draw:polyline draw:style-name="gr165" draw:text-style-name="P2" draw:layer="layout" svg:width="5.348cm" svg:height="0.532cm" svg:x="33.345cm" svg:y="34.281cm" svg:viewBox="0 0 5349 533" draw:points="0,0 594,191 1189,321 1784,332 2378,366 2972,461 3566,396 4160,480 4754,533 5349,417">
          <text:p/>
        </draw:polyline>
        <draw:line draw:style-name="gr166" draw:text-style-name="P2" draw:layer="layout" svg:x1="34.119cm" svg:y1="40.397cm" svg:x2="37.481cm" svg:y2="40.397cm">
          <text:p/>
        </draw:line>
        <draw:polyline draw:style-name="gr166" draw:text-style-name="P2" draw:layer="layout" svg:width="0.12cm" svg:height="0.185cm" svg:x="34.119cm" svg:y="40.305cm" svg:viewBox="0 0 121 186" draw:points="121,0 0,92 121,186">
          <text:p/>
        </draw:polyline>
        <draw:polyline draw:style-name="gr166" draw:text-style-name="P2" draw:layer="layout" svg:width="0.119cm" svg:height="0.185cm" svg:x="37.362cm" svg:y="40.305cm" svg:viewBox="0 0 120 186" draw:points="0,186 120,92 0,0">
          <text:p/>
        </draw:polyline>
        <draw:line draw:style-name="gr166" draw:text-style-name="P2" draw:layer="layout" svg:x1="32.751cm" svg:y1="40.106cm" svg:x2="32.751cm" svg:y2="34.281cm">
          <text:p/>
        </draw:line>
        <draw:frame draw:style-name="gr167" draw:text-style-name="P7" draw:layer="layout" svg:width="14.09cm" svg:height="1.102cm" svg:x="3.928cm" svg:y="2.091cm">
          <draw:text-box>
            <text:p text:style-name="P6"><text:span text:style-name="T8">6,975 Whole Cancer Genomes</text:span></text:p>
          </draw:text-box>
        </draw:frame>
        <draw:frame draw:style-name="gr168" draw:text-style-name="P140" draw:layer="layout" svg:width="1.092cm" svg:height="0.535cm" svg:x="32.605cm" svg:y="40.182cm">
          <draw:text-box>
            <text:p text:style-name="P6"><text:span text:style-name="T9">Early</text:span></text:p>
          </draw:text-box>
        </draw:frame>
        <draw:frame draw:style-name="gr169" draw:text-style-name="P140" draw:layer="layout" svg:width="0.933cm" svg:height="0.535cm" svg:x="38.032cm" svg:y="40.182cm">
          <draw:text-box>
            <text:p text:style-name="P6"><text:span text:style-name="T9">Late</text:span></text:p>
          </draw:text-box>
        </draw:frame>
        <draw:frame draw:style-name="gr170" draw:text-style-name="P140" draw:layer="layout" svg:width="3.565cm" svg:height="0.535cm" svg:x="34.029cm" svg:y="40.58cm">
          <draw:text-box>
            <text:p text:style-name="P6"><text:span text:style-name="T9">Replication Time</text:span></text:p>
          </draw:text-box>
        </draw:frame>
        <draw:frame draw:style-name="gr2" draw:text-style-name="P2" draw:layer="layout" svg:width="3.399cm" svg:height="1.328cm" svg:x="23.179cm" svg:y="38.666cm">
          <draw:image xlink:href="Pictures/10000001000001AD000000B81F9966B6.png" xlink:type="simple" xlink:show="embed" xlink:actuate="onLoad" draw:mime-type="image/png">
            <text:p/>
          </draw:image>
        </draw:frame>
        <draw:frame draw:style-name="gr2" draw:text-style-name="P2" draw:layer="layout" svg:width="3.399cm" svg:height="0.897cm" svg:x="27.211cm" svg:y="39.134cm">
          <draw:image xlink:href="Pictures/100000010000019E0000007820638DA8.png" xlink:type="simple" xlink:show="embed" xlink:actuate="onLoad" draw:mime-type="image/png">
            <text:p/>
          </draw:image>
        </draw:frame>
        <draw:frame draw:style-name="gr2" draw:text-style-name="P2" draw:layer="layout" svg:width="3.399cm" svg:height="1.512cm" svg:x="23.179cm" svg:y="36.764cm">
          <draw:image xlink:href="Pictures/10000001000001B0000000D3832CF136.png" xlink:type="simple" xlink:show="embed" xlink:actuate="onLoad" draw:mime-type="image/png">
            <text:p/>
          </draw:image>
        </draw:frame>
        <draw:frame draw:style-name="gr2" draw:text-style-name="P2" draw:layer="layout" svg:width="3.399cm" svg:height="1.492cm" svg:x="27.211cm" svg:y="36.784cm">
          <draw:image xlink:href="Pictures/100000010000019F000000C8D94B53D7.png" xlink:type="simple" xlink:show="embed" xlink:actuate="onLoad" draw:mime-type="image/png">
            <text:p/>
          </draw:image>
        </draw:frame>
        <draw:frame draw:style-name="gr2" draw:text-style-name="P2" draw:layer="layout" svg:width="3.399cm" svg:height="1.406cm" svg:x="23.179cm" svg:y="34.986cm">
          <draw:image xlink:href="Pictures/100000010000019E000000BC9AA5622C.png" xlink:type="simple" xlink:show="embed" xlink:actuate="onLoad" draw:mime-type="image/png">
            <text:p/>
          </draw:image>
        </draw:frame>
        <draw:frame draw:style-name="gr2" draw:text-style-name="P2" draw:layer="layout" svg:width="3.399cm" svg:height="1.353cm" svg:x="27.211cm" svg:y="35.038cm">
          <draw:image xlink:href="Pictures/100000010000019E000000B5AA4BBFAA.png" xlink:type="simple" xlink:show="embed" xlink:actuate="onLoad" draw:mime-type="image/png">
            <text:p/>
          </draw:image>
        </draw:frame>
        <draw:frame draw:style-name="gr171" draw:text-style-name="P141" draw:layer="layout" svg:width="2.112cm" svg:height="0.695cm" svg:x="33.361cm" svg:y="35.125cm">
          <draw:text-box>
            <text:p text:style-name="P6"><text:span text:style-name="T10">C_ID14</text:span></text:p>
          </draw:text-box>
        </draw:frame>
        <draw:frame draw:style-name="gr172" draw:text-style-name="P142" draw:layer="layout" svg:width="5.341cm" svg:height="0.67cm" draw:transform="rotate (1.5707963267949) translate (31.268cm 40.215cm)">
          <draw:text-box>
            <text:p text:style-name="P6"><text:span text:style-name="T11">Replication Timing</text:span></text:p>
          </draw:text-box>
        </draw:frame>
        <draw:frame draw:style-name="gr173" draw:text-style-name="P143" draw:layer="layout" svg:width="7.15cm" svg:height="0.488cm" svg:x="22.377cm" svg:y="34.312cm">
          <draw:text-box>
            <text:p text:style-name="P6"><text:span text:style-name="T12">Transcriptional Strand Asymmetry</text:span></text:p>
          </draw:text-box>
        </draw:frame>
        <draw:frame draw:style-name="gr174" draw:text-style-name="P143" draw:layer="layout" svg:width="6.156cm" svg:height="0.488cm" svg:x="22.644cm" svg:y="36.371cm">
          <draw:text-box>
            <text:p text:style-name="P6"><text:span text:style-name="T12">Genic and Intergenic Regions</text:span></text:p>
          </draw:text-box>
        </draw:frame>
        <draw:polygon draw:style-name="gr175" draw:text-style-name="P2" draw:layer="layout" svg:width="0.371cm" svg:height="0.381cm" svg:x="20.397cm" svg:y="35.907cm" svg:viewBox="0 0 372 382" draw:points="0,0 372,0 372,382 0,382">
          <text:p/>
        </draw:polygon>
        <draw:frame draw:style-name="gr2" draw:text-style-name="P2" draw:layer="layout" svg:width="0.377cm" svg:height="0.377cm" svg:x="20.397cm" svg:y="35.38cm">
          <draw:image xlink:href="Pictures/100000010000002B0000001529E1E287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7cm" svg:x="20.397cm" svg:y="35.38cm" svg:viewBox="0 0 378 378" draw:points="0,0 378,0 378,378 0,378">
          <text:p/>
        </draw:polygon>
        <draw:frame draw:style-name="gr176" draw:text-style-name="P143" draw:layer="layout" svg:width="6.35cm" svg:height="0.488cm" svg:x="22.585cm" svg:y="38.241cm">
          <draw:text-box>
            <text:p text:style-name="P6"><text:span text:style-name="T12">Replication Strand Asymmetry</text:span></text:p>
          </draw:text-box>
        </draw:frame>
        <draw:frame draw:style-name="gr177" draw:text-style-name="P143" draw:layer="layout" svg:width="1.238cm" svg:height="0.488cm" draw:transform="rotate (0.523598775598299) translate (22.949cm 40.491cm)">
          <draw:text-box>
            <text:p text:style-name="P6"><text:span text:style-name="T13">C_ID1</text:span></text:p>
          </draw:text-box>
        </draw:frame>
        <draw:frame draw:style-name="gr177" draw:text-style-name="P143" draw:layer="layout" svg:width="1.238cm" svg:height="0.488cm" draw:transform="rotate (0.523598775598299) translate (24.223cm 40.566cm)">
          <draw:text-box>
            <text:p text:style-name="P6"><text:span text:style-name="T13">C_ID2</text:span></text:p>
          </draw:text-box>
        </draw:frame>
        <draw:frame draw:style-name="gr177" draw:text-style-name="P143" draw:layer="layout" svg:width="1.238cm" svg:height="0.488cm" draw:transform="rotate (0.523598775598299) translate (25.432cm 40.529cm)">
          <draw:text-box>
            <text:p text:style-name="P6"><text:span text:style-name="T13">C_ID3</text:span></text:p>
          </draw:text-box>
        </draw:frame>
        <draw:frame draw:style-name="gr178" draw:text-style-name="P143" draw:layer="layout" svg:width="0.923cm" svg:height="0.488cm" draw:transform="rotate (0.523598775598299) translate (27.188cm 40.457cm)">
          <draw:text-box>
            <text:p text:style-name="P6"><text:span text:style-name="T13">ID_L</text:span></text:p>
          </draw:text-box>
        </draw:frame>
        <draw:frame draw:style-name="gr179" draw:text-style-name="P143" draw:layer="layout" svg:width="1.044cm" svg:height="0.488cm" draw:transform="rotate (0.523598775598299) translate (28.359cm 40.518cm)">
          <draw:text-box>
            <text:p text:style-name="P6"><text:span text:style-name="T13">ID_M</text:span></text:p>
          </draw:text-box>
        </draw:frame>
        <draw:polygon draw:style-name="gr180" draw:text-style-name="P144" draw:layer="layout" svg:width="0.378cm" svg:height="0.377cm" svg:x="19.864cm" svg:y="35.38cm" svg:viewBox="0 0 379 378" draw:points="0,0 379,0 379,378 0,378">
          <text:p/>
        </draw:polygon>
        <draw:polygon draw:style-name="gr175" draw:text-style-name="P2" draw:layer="layout" svg:width="0.378cm" svg:height="0.377cm" svg:x="19.864cm" svg:y="35.38cm" svg:viewBox="0 0 379 378" draw:points="0,0 379,0 379,378 0,378">
          <text:p/>
        </draw:polygon>
        <draw:polygon draw:style-name="gr181" draw:text-style-name="P145" draw:layer="layout" svg:width="0.378cm" svg:height="0.377cm" svg:x="19.864cm" svg:y="35.909cm" svg:viewBox="0 0 379 378" draw:points="0,0 379,0 379,378 0,378">
          <text:p/>
        </draw:polygon>
        <draw:polygon draw:style-name="gr175" draw:text-style-name="P2" draw:layer="layout" svg:width="0.378cm" svg:height="0.377cm" svg:x="19.864cm" svg:y="35.909cm" svg:viewBox="0 0 379 378" draw:points="0,0 379,0 379,378 0,378">
          <text:p/>
        </draw:polygon>
        <draw:frame draw:style-name="gr182" draw:text-style-name="P143" draw:layer="layout" svg:width="0.995cm" svg:height="0.488cm" draw:transform="rotate (0.523598775598299) translate (29.63cm 40.507cm)">
          <draw:text-box>
            <text:p text:style-name="P6"><text:span text:style-name="T13">ID_N</text:span></text:p>
          </draw:text-box>
        </draw:frame>
        <draw:frame draw:style-name="gr183" draw:text-style-name="P146" draw:layer="layout" svg:width="0.699cm" svg:height="0.378cm" draw:transform="rotate (0.785398163397448) translate (19.708cm 34.986cm)">
          <draw:text-box>
            <text:p text:style-name="P6"><text:span text:style-name="T14">Real</text:span></text:p>
          </draw:text-box>
        </draw:frame>
        <draw:frame draw:style-name="gr184" draw:text-style-name="P146" draw:layer="layout" svg:width="1.508cm" svg:height="0.378cm" draw:transform="rotate (0.785398163397448) translate (20.165cm 35.084cm)">
          <draw:text-box>
            <text:p text:style-name="P6"><text:span text:style-name="T14">Simulated</text:span></text:p>
          </draw:text-box>
        </draw:frame>
        <draw:frame draw:style-name="gr185" draw:text-style-name="P146" draw:layer="layout" svg:width="2.11cm" svg:height="0.378cm" svg:x="20.833cm" svg:y="35.39cm">
          <draw:text-box>
            <text:p text:style-name="P6"><text:span text:style-name="T14">Untranscribed</text:span></text:p>
          </draw:text-box>
        </draw:frame>
        <draw:frame draw:style-name="gr2" draw:text-style-name="P2" draw:layer="layout" svg:width="0.377cm" svg:height="0.377cm" svg:x="20.397cm" svg:y="37.187cm">
          <draw:image xlink:href="Pictures/100000010000002B00000015EB2DFFAD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8cm" svg:x="20.397cm" svg:y="37.187cm" svg:viewBox="0 0 378 379" draw:points="0,0 378,0 378,379 0,379">
          <text:p/>
        </draw:polygon>
        <draw:polygon draw:style-name="gr186" draw:text-style-name="P147" draw:layer="layout" svg:width="0.378cm" svg:height="0.378cm" svg:x="19.864cm" svg:y="37.187cm" svg:viewBox="0 0 379 379" draw:points="0,0 379,0 379,379 0,379">
          <text:p/>
        </draw:polygon>
        <draw:polygon draw:style-name="gr175" draw:text-style-name="P2" draw:layer="layout" svg:width="0.378cm" svg:height="0.378cm" svg:x="19.864cm" svg:y="37.187cm" svg:viewBox="0 0 379 379" draw:points="0,0 379,0 379,379 0,379">
          <text:p/>
        </draw:polygon>
        <draw:frame draw:style-name="gr187" draw:text-style-name="P146" draw:layer="layout" svg:width="1.79cm" svg:height="0.378cm" svg:x="20.833cm" svg:y="35.919cm">
          <draw:text-box>
            <text:p text:style-name="P6"><text:span text:style-name="T14">Transcribed</text:span></text:p>
          </draw:text-box>
        </draw:frame>
        <draw:frame draw:style-name="gr2" draw:text-style-name="P2" draw:layer="layout" svg:width="0.377cm" svg:height="0.377cm" svg:x="20.397cm" svg:y="37.678cm">
          <draw:image xlink:href="Pictures/100000010000002B00000015B7337BFC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8cm" svg:x="20.397cm" svg:y="37.678cm" svg:viewBox="0 0 378 379" draw:points="0,0 378,0 378,379 0,379">
          <text:p/>
        </draw:polygon>
        <draw:polygon draw:style-name="gr188" draw:text-style-name="P148" draw:layer="layout" svg:width="0.378cm" svg:height="0.378cm" svg:x="19.864cm" svg:y="37.678cm" svg:viewBox="0 0 379 379" draw:points="0,0 379,0 379,379 0,379">
          <text:p/>
        </draw:polygon>
        <draw:polygon draw:style-name="gr175" draw:text-style-name="P2" draw:layer="layout" svg:width="0.378cm" svg:height="0.378cm" svg:x="19.864cm" svg:y="37.678cm" svg:viewBox="0 0 379 379" draw:points="0,0 379,0 379,379 0,379">
          <text:p/>
        </draw:polygon>
        <draw:frame draw:style-name="gr189" draw:text-style-name="P146" draw:layer="layout" svg:width="0.887cm" svg:height="0.378cm" svg:x="20.833cm" svg:y="37.197cm">
          <draw:text-box>
            <text:p text:style-name="P6"><text:span text:style-name="T14">Genic</text:span></text:p>
          </draw:text-box>
        </draw:frame>
        <draw:frame draw:style-name="gr2" draw:text-style-name="P2" draw:layer="layout" svg:width="0.377cm" svg:height="0.377cm" svg:x="20.397cm" svg:y="39.001cm">
          <draw:image xlink:href="Pictures/100000010000002B00000015D9C2F051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8cm" svg:x="20.397cm" svg:y="39cm" svg:viewBox="0 0 378 379" draw:points="0,0 378,0 378,379 0,379">
          <text:p/>
        </draw:polygon>
        <draw:polygon draw:style-name="gr190" draw:text-style-name="P149" draw:layer="layout" svg:width="0.378cm" svg:height="0.378cm" svg:x="19.864cm" svg:y="39cm" svg:viewBox="0 0 379 379" draw:points="0,0 379,0 379,379 0,379">
          <text:p/>
        </draw:polygon>
        <draw:polygon draw:style-name="gr175" draw:text-style-name="P2" draw:layer="layout" svg:width="0.378cm" svg:height="0.378cm" svg:x="19.864cm" svg:y="39cm" svg:viewBox="0 0 379 379" draw:points="0,0 379,0 379,379 0,379">
          <text:p/>
        </draw:polygon>
        <draw:frame draw:style-name="gr191" draw:text-style-name="P146" draw:layer="layout" svg:width="1.489cm" svg:height="0.378cm" svg:x="20.833cm" svg:y="37.688cm">
          <draw:text-box>
            <text:p text:style-name="P6"><text:span text:style-name="T14">Intergenic</text:span></text:p>
          </draw:text-box>
        </draw:frame>
        <draw:frame draw:style-name="gr2" draw:text-style-name="P2" draw:layer="layout" svg:width="0.377cm" svg:height="0.377cm" svg:x="20.397cm" svg:y="39.479cm">
          <draw:image xlink:href="Pictures/100000010000002B0000001589B22198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7cm" svg:x="20.397cm" svg:y="39.479cm" svg:viewBox="0 0 378 378" draw:points="0,0 378,0 378,378 0,378">
          <text:p/>
        </draw:polygon>
        <draw:polygon draw:style-name="gr192" draw:text-style-name="P150" draw:layer="layout" svg:width="0.378cm" svg:height="0.377cm" svg:x="19.864cm" svg:y="39.479cm" svg:viewBox="0 0 379 378" draw:points="0,0 379,0 379,378 0,378">
          <text:p/>
        </draw:polygon>
        <draw:polygon draw:style-name="gr175" draw:text-style-name="P2" draw:layer="layout" svg:width="0.378cm" svg:height="0.377cm" svg:x="19.864cm" svg:y="39.479cm" svg:viewBox="0 0 379 378" draw:points="0,0 379,0 379,378 0,378">
          <text:p/>
        </draw:polygon>
        <draw:frame draw:style-name="gr193" draw:text-style-name="P146" draw:layer="layout" svg:width="1.207cm" svg:height="0.378cm" svg:x="20.833cm" svg:y="39.01cm">
          <draw:text-box>
            <text:p text:style-name="P6"><text:span text:style-name="T14">Leading</text:span></text:p>
          </draw:text-box>
        </draw:frame>
        <draw:frame draw:style-name="gr2" draw:text-style-name="P2" draw:layer="layout" svg:width="0.377cm" svg:height="0.377cm" svg:x="20.397cm" svg:y="35.909cm">
          <draw:image xlink:href="Pictures/100000010000002B000000158030592A.png" xlink:type="simple" xlink:show="embed" xlink:actuate="onLoad" draw:mime-type="image/png">
            <text:p/>
          </draw:image>
        </draw:frame>
        <draw:polygon draw:style-name="gr175" draw:text-style-name="P2" draw:layer="layout" svg:width="0.377cm" svg:height="0.377cm" svg:x="20.397cm" svg:y="35.909cm" svg:viewBox="0 0 378 378" draw:points="0,0 378,0 378,378 0,378">
          <text:p/>
        </draw:polygon>
        <draw:frame draw:style-name="gr193" draw:text-style-name="P146" draw:layer="layout" svg:width="1.207cm" svg:height="0.378cm" svg:x="20.833cm" svg:y="39.489cm">
          <draw:text-box>
            <text:p text:style-name="P6"><text:span text:style-name="T14">Lagging</text:span></text:p>
          </draw:text-box>
        </draw:frame>
        <draw:frame draw:style-name="gr194" draw:text-style-name="P151" draw:layer="layout" svg:width="0.358cm" svg:height="0.34cm" svg:x="25.761cm" svg:y="35.044cm">
          <draw:text-box>
            <text:p text:style-name="P6"><text:span text:style-name="T15">***</text:span></text:p>
          </draw:text-box>
        </draw:frame>
        <draw:frame draw:style-name="gr194" draw:text-style-name="P151" draw:layer="layout" svg:width="0.358cm" svg:height="0.34cm" svg:x="27.251cm" svg:y="37.367cm">
          <draw:text-box>
            <text:p text:style-name="P6"><text:span text:style-name="T15">***</text:span></text:p>
          </draw:text-box>
        </draw:frame>
        <draw:frame draw:style-name="gr194" draw:text-style-name="P151" draw:layer="layout" svg:width="0.358cm" svg:height="0.34cm" svg:x="29.793cm" svg:y="38.951cm">
          <draw:text-box>
            <text:p text:style-name="P6"><text:span text:style-name="T15">***</text:span></text:p>
          </draw:text-box>
        </draw:frame>
        <draw:frame draw:style-name="gr195" draw:text-style-name="P152" draw:layer="layout" svg:width="0.417cm" svg:height="0.467cm" svg:x="26.654cm" svg:y="35.381cm">
          <draw:text-box>
            <text:p text:style-name="P6"><text:span text:style-name="T16">…</text:span></text:p>
          </draw:text-box>
        </draw:frame>
        <draw:frame draw:style-name="gr195" draw:text-style-name="P152" draw:layer="layout" svg:width="0.417cm" svg:height="0.467cm" svg:x="26.682cm" svg:y="37.375cm">
          <draw:text-box>
            <text:p text:style-name="P6"><text:span text:style-name="T16">…</text:span></text:p>
          </draw:text-box>
        </draw:frame>
        <draw:line draw:style-name="gr34" draw:text-style-name="P2" draw:layer="layout" svg:x1="20.774cm" svg:y1="11.685cm" svg:x2="21.766cm" svg:y2="11.685cm">
          <text:p/>
        </draw:line>
        <draw:polygon draw:style-name="gr35" draw:text-style-name="P31" draw:layer="layout" svg:width="0.332cm" svg:height="0.359cm" svg:x="21.555cm" svg:y="11.505cm" svg:viewBox="0 0 333 360" draw:points="0,360 181,181 0,0 154,0 333,181 154,360">
          <text:p/>
        </draw:polygon>
        <draw:line draw:style-name="gr34" draw:text-style-name="P2" draw:layer="layout" svg:x1="20.709cm" svg:y1="17.843cm" svg:x2="21.701cm" svg:y2="17.843cm">
          <text:p/>
        </draw:line>
        <draw:polygon draw:style-name="gr35" draw:text-style-name="P31" draw:layer="layout" svg:width="0.331cm" svg:height="0.359cm" svg:x="21.491cm" svg:y="17.664cm" svg:viewBox="0 0 332 360" draw:points="0,360 179,180 0,0 152,0 332,180 152,360">
          <text:p/>
        </draw:polygon>
        <draw:frame draw:style-name="gr195" draw:text-style-name="P152" draw:layer="layout" svg:width="0.417cm" svg:height="0.467cm" svg:x="26.682cm" svg:y="39.113cm">
          <draw:text-box>
            <text:p text:style-name="P6"><text:span text:style-name="T16">…</text:span></text:p>
          </draw:text-box>
        </draw:frame>
        <draw:frame draw:style-name="gr2" draw:text-style-name="P2" draw:layer="layout" svg:width="1.391cm" svg:height="2.676cm" svg:x="7.089cm" svg:y="3.723cm">
          <draw:image xlink:href="Pictures/10000001000000DE000001ABD97CA192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8.249cm" svg:y="3.723cm">
          <draw:image xlink:href="Pictures/10000001000000DE000001AB8C8555FD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9.327cm" svg:y="3.723cm">
          <draw:image xlink:href="Pictures/10000001000000DE000001AB1A7EFAE3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6.535cm" svg:y="5.271cm">
          <draw:image xlink:href="Pictures/10000001000000DE000001AB1A7EFAE3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7.669cm" svg:y="5.271cm">
          <draw:image xlink:href="Pictures/10000001000000DE000001ABD97CA192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8.803cm" svg:y="5.271cm">
          <draw:image xlink:href="Pictures/10000001000000DE000001ABD97CA192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9.852cm" svg:y="5.271cm">
          <draw:image xlink:href="Pictures/10000001000000DE000001AB8C8555FD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7.115cm" svg:y="6.653cm">
          <draw:image xlink:href="Pictures/10000001000000DE000001AB8C8555FD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8.278cm" svg:y="6.653cm">
          <draw:image xlink:href="Pictures/10000001000000DE000001ABD97CA192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9.355cm" svg:y="6.653cm">
          <draw:image xlink:href="Pictures/10000001000000DE000001AB1A7EFAE3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10.613cm" svg:y="3.723cm">
          <draw:image xlink:href="Pictures/10000001000000DE000001AB435D484E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1.879cm" svg:y="3.723cm">
          <draw:image xlink:href="Pictures/10000001000000DD000001AB80C57E46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3.157cm" svg:y="3.723cm">
          <draw:image xlink:href="Pictures/10000001000000DD000001AB6C2B633B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0.965cm" svg:y="5.271cm">
          <draw:image xlink:href="Pictures/10000001000000DD000001AB6C2B633B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13.293cm" svg:y="5.271cm">
          <draw:image xlink:href="Pictures/10000001000000DE000001AB435D484E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12.026cm" svg:y="5.271cm">
          <draw:image xlink:href="Pictures/10000001000000DE000001AB435D484E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4.082cm" svg:y="6.671cm">
          <draw:image xlink:href="Pictures/10000001000000DD000001AB80C57E46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3.045cm" svg:y="6.653cm">
          <draw:image xlink:href="Pictures/10000001000000DD000001AB80C57E46.png" xlink:type="simple" xlink:show="embed" xlink:actuate="onLoad" draw:mime-type="image/png">
            <text:p/>
          </draw:image>
        </draw:frame>
        <draw:frame draw:style-name="gr2" draw:text-style-name="P2" draw:layer="layout" svg:width="1.391cm" svg:height="2.676cm" svg:x="10.601cm" svg:y="6.653cm">
          <draw:image xlink:href="Pictures/10000001000000DE000001AB435D484E.png" xlink:type="simple" xlink:show="embed" xlink:actuate="onLoad" draw:mime-type="image/png">
            <text:p/>
          </draw:image>
        </draw:frame>
        <draw:frame draw:style-name="gr2" draw:text-style-name="P2" draw:layer="layout" svg:width="1.384cm" svg:height="2.676cm" svg:x="11.885cm" svg:y="6.653cm">
          <draw:image xlink:href="Pictures/10000001000000DD000001AB6C2B633B.png" xlink:type="simple" xlink:show="embed" xlink:actuate="onLoad" draw:mime-type="image/png">
            <text:p/>
          </draw:image>
        </draw:frame>
        <draw:frame draw:style-name="gr196" draw:text-style-name="P7" draw:layer="layout" svg:width="19.352cm" svg:height="1.102cm" svg:x="19.449cm" svg:y="21.45cm">
          <draw:text-box>
            <text:p text:style-name="P6"><text:span text:style-name="T17">Interactive Browser and Matrix Generator</text:span></text:p>
          </draw:text-box>
        </draw:frame>
        <draw:path draw:style-name="gr197" draw:text-style-name="P153" draw:layer="layout" svg:width="10.605cm" svg:height="1.044cm" svg:x="5.718cm" svg:y="9.715cm" svg:viewBox="0 0 10606 1045" svg:d="M10606 0c0 217-126 665-1476 665-391 0-769-6-1501-42-529-25-845-41-1122-41-492 0-1021 16-1097 463h-214c-76-447-618-463-1085-463-290 0-593 11-1122 36-744 36-1135 47-1513 47-1349 0-1476-453-1476-665h152c138 371 618 413 1185 413 391 0 895-26 1236-42 353-15 983-61 1311-61 656 0 1236 123 1400 432h38c176-309 756-432 1412-432 328 0 958 36 1299 56 353 21 857 47 1248 47 542 0 1021-47 1174-413z">
          <text:p/>
        </draw:path>
        <draw:frame draw:style-name="gr198" draw:text-style-name="P7" draw:layer="layout" svg:width="12.608cm" svg:height="1.102cm" svg:x="5.137cm" svg:y="21.445cm">
          <draw:text-box>
            <text:p text:style-name="P6"><text:span text:style-name="T17">Indel Signature Repertoir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394" draw:style="rect" draw:dots1="1" draw:dots1-length="0.09cm" draw:dots2="1" draw:dots2-length="0.361cm" draw:distance="0.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.333cm" fo:page-height="42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5T20:04:18.467384298</dc:date>
    <meta:editing-duration>PT1H41M50S</meta:editing-duration>
    <meta:editing-cycles>5</meta:editing-cycles>
    <meta:generator>LibreOffice/26.2.2.2$Linux_X86_64 LibreOffice_project/620$Build-2</meta:generator>
    <meta:print-date>2026-06-25T18:32:46.069469224</meta:print-date>
    <meta:printed-by>PDF files</meta:printed-by>
    <meta:document-statistic meta:object-count="1278"/>
  </office:meta>
</office:document-meta>
</file>